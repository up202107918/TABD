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4625cm" style:use-optimal-column-width="true"/>
    </style:style>
    <style:style style:name="co3" style:family="table-column">
      <style:table-column-properties fo:break-before="auto" style:column-width="5.26520833333333cm" style:use-optimal-column-width="true"/>
    </style:style>
    <style:style style:name="co4" style:family="table-column">
      <style:table-column-properties fo:break-before="auto" style:column-width="28.654375cm" style:use-optimal-column-width="true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15.7691666666667cm" style:use-optimal-column-width="true"/>
    </style:style>
    <style:style style:name="co7" style:family="table-column">
      <style:table-column-properties fo:break-before="auto" style:column-width="12.461875cm" style:use-optimal-column-width="true"/>
    </style:style>
    <style:style style:name="co8" style:family="table-column">
      <style:table-column-properties fo:break-before="auto" style:column-width="19.4204166666667cm" style:use-optimal-column-width="true"/>
    </style:style>
    <style:style style:name="co9" style:family="table-column">
      <style:table-column-properties fo:break-before="auto" style:column-width="16.35125cm" style:use-optimal-column-width="true"/>
    </style:style>
    <style:style style:name="co10" style:family="table-column">
      <style:table-column-properties fo:break-before="auto" style:column-width="8.01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nexo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0"/>
        <table:table-column table:style-name="co9" table:default-cell-style-name="ce1"/>
        <table:table-column table:style-name="co10" table:default-cell-style-name="ce1"/>
        <table:table-column table:style-name="co1" table:number-columns-repeated="16374" table:default-cell-style-name="ce1"/>
        <table:table-row table:style-name="ro1">
          <table:table-cell/>
          <table:table-cell office:value-type="string" table:style-name="ce3">
            <text:p>CÓD</text:p>
          </table:table-cell>
          <table:table-cell office:value-type="string" table:style-name="ce4">
            <text:p>CONC</text:p>
          </table:table-cell>
          <table:table-cell office:value-type="string" table:style-name="ce4">
            <text:p>FREG</text:p>
          </table:table-cell>
          <table:table-cell office:value-type="string" table:style-name="ce4">
            <text:p>ÓRG</text:p>
          </table:table-cell>
          <table:table-cell office:value-type="string" table:style-name="ce4">
            <text:p>[A] SIGLA - DENOMINAÇÃO</text:p>
          </table:table-cell>
          <table:table-cell office:value-type="string" table:style-name="ce5">
            <text:p>[B] SIGLA - DENOMINAÇÃO</text:p>
          </table:table-cell>
          <table:table-cell office:value-type="string" table:style-name="ce4">
            <text:p>[C] SIGLA - DENOMINAÇÃO</text:p>
          </table:table-cell>
          <table:table-cell office:value-type="string" table:style-name="ce4">
            <text:p>[D] SIGLA - DENOMINAÇÃO</text:p>
          </table:table-cell>
          <table:table-cell office:value-type="string" table:style-name="ce4">
            <text:p>[E] SIGLA - DENOMINAÇÃO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100" table:style-name="ce6">
            <text:p>010100</text:p>
          </table:table-cell>
          <table:table-cell office:value-type="string" table:style-name="ce1">
            <text:p>Águeda</text:p>
          </table:table-cell>
          <table:table-cell table:style-name="ce7"/>
          <table:table-cell office:value-type="string" table:style-name="ce1">
            <text:p>CM</text:p>
          </table:table-cell>
          <table:table-cell office:value-type="string" table:style-name="ce7">
            <text:p>[PPD/PSD.CDS-PP - TODOS SOMOS ÁGUE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00" table:style-name="ce9">
            <text:p>010100</text:p>
          </table:table-cell>
          <table:table-cell office:value-type="string" table:style-name="ce1">
            <text:p>Águed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03" table:style-name="ce9">
            <text:p>010103</text:p>
          </table:table-cell>
          <table:table-cell office:value-type="string" table:style-name="ce1">
            <text:p>Águeda</text:p>
          </table:table-cell>
          <table:table-cell office:value-type="string" table:style-name="ce8">
            <text:p>Aguada de Cim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09" table:style-name="ce9">
            <text:p>010109</text:p>
          </table:table-cell>
          <table:table-cell office:value-type="string" table:style-name="ce1">
            <text:p>Águeda</text:p>
          </table:table-cell>
          <table:table-cell office:value-type="string" table:style-name="ce8">
            <text:p>Ferment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office:value-type="string" table:style-name="ce8">
            <text:p>[M.G.F. - Movimento Gosto de Ferment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12" table:style-name="ce9">
            <text:p>010112</text:p>
          </table:table-cell>
          <table:table-cell office:value-type="string" table:style-name="ce1">
            <text:p>Águeda</text:p>
          </table:table-cell>
          <table:table-cell office:value-type="string" table:style-name="ce8">
            <text:p>Macinhata do Voug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19" table:style-name="ce9">
            <text:p>010119</text:p>
          </table:table-cell>
          <table:table-cell office:value-type="string" table:style-name="ce1">
            <text:p>Águeda</text:p>
          </table:table-cell>
          <table:table-cell office:value-type="string" table:style-name="ce8">
            <text:p>Valongo do Voug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21" table:style-name="ce9">
            <text:p>010121</text:p>
          </table:table-cell>
          <table:table-cell office:value-type="string" table:style-name="ce1">
            <text:p>Águeda</text:p>
          </table:table-cell>
          <table:table-cell office:value-type="string" table:style-name="ce8">
            <text:p>União das freguesias de Águeda e Borral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22" table:style-name="ce9">
            <text:p>010122</text:p>
          </table:table-cell>
          <table:table-cell office:value-type="string" table:style-name="ce1">
            <text:p>Águeda</text:p>
          </table:table-cell>
          <table:table-cell office:value-type="string" table:style-name="ce8">
            <text:p>União das freguesias de Barrô e Aguada de Baix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office:value-type="string" table:style-name="ce8">
            <text:p>[L.I.A.B.B. - Lista Independente de Aguada de Baixo e Barrô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23" table:style-name="ce9">
            <text:p>010123</text:p>
          </table:table-cell>
          <table:table-cell office:value-type="string" table:style-name="ce1">
            <text:p>Águeda</text:p>
          </table:table-cell>
          <table:table-cell office:value-type="string" table:style-name="ce8">
            <text:p>União das freguesias de Belazaima do Chão, Castanheira do Vouga e Agad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24" table:style-name="ce9">
            <text:p>010124</text:p>
          </table:table-cell>
          <table:table-cell office:value-type="string" table:style-name="ce1">
            <text:p>Águeda</text:p>
          </table:table-cell>
          <table:table-cell office:value-type="string" table:style-name="ce8">
            <text:p>União das freguesias de Recardães e Espinhe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office:value-type="string" table:style-name="ce8">
            <text:p>[LP - Lista do Progresso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25" table:style-name="ce9">
            <text:p>010125</text:p>
          </table:table-cell>
          <table:table-cell office:value-type="string" table:style-name="ce1">
            <text:p>Águeda</text:p>
          </table:table-cell>
          <table:table-cell office:value-type="string" table:style-name="ce8">
            <text:p>União das freguesias de Travassô e Óis da Rib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26" table:style-name="ce9">
            <text:p>010126</text:p>
          </table:table-cell>
          <table:table-cell office:value-type="string" table:style-name="ce1">
            <text:p>Águeda</text:p>
          </table:table-cell>
          <table:table-cell office:value-type="string" table:style-name="ce8">
            <text:p>União das freguesias de Trofa, Segadães e Lamas do Voug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27" table:style-name="ce9">
            <text:p>010127</text:p>
          </table:table-cell>
          <table:table-cell office:value-type="string" table:style-name="ce1">
            <text:p>Águeda</text:p>
          </table:table-cell>
          <table:table-cell office:value-type="string" table:style-name="ce8">
            <text:p>União das freguesias do Préstimo e Macieira de Alcob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SOMOS ÁGUEDA]</text:p>
          </table:table-cell>
          <table:table-cell table:style-name="ce1"/>
          <table:table-cell office:value-type="string" table:style-name="ce8">
            <text:p>[L.I.P.M. - Lista Independente Préstimo Maci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00" table:style-name="ce9">
            <text:p>010300</text:p>
          </table:table-cell>
          <table:table-cell office:value-type="string" table:style-name="ce1">
            <text:p>Anadi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00" table:style-name="ce9">
            <text:p>010300</text:p>
          </table:table-cell>
          <table:table-cell office:value-type="string" table:style-name="ce1">
            <text:p>Anadi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04" table:style-name="ce9">
            <text:p>010304</text:p>
          </table:table-cell>
          <table:table-cell office:value-type="string" table:style-name="ce1">
            <text:p>Anadia</text:p>
          </table:table-cell>
          <table:table-cell office:value-type="string" table:style-name="ce8">
            <text:p>Avelãs de Caminh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05" table:style-name="ce9">
            <text:p>010305</text:p>
          </table:table-cell>
          <table:table-cell office:value-type="string" table:style-name="ce1">
            <text:p>Anadia</text:p>
          </table:table-cell>
          <table:table-cell office:value-type="string" table:style-name="ce8">
            <text:p>Avelãs de Cim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07" table:style-name="ce9">
            <text:p>010307</text:p>
          </table:table-cell>
          <table:table-cell office:value-type="string" table:style-name="ce1">
            <text:p>Anadia</text:p>
          </table:table-cell>
          <table:table-cell office:value-type="string" table:style-name="ce8">
            <text:p>Moi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09" table:style-name="ce9">
            <text:p>010309</text:p>
          </table:table-cell>
          <table:table-cell office:value-type="string" table:style-name="ce1">
            <text:p>Anadia</text:p>
          </table:table-cell>
          <table:table-cell office:value-type="string" table:style-name="ce8">
            <text:p>Sangalh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10" table:style-name="ce9">
            <text:p>010310</text:p>
          </table:table-cell>
          <table:table-cell office:value-type="string" table:style-name="ce1">
            <text:p>Anadia</text:p>
          </table:table-cell>
          <table:table-cell office:value-type="string" table:style-name="ce8">
            <text:p>São Lourenço do Bair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12" table:style-name="ce9">
            <text:p>010312</text:p>
          </table:table-cell>
          <table:table-cell office:value-type="string" table:style-name="ce1">
            <text:p>Anadia</text:p>
          </table:table-cell>
          <table:table-cell office:value-type="string" table:style-name="ce8">
            <text:p>Vila Nova de Monsar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13" table:style-name="ce9">
            <text:p>010313</text:p>
          </table:table-cell>
          <table:table-cell office:value-type="string" table:style-name="ce1">
            <text:p>Anadia</text:p>
          </table:table-cell>
          <table:table-cell office:value-type="string" table:style-name="ce8">
            <text:p>Vilarinho do Bair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16" table:style-name="ce9">
            <text:p>010316</text:p>
          </table:table-cell>
          <table:table-cell office:value-type="string" table:style-name="ce1">
            <text:p>Anadia</text:p>
          </table:table-cell>
          <table:table-cell office:value-type="string" table:style-name="ce8">
            <text:p>União das freguesias de Amoreira da Gândara, Paredes do Bairro e Anc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17" table:style-name="ce9">
            <text:p>010317</text:p>
          </table:table-cell>
          <table:table-cell office:value-type="string" table:style-name="ce1">
            <text:p>Anadia</text:p>
          </table:table-cell>
          <table:table-cell office:value-type="string" table:style-name="ce8">
            <text:p>União das freguesias de Arcos e Mogofor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318" table:style-name="ce9">
            <text:p>010318</text:p>
          </table:table-cell>
          <table:table-cell office:value-type="string" table:style-name="ce1">
            <text:p>Anadia</text:p>
          </table:table-cell>
          <table:table-cell office:value-type="string" table:style-name="ce8">
            <text:p>União das freguesias de Tamengos, Aguim e Óis do Bair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A.P. - Movimento Independente Anadia Primeiro]</text:p>
          </table:table-cell>
          <table:table-cell office:value-type="string" table:style-name="ce1">
            <text:p>[U.T.D. - União, Trabalho e Dedicaçã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411" table:style-name="ce9">
            <text:p>010411</text:p>
          </table:table-cell>
          <table:table-cell office:value-type="string" table:style-name="ce1">
            <text:p>Arouca</text:p>
          </table:table-cell>
          <table:table-cell office:value-type="string" table:style-name="ce8">
            <text:p>Ferme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PFF - Lista Independente Pelo Futuro de Ferme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413" table:style-name="ce9">
            <text:p>010413</text:p>
          </table:table-cell>
          <table:table-cell office:value-type="string" table:style-name="ce1">
            <text:p>Arouca</text:p>
          </table:table-cell>
          <table:table-cell office:value-type="string" table:style-name="ce8">
            <text:p>Mansor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PM - Lista Independente por Manso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417" table:style-name="ce9">
            <text:p>010417</text:p>
          </table:table-cell>
          <table:table-cell office:value-type="string" table:style-name="ce1">
            <text:p>Arouca</text:p>
          </table:table-cell>
          <table:table-cell office:value-type="string" table:style-name="ce8">
            <text:p>São Miguel do Ma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MATO - Unir São Miguel do Ma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418" table:style-name="ce9">
            <text:p>010418</text:p>
          </table:table-cell>
          <table:table-cell office:value-type="string" table:style-name="ce1">
            <text:p>Arouca</text:p>
          </table:table-cell>
          <table:table-cell office:value-type="string" table:style-name="ce8">
            <text:p>Tropeç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T - Unidos Por Tropeç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00" table:style-name="ce9">
            <text:p>010500</text:p>
          </table:table-cell>
          <table:table-cell office:value-type="string" table:style-name="ce1">
            <text:p>Aveir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A - JUNTOS POR AV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00" table:style-name="ce9">
            <text:p>010500</text:p>
          </table:table-cell>
          <table:table-cell office:value-type="string" table:style-name="ce1">
            <text:p>Aveir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A - JUNTOS POR AV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01" table:style-name="ce9">
            <text:p>010501</text:p>
          </table:table-cell>
          <table:table-cell office:value-type="string" table:style-name="ce1">
            <text:p>Aveiro</text:p>
          </table:table-cell>
          <table:table-cell office:value-type="string" table:style-name="ce8">
            <text:p>Arad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A - JUNTOS POR ARAD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02" table:style-name="ce9">
            <text:p>010502</text:p>
          </table:table-cell>
          <table:table-cell office:value-type="string" table:style-name="ce1">
            <text:p>Aveiro</text:p>
          </table:table-cell>
          <table:table-cell office:value-type="string" table:style-name="ce8">
            <text:p>Cac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C - JUNTOS POR CAC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05" table:style-name="ce9">
            <text:p>010505</text:p>
          </table:table-cell>
          <table:table-cell office:value-type="string" table:style-name="ce1">
            <text:p>Aveiro</text:p>
          </table:table-cell>
          <table:table-cell office:value-type="string" table:style-name="ce8">
            <text:p>Esgu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E - JUNTOS POR ESGU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08" table:style-name="ce9">
            <text:p>010508</text:p>
          </table:table-cell>
          <table:table-cell office:value-type="string" table:style-name="ce1">
            <text:p>Aveiro</text:p>
          </table:table-cell>
          <table:table-cell office:value-type="string" table:style-name="ce8">
            <text:p>Oliveirin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O - JUNTOS POR OLIVEIRIN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10" table:style-name="ce9">
            <text:p>010510</text:p>
          </table:table-cell>
          <table:table-cell office:value-type="string" table:style-name="ce1">
            <text:p>Aveiro</text:p>
          </table:table-cell>
          <table:table-cell office:value-type="string" table:style-name="ce8">
            <text:p>São Bernar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SB - JUNTOS POR SÃO BERNAR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11" table:style-name="ce9">
            <text:p>010511</text:p>
          </table:table-cell>
          <table:table-cell office:value-type="string" table:style-name="ce1">
            <text:p>Aveiro</text:p>
          </table:table-cell>
          <table:table-cell office:value-type="string" table:style-name="ce8">
            <text:p>São Jacin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SJ - JUNTOS POR SÃO JACI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13" table:style-name="ce9">
            <text:p>010513</text:p>
          </table:table-cell>
          <table:table-cell office:value-type="string" table:style-name="ce1">
            <text:p>Aveiro</text:p>
          </table:table-cell>
          <table:table-cell office:value-type="string" table:style-name="ce8">
            <text:p>Santa Joan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SJ - JUNTOS POR SANTA JOA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15" table:style-name="ce9">
            <text:p>010515</text:p>
          </table:table-cell>
          <table:table-cell office:value-type="string" table:style-name="ce1">
            <text:p>Aveiro</text:p>
          </table:table-cell>
          <table:table-cell office:value-type="string" table:style-name="ce8">
            <text:p>Eixo e Eiro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EE - JUNTOS POR EIXO E EIRO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16" table:style-name="ce9">
            <text:p>010516</text:p>
          </table:table-cell>
          <table:table-cell office:value-type="string" table:style-name="ce1">
            <text:p>Aveiro</text:p>
          </table:table-cell>
          <table:table-cell office:value-type="string" table:style-name="ce8">
            <text:p>Requeixo, Nossa Senhora de Fátima e Nari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RFN - JUNTOS POR REQUEIXO - FÁTIMA - NARI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517" table:style-name="ce9">
            <text:p>010517</text:p>
          </table:table-cell>
          <table:table-cell office:value-type="string" table:style-name="ce1">
            <text:p>Aveiro</text:p>
          </table:table-cell>
          <table:table-cell office:value-type="string" table:style-name="ce8">
            <text:p>União das freguesias de Glória e Vera Cru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ALIANÇA COM AVEIRO]</text:p>
          </table:table-cell>
          <table:table-cell table:style-name="ce1"/>
          <table:table-cell office:value-type="string" table:style-name="ce8">
            <text:p>[JPGVC - JUNTOS POR GLÓRIA E VERA-CRU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704" table:style-name="ce9">
            <text:p>010704</text:p>
          </table:table-cell>
          <table:table-cell office:value-type="string" table:style-name="ce1">
            <text:p>Espinho</text:p>
          </table:table-cell>
          <table:table-cell office:value-type="string" table:style-name="ce8">
            <text:p>Param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 - Independentes de Param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706" table:style-name="ce9">
            <text:p>010706</text:p>
          </table:table-cell>
          <table:table-cell office:value-type="string" table:style-name="ce1">
            <text:p>Espinho</text:p>
          </table:table-cell>
          <table:table-cell office:value-type="string" table:style-name="ce8">
            <text:p>União das freguesias de Anta e Guetim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IGA - Somos Independentes Guetim Ant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800" table:style-name="ce9">
            <text:p>010800</text:p>
          </table:table-cell>
          <table:table-cell office:value-type="string" table:style-name="ce1">
            <text:p>Estarrej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QUERER MAIS!]</text:p>
          </table:table-cell>
          <table:table-cell table:style-name="ce1"/>
          <table:table-cell office:value-type="string" table:style-name="ce8">
            <text:p>[PCE - Pela Cidadania Estarrej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800" table:style-name="ce9">
            <text:p>010800</text:p>
          </table:table-cell>
          <table:table-cell office:value-type="string" table:style-name="ce1">
            <text:p>Estarrej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QUERER MAIS!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801" table:style-name="ce9">
            <text:p>010801</text:p>
          </table:table-cell>
          <table:table-cell office:value-type="string" table:style-name="ce1">
            <text:p>Estarreja</text:p>
          </table:table-cell>
          <table:table-cell office:value-type="string" table:style-name="ce8">
            <text:p>Avan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QUERER MAIS!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805" table:style-name="ce9">
            <text:p>010805</text:p>
          </table:table-cell>
          <table:table-cell office:value-type="string" table:style-name="ce1">
            <text:p>Estarreja</text:p>
          </table:table-cell>
          <table:table-cell office:value-type="string" table:style-name="ce8">
            <text:p>Pardilhó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QUERER MAIS!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806" table:style-name="ce9">
            <text:p>010806</text:p>
          </table:table-cell>
          <table:table-cell office:value-type="string" table:style-name="ce1">
            <text:p>Estarreja</text:p>
          </table:table-cell>
          <table:table-cell office:value-type="string" table:style-name="ce8">
            <text:p>Salreu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QUERER MAIS!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808" table:style-name="ce9">
            <text:p>010808</text:p>
          </table:table-cell>
          <table:table-cell office:value-type="string" table:style-name="ce1">
            <text:p>Estarreja</text:p>
          </table:table-cell>
          <table:table-cell office:value-type="string" table:style-name="ce8">
            <text:p>União das freguesias de Beduído e Vei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QUERER MAIS!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809" table:style-name="ce9">
            <text:p>010809</text:p>
          </table:table-cell>
          <table:table-cell office:value-type="string" table:style-name="ce1">
            <text:p>Estarreja</text:p>
          </table:table-cell>
          <table:table-cell office:value-type="string" table:style-name="ce8">
            <text:p>União das freguesias de Canelas e Fermelã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QUERER MAIS!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902" table:style-name="ce9">
            <text:p>010902</text:p>
          </table:table-cell>
          <table:table-cell office:value-type="string" table:style-name="ce1">
            <text:p>Feira</text:p>
          </table:table-cell>
          <table:table-cell office:value-type="string" table:style-name="ce8">
            <text:p>Arrifan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A - UNIDOS POR ARRIFA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907" table:style-name="ce9">
            <text:p>010907</text:p>
          </table:table-cell>
          <table:table-cell office:value-type="string" table:style-name="ce1">
            <text:p>Feira</text:p>
          </table:table-cell>
          <table:table-cell office:value-type="string" table:style-name="ce8">
            <text:p>Fi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F - MOVIMENTO INDEPENDENTE DE FIÃ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925" table:style-name="ce9">
            <text:p>010925</text:p>
          </table:table-cell>
          <table:table-cell office:value-type="string" table:style-name="ce1">
            <text:p>Feira</text:p>
          </table:table-cell>
          <table:table-cell office:value-type="string" table:style-name="ce8">
            <text:p>Santa Maria de Lam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SML - SOMOS SANTA MARIA DE LAM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926" table:style-name="ce9">
            <text:p>010926</text:p>
          </table:table-cell>
          <table:table-cell office:value-type="string" table:style-name="ce1">
            <text:p>Feira</text:p>
          </table:table-cell>
          <table:table-cell office:value-type="string" table:style-name="ce8">
            <text:p>São João de Ver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SJV - MOVIMENTO INDEPENDENTE POR S. JOÃO DE VÊ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935" table:style-name="ce9">
            <text:p>010935</text:p>
          </table:table-cell>
          <table:table-cell office:value-type="string" table:style-name="ce1">
            <text:p>Feira</text:p>
          </table:table-cell>
          <table:table-cell office:value-type="string" table:style-name="ce8">
            <text:p>União das freguesias de Santa Maria da Feira, Travanca, Sanfins e Esparg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SF - MOVIMENTO CÍVICO SOMOS F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0" table:style-name="ce9">
            <text:p>011100</text:p>
          </table:table-cell>
          <table:table-cell office:value-type="string" table:style-name="ce1">
            <text:p>Mealhad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MPT.PPM - JUNTOS PELO CONCELHO DA MEALHA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0" table:style-name="ce9">
            <text:p>011100</text:p>
          </table:table-cell>
          <table:table-cell office:value-type="string" table:style-name="ce1">
            <text:p>Mealhad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MPT.PPM - JUNTOS PELO CONCELHO DA MEALHA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2" table:style-name="ce9">
            <text:p>011102</text:p>
          </table:table-cell>
          <table:table-cell office:value-type="string" table:style-name="ce1">
            <text:p>Mealhada</text:p>
          </table:table-cell>
          <table:table-cell office:value-type="string" table:style-name="ce8">
            <text:p>Barcouç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JUNTOS PELO CONCELHO DA MEALHA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3" table:style-name="ce9">
            <text:p>011103</text:p>
          </table:table-cell>
          <table:table-cell office:value-type="string" table:style-name="ce1">
            <text:p>Mealhada</text:p>
          </table:table-cell>
          <table:table-cell office:value-type="string" table:style-name="ce8">
            <text:p>Casal Comb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JUNTOS PELO CONCELHO DA MEALHA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4" table:style-name="ce9">
            <text:p>011104</text:p>
          </table:table-cell>
          <table:table-cell office:value-type="string" table:style-name="ce1">
            <text:p>Mealhada</text:p>
          </table:table-cell>
          <table:table-cell office:value-type="string" table:style-name="ce8">
            <text:p>Lus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JUNTOS PELO CONCELHO DA MEALHA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6" table:style-name="ce9">
            <text:p>011106</text:p>
          </table:table-cell>
          <table:table-cell office:value-type="string" table:style-name="ce1">
            <text:p>Mealhada</text:p>
          </table:table-cell>
          <table:table-cell office:value-type="string" table:style-name="ce8">
            <text:p>Pampilh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JUNTOS PELO CONCELHO DA MEALHA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7" table:style-name="ce9">
            <text:p>011107</text:p>
          </table:table-cell>
          <table:table-cell office:value-type="string" table:style-name="ce1">
            <text:p>Mealhada</text:p>
          </table:table-cell>
          <table:table-cell office:value-type="string" table:style-name="ce8">
            <text:p>Vacari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JUNTOS PELO CONCELHO DA MEALHA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9" table:style-name="ce9">
            <text:p>011109</text:p>
          </table:table-cell>
          <table:table-cell office:value-type="string" table:style-name="ce1">
            <text:p>Mealhada</text:p>
          </table:table-cell>
          <table:table-cell office:value-type="string" table:style-name="ce8">
            <text:p>União das freguesias da Mealhada, Ventosa do Bairro e Ant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JUNTOS PELO CONCELHO DA MEALHA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302" table:style-name="ce9">
            <text:p>011302</text:p>
          </table:table-cell>
          <table:table-cell office:value-type="string" table:style-name="ce1">
            <text:p>Oliveira de Azeméis</text:p>
          </table:table-cell>
          <table:table-cell office:value-type="string" table:style-name="ce8">
            <text:p>Cesar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C - Independentes por Ces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403" table:style-name="ce9">
            <text:p>011403</text:p>
          </table:table-cell>
          <table:table-cell office:value-type="string" table:style-name="ce1">
            <text:p>Oliveira do Bairro</text:p>
          </table:table-cell>
          <table:table-cell office:value-type="string" table:style-name="ce8">
            <text:p>Oiã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fro - Movimento Independente de Oiã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503" table:style-name="ce9">
            <text:p>011503</text:p>
          </table:table-cell>
          <table:table-cell office:value-type="string" table:style-name="ce1">
            <text:p>Ovar</text:p>
          </table:table-cell>
          <table:table-cell office:value-type="string" table:style-name="ce8">
            <text:p>Esmoriz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IPE - Grupo Independentes por Esmori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600" table:style-name="ce9">
            <text:p>011600</text:p>
          </table:table-cell>
          <table:table-cell office:value-type="string" table:style-name="ce1">
            <text:p>São João da Madeir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SJM - SJM Semp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600" table:style-name="ce9">
            <text:p>011600</text:p>
          </table:table-cell>
          <table:table-cell office:value-type="string" table:style-name="ce1">
            <text:p>São João da Madeir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SJM - SJM Semp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601" table:style-name="ce9">
            <text:p>011601</text:p>
          </table:table-cell>
          <table:table-cell office:value-type="string" table:style-name="ce1">
            <text:p>São João da Madeira</text:p>
          </table:table-cell>
          <table:table-cell office:value-type="string" table:style-name="ce8">
            <text:p>São João da Mad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JM - SJM Semp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702" table:style-name="ce9">
            <text:p>011702</text:p>
          </table:table-cell>
          <table:table-cell office:value-type="string" table:style-name="ce1">
            <text:p>Sever do Vouga</text:p>
          </table:table-cell>
          <table:table-cell office:value-type="string" table:style-name="ce8">
            <text:p>Couto de Estev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.O.I - Um Olhar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804" table:style-name="ce9">
            <text:p>011804</text:p>
          </table:table-cell>
          <table:table-cell office:value-type="string" table:style-name="ce1">
            <text:p>Vagos</text:p>
          </table:table-cell>
          <table:table-cell office:value-type="string" table:style-name="ce8">
            <text:p>Gafanha da Boa Ho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BH - Boa Hora Chegou a Hora]</text:p>
          </table:table-cell>
          <table:table-cell office:value-type="string" table:style-name="ce1">
            <text:p>[NPT - Nós Por Todo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100" table:style-name="ce9">
            <text:p>020100</text:p>
          </table:table-cell>
          <table:table-cell office:value-type="string" table:style-name="ce1">
            <text:p>Aljustrel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UM NOVO RUM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100" table:style-name="ce9">
            <text:p>020100</text:p>
          </table:table-cell>
          <table:table-cell office:value-type="string" table:style-name="ce1">
            <text:p>Aljustrel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UM NOVO RUM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200" table:style-name="ce9">
            <text:p>020200</text:p>
          </table:table-cell>
          <table:table-cell office:value-type="string" table:style-name="ce1">
            <text:p>Almodôvar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IPA - Independentes por Almodôv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200" table:style-name="ce9">
            <text:p>020200</text:p>
          </table:table-cell>
          <table:table-cell office:value-type="string" table:style-name="ce1">
            <text:p>Almodôvar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IPA - Independentes por Almodôv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203" table:style-name="ce9">
            <text:p>020203</text:p>
          </table:table-cell>
          <table:table-cell office:value-type="string" table:style-name="ce1">
            <text:p>Almodôvar</text:p>
          </table:table-cell>
          <table:table-cell office:value-type="string" table:style-name="ce8">
            <text:p>Rosári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A - Independentes por Almodôv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205" table:style-name="ce9">
            <text:p>020205</text:p>
          </table:table-cell>
          <table:table-cell office:value-type="string" table:style-name="ce1">
            <text:p>Almodôvar</text:p>
          </table:table-cell>
          <table:table-cell office:value-type="string" table:style-name="ce8">
            <text:p>Santa Cruz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A - Independentes por Almodôv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206" table:style-name="ce9">
            <text:p>020206</text:p>
          </table:table-cell>
          <table:table-cell office:value-type="string" table:style-name="ce1">
            <text:p>Almodôvar</text:p>
          </table:table-cell>
          <table:table-cell office:value-type="string" table:style-name="ce8">
            <text:p>São Barnabé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A - Independentes por Almodôv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208" table:style-name="ce9">
            <text:p>020208</text:p>
          </table:table-cell>
          <table:table-cell office:value-type="string" table:style-name="ce1">
            <text:p>Almodôvar</text:p>
          </table:table-cell>
          <table:table-cell office:value-type="string" table:style-name="ce8">
            <text:p>Aldeia dos Fernand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A - Independentes por Almodôv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209" table:style-name="ce9">
            <text:p>020209</text:p>
          </table:table-cell>
          <table:table-cell office:value-type="string" table:style-name="ce1">
            <text:p>Almodôvar</text:p>
          </table:table-cell>
          <table:table-cell office:value-type="string" table:style-name="ce8">
            <text:p>União das freguesias de Almodôvar e Graça dos Padr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IPA - Independentes por Almodôvar]</text:p>
          </table:table-cell>
          <table:table-cell office:value-type="string" table:style-name="ce8">
            <text:p>[APT - Almodôvar para Todo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210" table:style-name="ce9">
            <text:p>020210</text:p>
          </table:table-cell>
          <table:table-cell office:value-type="string" table:style-name="ce1">
            <text:p>Almodôvar</text:p>
          </table:table-cell>
          <table:table-cell office:value-type="string" table:style-name="ce8">
            <text:p>União das freguesias de Santa Clara-a-Nova e Gomes Air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A - Independentes por Almodôvar]</text:p>
          </table:table-cell>
          <table:table-cell office:value-type="string" table:style-name="ce1">
            <text:p>[IPA - Independentes por Almodôvar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300" table:style-name="ce9">
            <text:p>020300</text:p>
          </table:table-cell>
          <table:table-cell office:value-type="string" table:style-name="ce1">
            <text:p>Alvit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CONSTRUIR 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300" table:style-name="ce9">
            <text:p>020300</text:p>
          </table:table-cell>
          <table:table-cell office:value-type="string" table:style-name="ce1">
            <text:p>Alvit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CONSTRUIR 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301" table:style-name="ce9">
            <text:p>020301</text:p>
          </table:table-cell>
          <table:table-cell office:value-type="string" table:style-name="ce1">
            <text:p>Alvito</text:p>
          </table:table-cell>
          <table:table-cell office:value-type="string" table:style-name="ce8">
            <text:p>Alvi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ONSTRUIR 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302" table:style-name="ce9">
            <text:p>020302</text:p>
          </table:table-cell>
          <table:table-cell office:value-type="string" table:style-name="ce1">
            <text:p>Alvito</text:p>
          </table:table-cell>
          <table:table-cell office:value-type="string" table:style-name="ce8">
            <text:p>Vila Nova da Baron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ONSTRUIR 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400" table:style-name="ce9">
            <text:p>020400</text:p>
          </table:table-cell>
          <table:table-cell office:value-type="string" table:style-name="ce1">
            <text:p>Barranco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OR BARRANC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500" table:style-name="ce9">
            <text:p>020500</text:p>
          </table:table-cell>
          <table:table-cell office:value-type="string" table:style-name="ce1">
            <text:p>Bej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AIS BEJA]</text:p>
          </table:table-cell>
          <table:table-cell table:style-name="ce1"/>
          <table:table-cell office:value-type="string" table:style-name="ce8">
            <text:p>[PBCT - POR BEJA COM TO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500" table:style-name="ce9">
            <text:p>020500</text:p>
          </table:table-cell>
          <table:table-cell office:value-type="string" table:style-name="ce1">
            <text:p>Bej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AIS BEJA]</text:p>
          </table:table-cell>
          <table:table-cell table:style-name="ce1"/>
          <table:table-cell office:value-type="string" table:style-name="ce8">
            <text:p>[PBCT - POR BEJA COM TO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502" table:style-name="ce9">
            <text:p>020502</text:p>
          </table:table-cell>
          <table:table-cell office:value-type="string" table:style-name="ce1">
            <text:p>Beja</text:p>
          </table:table-cell>
          <table:table-cell office:value-type="string" table:style-name="ce8">
            <text:p>Baleiz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BCT - POR BEJA COM TO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503" table:style-name="ce9">
            <text:p>020503</text:p>
          </table:table-cell>
          <table:table-cell office:value-type="string" table:style-name="ce1">
            <text:p>Beja</text:p>
          </table:table-cell>
          <table:table-cell office:value-type="string" table:style-name="ce8">
            <text:p>Beringe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BEJ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506" table:style-name="ce9">
            <text:p>020506</text:p>
          </table:table-cell>
          <table:table-cell office:value-type="string" table:style-name="ce1">
            <text:p>Beja</text:p>
          </table:table-cell>
          <table:table-cell office:value-type="string" table:style-name="ce8">
            <text:p>Nossa Senhora das Nev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BCT - POR BEJA COM TO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516" table:style-name="ce9">
            <text:p>020516</text:p>
          </table:table-cell>
          <table:table-cell office:value-type="string" table:style-name="ce1">
            <text:p>Beja</text:p>
          </table:table-cell>
          <table:table-cell office:value-type="string" table:style-name="ce8">
            <text:p>São Mati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BCT - POR BEJA COM TO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520" table:style-name="ce9">
            <text:p>020520</text:p>
          </table:table-cell>
          <table:table-cell office:value-type="string" table:style-name="ce1">
            <text:p>Beja</text:p>
          </table:table-cell>
          <table:table-cell office:value-type="string" table:style-name="ce8">
            <text:p>União das freguesias de Beja (Salvador e Santa Maria da Feir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BEJA]</text:p>
          </table:table-cell>
          <table:table-cell table:style-name="ce1"/>
          <table:table-cell office:value-type="string" table:style-name="ce8">
            <text:p>[PBCT - POR BEJA COM TO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521" table:style-name="ce9">
            <text:p>020521</text:p>
          </table:table-cell>
          <table:table-cell office:value-type="string" table:style-name="ce1">
            <text:p>Beja</text:p>
          </table:table-cell>
          <table:table-cell office:value-type="string" table:style-name="ce8">
            <text:p>União das freguesias de Beja (Santiago Maior e São João Baptist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BEJA]</text:p>
          </table:table-cell>
          <table:table-cell table:style-name="ce1"/>
          <table:table-cell office:value-type="string" table:style-name="ce8">
            <text:p>[PBCT - POR BEJA COM TO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600" table:style-name="ce9">
            <text:p>020600</text:p>
          </table:table-cell>
          <table:table-cell office:value-type="string" table:style-name="ce1">
            <text:p>Castro Verde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OR CASTRO VER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600" table:style-name="ce9">
            <text:p>020600</text:p>
          </table:table-cell>
          <table:table-cell office:value-type="string" table:style-name="ce1">
            <text:p>Castro Verde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OR CASTRO VER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700" table:style-name="ce9">
            <text:p>020700</text:p>
          </table:table-cell>
          <table:table-cell office:value-type="string" table:style-name="ce1">
            <text:p>Cub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CUBA AGO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700" table:style-name="ce9">
            <text:p>020700</text:p>
          </table:table-cell>
          <table:table-cell office:value-type="string" table:style-name="ce1">
            <text:p>Cub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CUBA AGO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701" table:style-name="ce9">
            <text:p>020701</text:p>
          </table:table-cell>
          <table:table-cell office:value-type="string" table:style-name="ce1">
            <text:p>Cuba</text:p>
          </table:table-cell>
          <table:table-cell office:value-type="string" table:style-name="ce8">
            <text:p>Cub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UBA AGO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800" table:style-name="ce9">
            <text:p>020800</text:p>
          </table:table-cell>
          <table:table-cell office:value-type="string" table:style-name="ce1">
            <text:p>Ferreira do Alentej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OR FERREIRA DO ALENTEJ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800" table:style-name="ce9">
            <text:p>020800</text:p>
          </table:table-cell>
          <table:table-cell office:value-type="string" table:style-name="ce1">
            <text:p>Ferreira do Alentej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OR FERREIRA DO ALENTEJ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900" table:style-name="ce9">
            <text:p>020900</text:p>
          </table:table-cell>
          <table:table-cell office:value-type="string" table:style-name="ce1">
            <text:p>Mértol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OR MÉRTOLA]</text:p>
          </table:table-cell>
          <table:table-cell table:style-name="ce1"/>
          <table:table-cell office:value-type="string" table:style-name="ce8">
            <text:p>[MIM - Movimento Independente Mérto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900" table:style-name="ce9">
            <text:p>020900</text:p>
          </table:table-cell>
          <table:table-cell office:value-type="string" table:style-name="ce1">
            <text:p>Mértol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IM - Movimento Independente Mérto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0904" table:style-name="ce9">
            <text:p>020904</text:p>
          </table:table-cell>
          <table:table-cell office:value-type="string" table:style-name="ce1">
            <text:p>Mértola</text:p>
          </table:table-cell>
          <table:table-cell office:value-type="string" table:style-name="ce8">
            <text:p>Mérto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M - Movimento Independente Mérto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000" table:style-name="ce9">
            <text:p>021000</text:p>
          </table:table-cell>
          <table:table-cell office:value-type="string" table:style-name="ce1">
            <text:p>Mou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CORAGEM PARA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000" table:style-name="ce9">
            <text:p>021000</text:p>
          </table:table-cell>
          <table:table-cell office:value-type="string" table:style-name="ce1">
            <text:p>Mou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CORAGEM PARA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001" table:style-name="ce9">
            <text:p>021001</text:p>
          </table:table-cell>
          <table:table-cell office:value-type="string" table:style-name="ce1">
            <text:p>Moura</text:p>
          </table:table-cell>
          <table:table-cell office:value-type="string" table:style-name="ce8">
            <text:p>Amarelej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ORAGEM PARA MUDAR]</text:p>
          </table:table-cell>
          <table:table-cell table:style-name="ce1"/>
          <table:table-cell office:value-type="string" table:style-name="ce8">
            <text:p>[UPAPF - Unidos pela Amareleja! Prá Fr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002" table:style-name="ce9">
            <text:p>021002</text:p>
          </table:table-cell>
          <table:table-cell office:value-type="string" table:style-name="ce1">
            <text:p>Moura</text:p>
          </table:table-cell>
          <table:table-cell office:value-type="string" table:style-name="ce8">
            <text:p>Póvoa de São Migue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TPFP - Todos pela Freguesia da Póvo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009" table:style-name="ce9">
            <text:p>021009</text:p>
          </table:table-cell>
          <table:table-cell office:value-type="string" table:style-name="ce1">
            <text:p>Moura</text:p>
          </table:table-cell>
          <table:table-cell office:value-type="string" table:style-name="ce8">
            <text:p>União das freguesias de Moura (Santo Agostinho e São João Baptista) e Santo Amado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ORAGEM PARA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100" table:style-name="ce9">
            <text:p>021100</text:p>
          </table:table-cell>
          <table:table-cell office:value-type="string" table:style-name="ce1">
            <text:p>Odemi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ODEMIR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100" table:style-name="ce9">
            <text:p>021100</text:p>
          </table:table-cell>
          <table:table-cell office:value-type="string" table:style-name="ce1">
            <text:p>Odemi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ODEMIR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103" table:style-name="ce9">
            <text:p>021103</text:p>
          </table:table-cell>
          <table:table-cell office:value-type="string" table:style-name="ce1">
            <text:p>Odemira</text:p>
          </table:table-cell>
          <table:table-cell office:value-type="string" table:style-name="ce8">
            <text:p>Sabó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JC - Sabóia com fut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106" table:style-name="ce9">
            <text:p>021106</text:p>
          </table:table-cell>
          <table:table-cell office:value-type="string" table:style-name="ce1">
            <text:p>Odemira</text:p>
          </table:table-cell>
          <table:table-cell office:value-type="string" table:style-name="ce8">
            <text:p>São Luí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DEMIR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111" table:style-name="ce9">
            <text:p>021111</text:p>
          </table:table-cell>
          <table:table-cell office:value-type="string" table:style-name="ce1">
            <text:p>Odemira</text:p>
          </table:table-cell>
          <table:table-cell office:value-type="string" table:style-name="ce8">
            <text:p>Vila Nova de Milfont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DEMIRA COM FUTURO]</text:p>
          </table:table-cell>
          <table:table-cell table:style-name="ce1"/>
          <table:table-cell office:value-type="string" table:style-name="ce8">
            <text:p>[VNMIL - Movimento cidadãos pela nossa fregues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117" table:style-name="ce9">
            <text:p>021117</text:p>
          </table:table-cell>
          <table:table-cell office:value-type="string" table:style-name="ce1">
            <text:p>Odemira</text:p>
          </table:table-cell>
          <table:table-cell office:value-type="string" table:style-name="ce8">
            <text:p>Longueira/Almograv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DEMIR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120" table:style-name="ce9">
            <text:p>021120</text:p>
          </table:table-cell>
          <table:table-cell office:value-type="string" table:style-name="ce1">
            <text:p>Odemira</text:p>
          </table:table-cell>
          <table:table-cell office:value-type="string" table:style-name="ce8">
            <text:p>São Salvador e Santa Mar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DEMIRA COM FUTURO]</text:p>
          </table:table-cell>
          <table:table-cell table:style-name="ce1"/>
          <table:table-cell office:value-type="string" table:style-name="ce8">
            <text:p>[INDP-SSA - Independentes - São Salvador e Santa Mar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121" table:style-name="ce9">
            <text:p>021121</text:p>
          </table:table-cell>
          <table:table-cell office:value-type="string" table:style-name="ce1">
            <text:p>Odemira</text:p>
          </table:table-cell>
          <table:table-cell office:value-type="string" table:style-name="ce8">
            <text:p>São Teotóni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DEMIRA COM FUTURO]</text:p>
          </table:table-cell>
          <table:table-cell table:style-name="ce1"/>
          <table:table-cell office:value-type="string" table:style-name="ce8">
            <text:p>[VJ - Vamos Junt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200" table:style-name="ce9">
            <text:p>021200</text:p>
          </table:table-cell>
          <table:table-cell office:value-type="string" table:style-name="ce1">
            <text:p>Ourique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OR OURIQU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200" table:style-name="ce9">
            <text:p>021200</text:p>
          </table:table-cell>
          <table:table-cell office:value-type="string" table:style-name="ce1">
            <text:p>Ourique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OR OURIQU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203" table:style-name="ce9">
            <text:p>021203</text:p>
          </table:table-cell>
          <table:table-cell office:value-type="string" table:style-name="ce1">
            <text:p>Ourique</text:p>
          </table:table-cell>
          <table:table-cell office:value-type="string" table:style-name="ce8">
            <text:p>Ouriqu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OURIQU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206" table:style-name="ce9">
            <text:p>021206</text:p>
          </table:table-cell>
          <table:table-cell office:value-type="string" table:style-name="ce1">
            <text:p>Ourique</text:p>
          </table:table-cell>
          <table:table-cell office:value-type="string" table:style-name="ce8">
            <text:p>Santana da Se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OURIQU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207" table:style-name="ce9">
            <text:p>021207</text:p>
          </table:table-cell>
          <table:table-cell office:value-type="string" table:style-name="ce1">
            <text:p>Ourique</text:p>
          </table:table-cell>
          <table:table-cell office:value-type="string" table:style-name="ce8">
            <text:p>União das freguesias de Garvão e Santa Luz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OURIQU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208" table:style-name="ce9">
            <text:p>021208</text:p>
          </table:table-cell>
          <table:table-cell office:value-type="string" table:style-name="ce1">
            <text:p>Ourique</text:p>
          </table:table-cell>
          <table:table-cell office:value-type="string" table:style-name="ce8">
            <text:p>União das freguesias de Panoias e Conceiç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OURIQU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400" table:style-name="ce9">
            <text:p>021400</text:p>
          </table:table-cell>
          <table:table-cell office:value-type="string" table:style-name="ce1">
            <text:p>Vidiguei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ELA VID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400" table:style-name="ce9">
            <text:p>021400</text:p>
          </table:table-cell>
          <table:table-cell office:value-type="string" table:style-name="ce1">
            <text:p>Vidiguei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ELA VID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401" table:style-name="ce9">
            <text:p>021401</text:p>
          </table:table-cell>
          <table:table-cell office:value-type="string" table:style-name="ce1">
            <text:p>Vidigueira</text:p>
          </table:table-cell>
          <table:table-cell office:value-type="string" table:style-name="ce8">
            <text:p>Pedróg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A VID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402" table:style-name="ce9">
            <text:p>021402</text:p>
          </table:table-cell>
          <table:table-cell office:value-type="string" table:style-name="ce1">
            <text:p>Vidigueira</text:p>
          </table:table-cell>
          <table:table-cell office:value-type="string" table:style-name="ce8">
            <text:p>Selm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A VID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403" table:style-name="ce9">
            <text:p>021403</text:p>
          </table:table-cell>
          <table:table-cell office:value-type="string" table:style-name="ce1">
            <text:p>Vidigueira</text:p>
          </table:table-cell>
          <table:table-cell office:value-type="string" table:style-name="ce8">
            <text:p>Vidigu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A VID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21404" table:style-name="ce9">
            <text:p>021404</text:p>
          </table:table-cell>
          <table:table-cell office:value-type="string" table:style-name="ce1">
            <text:p>Vidigueira</text:p>
          </table:table-cell>
          <table:table-cell office:value-type="string" table:style-name="ce8">
            <text:p>Vila de Frad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A VID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00" table:style-name="ce9">
            <text:p>030100</text:p>
          </table:table-cell>
          <table:table-cell office:value-type="string" table:style-name="ce1">
            <text:p>Amare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8">
            <text:p>[AP - Amares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00" table:style-name="ce9">
            <text:p>030100</text:p>
          </table:table-cell>
          <table:table-cell office:value-type="string" table:style-name="ce1">
            <text:p>Amare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8">
            <text:p>[AP - Amares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02" table:style-name="ce9">
            <text:p>030102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Barrei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8">
            <text:p>[SPBP - SÃO PEDRO DE BARREIROS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04" table:style-name="ce9">
            <text:p>030104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Bic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BSN-S - Bico, S. Vicente - Sempre]</text:p>
          </table:table-cell>
          <table:table-cell office:value-type="string" table:style-name="ce1">
            <text:p>[MIB - Movimento Independente do Bic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05" table:style-name="ce9">
            <text:p>030105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Cair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RP - CAIRES <text:s/>PRIMEIRO]</text:p>
          </table:table-cell>
          <table:table-cell office:value-type="string" table:style-name="ce8">
            <text:p>[CRM - CAIRES MAI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07" table:style-name="ce9">
            <text:p>030107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Carraz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/>
          <table:table-cell office:value-type="float" office:value="30108" table:style-name="ce9">
            <text:p>030108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Dornel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DP - DORNELAS -PRIMEIRO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11" table:style-name="ce9">
            <text:p>030111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Fisc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8">
            <text:p>[FP - FISCAL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12" table:style-name="ce9">
            <text:p>030112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Go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S-GP - ADELINO SOUSA–GOÃES PRIMEIRO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13" table:style-name="ce9">
            <text:p>030113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Lag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8">
            <text:p>[DR-LP - DELFIM RODRIGUES – LAGO PRIMEIRO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18" table:style-name="ce9">
            <text:p>030118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Renduf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8">
            <text:p>[R-P - RENDUFE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19" table:style-name="ce9">
            <text:p>030119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Bouro (Santa Mari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10">
            <text:p>[PB - Por <text:s/>Bouro]</text:p>
          </table:table-cell>
          <table:table-cell office:value-type="string" table:style-name="ce8">
            <text:p>[AB - Amigos de Bour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20" table:style-name="ce9">
            <text:p>030120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Bouro (Santa Mart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/>
          <table:table-cell office:value-type="float" office:value="30125" table:style-name="ce9">
            <text:p>030125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União das freguesias de Amares e Figueir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8">
            <text:p>[AF-P - AMARES/FIGUEIREDO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26" table:style-name="ce9">
            <text:p>030126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União das freguesias de Caldelas, Sequeiros e Paranh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8">
            <text:p>[CPSP - CALDELAS/PARANHOS/SEQUEIROS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27" table:style-name="ce9">
            <text:p>030127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União das freguesias de Ferreiros, Prozelo e Bestei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8">
            <text:p>[FPB -P - FERREIROS/PROZELO/BESTEIROS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28" table:style-name="ce9">
            <text:p>030128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União das freguesias de Torre e Port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8">
            <text:p>[UITP - UNIÃO DE INDEPENDENTES POR TORRE E PORTE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129" table:style-name="ce9">
            <text:p>030129</text:p>
          </table:table-cell>
          <table:table-cell office:value-type="string" table:style-name="ce1">
            <text:p>Amares</text:p>
          </table:table-cell>
          <table:table-cell office:value-type="string" table:style-name="ce8">
            <text:p>União das freguesias de Vilela, Seramil e Paredes Sec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Amares]</text:p>
          </table:table-cell>
          <table:table-cell table:style-name="ce1"/>
          <table:table-cell office:value-type="string" table:style-name="ce8">
            <text:p>[VSPS-P - VILELA/SERAMIL/PAREDES SECAS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00" table:style-name="ce9">
            <text:p>030200</text:p>
          </table:table-cell>
          <table:table-cell office:value-type="string" table:style-name="ce1">
            <text:p>Barcelo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00" table:style-name="ce9">
            <text:p>030200</text:p>
          </table:table-cell>
          <table:table-cell office:value-type="string" table:style-name="ce1">
            <text:p>Barcelo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01" table:style-name="ce9">
            <text:p>030201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Abade de Nei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02" table:style-name="ce9">
            <text:p>030202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Abor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03" table:style-name="ce9">
            <text:p>030203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Ad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05" table:style-name="ce9">
            <text:p>030205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Airó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06" table:style-name="ce9">
            <text:p>030206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Aldreu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08" table:style-name="ce9">
            <text:p>030208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Alv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09" table:style-name="ce9">
            <text:p>030209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Arcoz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10" table:style-name="ce9">
            <text:p>030210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Arei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12" table:style-name="ce9">
            <text:p>030212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Balug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13" table:style-name="ce9">
            <text:p>030213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Barcelinh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15" table:style-name="ce9">
            <text:p>030215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Barquei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16" table:style-name="ce9">
            <text:p>030216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Cambes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18" table:style-name="ce9">
            <text:p>030218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Carapeç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20" table:style-name="ce9">
            <text:p>030220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Carvalh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21" table:style-name="ce9">
            <text:p>030221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Carvalh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24" table:style-name="ce9">
            <text:p>030224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Cossoura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28" table:style-name="ce9">
            <text:p>030228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Crist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34" table:style-name="ce9">
            <text:p>030234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Forn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35" table:style-name="ce9">
            <text:p>030235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Fragos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37" table:style-name="ce9">
            <text:p>030237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Gilmo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42" table:style-name="ce9">
            <text:p>030242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Lam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10">
            <text:p>[MIB - Movimento Independente Por Barcelos]</text:p>
          </table:table-cell>
          <table:table-cell office:value-type="string" table:style-name="ce8">
            <text:p>[afl - Acreditamos na Freguesia da Lam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43" table:style-name="ce9">
            <text:p>030243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Lijó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/>
          <table:table-cell office:value-type="float" office:value="30244" table:style-name="ce9">
            <text:p>030244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Macieira de Rat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UPM - Unidos por Maci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45" table:style-name="ce9">
            <text:p>030245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Manhe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47" table:style-name="ce9">
            <text:p>030247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Martim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A. - Martim Activ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52" table:style-name="ce9">
            <text:p>030252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Mour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54" table:style-name="ce9">
            <text:p>030254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Oliv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55" table:style-name="ce9">
            <text:p>030255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Palm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56" table:style-name="ce9">
            <text:p>030256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Panqu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57" table:style-name="ce9">
            <text:p>030257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Parad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59" table:style-name="ce9">
            <text:p>030259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Per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60" table:style-name="ce9">
            <text:p>030260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Perelh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61" table:style-name="ce9">
            <text:p>030261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Pou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63" table:style-name="ce9">
            <text:p>030263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Remelh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64" table:style-name="ce9">
            <text:p>030264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Rori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65" table:style-name="ce9">
            <text:p>030265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Rio Covo (Santa Eugéni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68" table:style-name="ce9">
            <text:p>030268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Galegos (Santa Mari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72" table:style-name="ce9">
            <text:p>030272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Galegos (São Martinh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77" table:style-name="ce9">
            <text:p>030277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Tamel (São Veríssim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ippsv - Independentes pelo Progresso de São Veríssim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79" table:style-name="ce9">
            <text:p>030279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Sil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82" table:style-name="ce9">
            <text:p>030282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c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83" table:style-name="ce9">
            <text:p>030283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Várze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87" table:style-name="ce9">
            <text:p>030287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Vila Se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vsp - Vila Sec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90" table:style-name="ce9">
            <text:p>030290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Alheira e Igreja No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91" table:style-name="ce9">
            <text:p>030291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Alvito (São Pedro e São Martinho) e Cou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92" table:style-name="ce9">
            <text:p>030292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Areias de Vilar e Encourad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uave - União de Areiuas de Vilar e Encoura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93" table:style-name="ce9">
            <text:p>030293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Barcelos, Vila Boa e Vila Frescainha (São Martinho e São Pedr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94" table:style-name="ce9">
            <text:p>030294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Campo e Tamel (São Pedro Fins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95" table:style-name="ce9">
            <text:p>030295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Carreira e Fonte Cober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96" table:style-name="ce9">
            <text:p>030296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Chorente, Góios, Courel, Pedra Furada e Guer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97" table:style-name="ce9">
            <text:p>030297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Creixomil e Mari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98" table:style-name="ce9">
            <text:p>030298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Durrães e Treg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299" table:style-name="ce9">
            <text:p>030299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Gamil e Mid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string" table:style-name="ce9">
            <text:p>0302FA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Milhazes, Vilar de Figos e Far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C - Movimento de Confi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string" table:style-name="ce9">
            <text:p>0302FB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Negreiros e Chav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string" table:style-name="ce9">
            <text:p>0302FC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Quintiães e Agui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string" table:style-name="ce9">
            <text:p>0302FD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Sequeade e Bastuço (São João e Santo Estev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string" table:style-name="ce9">
            <text:p>0302FE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Silveiros e Rio Covo (Santa Euláli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string" table:style-name="ce9">
            <text:p>0302FF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Tamel (Santa Leocádia) e Vilar do Mo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string" table:style-name="ce9">
            <text:p>0302FG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Viatodos, Grimancelos, Minhotães e Monte de Fral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string" table:style-name="ce9">
            <text:p>0302FH</text:p>
          </table:table-cell>
          <table:table-cell office:value-type="string" table:style-name="ce1">
            <text:p>Barcelos</text:p>
          </table:table-cell>
          <table:table-cell office:value-type="string" table:style-name="ce8">
            <text:p>União das freguesias de Vila Cova e Feit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MOS BARCELOS]</text:p>
          </table:table-cell>
          <table:table-cell table:style-name="ce1"/>
          <table:table-cell office:value-type="string" table:style-name="ce8">
            <text:p>[MIB - Movimento Independente Por Bar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00" table:style-name="ce9">
            <text:p>030300</text:p>
          </table:table-cell>
          <table:table-cell office:value-type="string" table:style-name="ce1">
            <text:p>Brag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office:value-type="string" table:style-name="ce8">
            <text:p>[CEM - Cidadania Em Movime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00" table:style-name="ce9">
            <text:p>030300</text:p>
          </table:table-cell>
          <table:table-cell office:value-type="string" table:style-name="ce1">
            <text:p>Brag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office:value-type="string" table:style-name="ce8">
            <text:p>[CEM - Cidadania Em Movime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01" table:style-name="ce9">
            <text:p>030301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Adaúf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12" table:style-name="ce9">
            <text:p>030312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Esp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13" table:style-name="ce9">
            <text:p>030313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Espor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15" table:style-name="ce9">
            <text:p>030315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Figueir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19" table:style-name="ce9">
            <text:p>030319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Gualt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office:value-type="string" table:style-name="ce8">
            <text:p>[CEM - Cidadania Em Movime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22" table:style-name="ce9">
            <text:p>030322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Lam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25" table:style-name="ce9">
            <text:p>030325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Mire de Tib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30" table:style-name="ce9">
            <text:p>030330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Padim da Graç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pg - Servir Pandim da Gra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31" table:style-name="ce9">
            <text:p>030331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Palm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office:value-type="string" table:style-name="ce8">
            <text:p>[CEM - Cidadania Em Movime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34" table:style-name="ce9">
            <text:p>030334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Pedral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36" table:style-name="ce9">
            <text:p>030336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Prisc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38" table:style-name="ce9">
            <text:p>030338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Ruilh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49" table:style-name="ce9">
            <text:p>030349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Braga (São Vicente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office:value-type="string" table:style-name="ce8">
            <text:p>[CEM - Cidadania Em Movime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51" table:style-name="ce9">
            <text:p>030351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Braga (São Vítor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office:value-type="string" table:style-name="ce8">
            <text:p>[CEM - Cidadania Em Movime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54" table:style-name="ce9">
            <text:p>030354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Sequ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55" table:style-name="ce9">
            <text:p>030355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Sobrepos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MM - Sobreposta Mais e Melh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56" table:style-name="ce9">
            <text:p>030356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Tad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57" table:style-name="ce9">
            <text:p>030357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Teb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63" table:style-name="ce9">
            <text:p>030363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Arentim e Cun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ac - Lista Independente por Arentim e Cun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64" table:style-name="ce9">
            <text:p>030364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Braga (Maximinos, Sé e Cividade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office:value-type="string" table:style-name="ce8">
            <text:p>[MDA - XXI Movimento Democrático Alternativ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65" table:style-name="ce9">
            <text:p>030365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Braga (São José de São Lázaro e São João do Sout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office:value-type="string" table:style-name="ce8">
            <text:p>[CEM - Cidadania Em Movime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66" table:style-name="ce9">
            <text:p>030366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Cabreiros e Passos (São Juli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67" table:style-name="ce9">
            <text:p>030367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Celeirós, Aveleda e Vimi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68" table:style-name="ce9">
            <text:p>030368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Crespos e Pousad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69" table:style-name="ce9">
            <text:p>030369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Escudeiros e Penso (Santo Estêvão e São Vicente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70" table:style-name="ce9">
            <text:p>030370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Este (São Pedro e São Mamede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371" table:style-name="ce9">
            <text:p>030371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Ferreiros e Gondizalv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372" table:style-name="ce9">
            <text:p>030372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Guisande e Oliveira (São Pedr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373" table:style-name="ce9">
            <text:p>030373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Lomar e Arc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374" table:style-name="ce9">
            <text:p>030374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Merelim (São Paio), Panoias e Parada de Tib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375" table:style-name="ce9">
            <text:p>030375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Merelim (São Pedro) e Fross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376" table:style-name="ce9">
            <text:p>030376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Morreira e Trandeir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377" table:style-name="ce9">
            <text:p>030377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Nogueira, Fraião e Lamaç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office:value-type="string" table:style-name="ce8">
            <text:p>[CEM - Cidadania Em Movime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378" table:style-name="ce9">
            <text:p>030378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Nogueiró e Ten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U - Construir a Uni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379" table:style-name="ce9">
            <text:p>030379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Real, Dume e Semelh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380" table:style-name="ce9">
            <text:p>030380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Santa Lucrécia de Algeriz e Nava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381" table:style-name="ce9">
            <text:p>030381</text:p>
          </table:table-cell>
          <table:table-cell office:value-type="string" table:style-name="ce1">
            <text:p>Braga</text:p>
          </table:table-cell>
          <table:table-cell office:value-type="string" table:style-name="ce8">
            <text:p>União das freguesias de Vilaça e Frad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JUNTOS POR BRAG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00" table:style-name="ce9">
            <text:p>030400</text:p>
          </table:table-cell>
          <table:table-cell office:value-type="string" table:style-name="ce1">
            <text:p>Cabeceiras de Bast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office:value-type="string" table:style-name="ce8">
            <text:p>[IPC - Independentes Por Cabeceir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00" table:style-name="ce9">
            <text:p>030400</text:p>
          </table:table-cell>
          <table:table-cell office:value-type="string" table:style-name="ce1">
            <text:p>Cabeceiras de Bast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office:value-type="string" table:style-name="ce8">
            <text:p>[IPC - Independentes Por Cabeceir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01" table:style-name="ce9">
            <text:p>030401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Abad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office:value-type="string" table:style-name="ce8">
            <text:p>[IPC - Independentes Por Cabeceir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04" table:style-name="ce9">
            <text:p>030404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Bas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05" table:style-name="ce9">
            <text:p>030405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Buc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06" table:style-name="ce9">
            <text:p>030406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Cabeceiras de Bas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07" table:style-name="ce9">
            <text:p>030407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Cave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office:value-type="string" table:style-name="ce8">
            <text:p>[IPC - Independentes Por Cabeceir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08" table:style-name="ce9">
            <text:p>030408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Fa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13" table:style-name="ce9">
            <text:p>030413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Pedra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office:value-type="string" table:style-name="ce8">
            <text:p>[IPC - Independentes Por Cabeceir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15" table:style-name="ce9">
            <text:p>030415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Rio Dou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office:value-type="string" table:style-name="ce8">
            <text:p>[IPC - Independentes Por Cabeceir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18" table:style-name="ce9">
            <text:p>030418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União das freguesias de Alvite e Pass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19" table:style-name="ce9">
            <text:p>030419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União das freguesias de Arco de Baúlhe e Vila Nun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office:value-type="string" table:style-name="ce8">
            <text:p>[IPC - Independentes Por Cabeceir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20" table:style-name="ce9">
            <text:p>030420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União das freguesias de Gondiães e Vilar de Cunh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GV - Unidos Por Gondiães e Vil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0421" table:style-name="ce9">
            <text:p>030421</text:p>
          </table:table-cell>
          <table:table-cell office:value-type="string" table:style-name="ce1">
            <text:p>Cabeceiras de Basto</text:p>
          </table:table-cell>
          <table:table-cell office:value-type="string" table:style-name="ce8">
            <text:p>União das freguesias de Refojos de Basto, Outeiro e Painz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CABECEIRAS MAIS FUTURO]</text:p>
          </table:table-cell>
          <table:table-cell table:style-name="ce1"/>
          <table:table-cell office:value-type="string" table:style-name="ce8">
            <text:p>[IPC - Independentes Por Cabeceir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501" table:style-name="ce9">
            <text:p>030501</text:p>
          </table:table-cell>
          <table:table-cell office:value-type="string" table:style-name="ce1">
            <text:p>Celorico de Basto</text:p>
          </table:table-cell>
          <table:table-cell office:value-type="string" table:style-name="ce8">
            <text:p>Agil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TPA - TODOS POR AGILD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508" table:style-name="ce9">
            <text:p>030508</text:p>
          </table:table-cell>
          <table:table-cell office:value-type="string" table:style-name="ce1">
            <text:p>Celorico de Basto</text:p>
          </table:table-cell>
          <table:table-cell office:value-type="string" table:style-name="ce8">
            <text:p>Codeços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fm - UNIDOS FAZEMOS M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510" table:style-name="ce9">
            <text:p>030510</text:p>
          </table:table-cell>
          <table:table-cell office:value-type="string" table:style-name="ce1">
            <text:p>Celorico de Basto</text:p>
          </table:table-cell>
          <table:table-cell office:value-type="string" table:style-name="ce8">
            <text:p>Fervenç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IF - Grupo Independentes por Ferve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517" table:style-name="ce9">
            <text:p>030517</text:p>
          </table:table-cell>
          <table:table-cell office:value-type="string" table:style-name="ce1">
            <text:p>Celorico de Basto</text:p>
          </table:table-cell>
          <table:table-cell office:value-type="string" table:style-name="ce8">
            <text:p>Reg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bf - Lista Independente Batista Ferr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608" table:style-name="ce9">
            <text:p>030608</text:p>
          </table:table-cell>
          <table:table-cell office:value-type="string" table:style-name="ce1">
            <text:p>Esposende</text:p>
          </table:table-cell>
          <table:table-cell office:value-type="string" table:style-name="ce8">
            <text:p>Forj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F - Lista Independente de Forjã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615" table:style-name="ce9">
            <text:p>030615</text:p>
          </table:table-cell>
          <table:table-cell office:value-type="string" table:style-name="ce1">
            <text:p>Esposende</text:p>
          </table:table-cell>
          <table:table-cell office:value-type="string" table:style-name="ce8">
            <text:p>Vila Chã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V - Lista Independente de Vila Chã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700" table:style-name="ce9">
            <text:p>030700</text:p>
          </table:table-cell>
          <table:table-cell office:value-type="string" table:style-name="ce1">
            <text:p>Fafe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IPF - INDEPENDENTES POR FA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30700" table:style-name="ce9">
            <text:p>030700</text:p>
          </table:table-cell>
          <table:table-cell office:value-type="string" table:style-name="ce1">
            <text:p>Fafe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IPF - INDEPENDENTES POR FA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05" table:style-name="ce9">
            <text:p>030705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Armi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A - INDEPENDENTES POR ARMI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08" table:style-name="ce9">
            <text:p>030708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Estorã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E - INDEPENDENTES POR ESTORÕ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09" table:style-name="ce9">
            <text:p>030709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Faf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F - INDEPENDENTES POR FA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12" table:style-name="ce9">
            <text:p>030712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Fornel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F - LISTA INDEPENDENTE POR FORN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14" table:style-name="ce9">
            <text:p>030714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Gol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i - Golães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16" table:style-name="ce9">
            <text:p>030716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Med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L.I.M. - LISTA INDEPENDENTE POR MEDELO]</text:p>
          </table:table-cell>
          <table:table-cell office:value-type="string" table:style-name="ce8">
            <text:p>[IPM - Independentes por Medel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19" table:style-name="ce9">
            <text:p>030719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Pass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P - LISTA INDEPENDENTE DE PASSOS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30722" table:style-name="ce9">
            <text:p>030722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Quinch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Q - LISTA INDEPENDENTE POR QUINCHÃES]</text:p>
          </table:table-cell>
          <table:table-cell office:value-type="string" table:style-name="ce8">
            <text:p>[CIQ - Cidadãos Independente de Quinchã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23" table:style-name="ce9">
            <text:p>030723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Regad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F - INDEPENDENTES POR FAFE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30724" table:style-name="ce9">
            <text:p>030724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Revelh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F - INDEPENDENTES POR FA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25" table:style-name="ce9">
            <text:p>030725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Ribei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r - Lista Independente por Ribeiros]</text:p>
          </table:table-cell>
          <table:table-cell office:value-type="string" table:style-name="ce8">
            <text:p>[IPR - INDEPENDENTES POR RIBEIRO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26" table:style-name="ce9">
            <text:p>030726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Arões (Santa Cristina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F - INDEPENDENTES POR FAFE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30728" table:style-name="ce9">
            <text:p>030728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São Gen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usg - Lista Independente Unidos por S. Gen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29" table:style-name="ce9">
            <text:p>030729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Silvares (São Martinh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jps - LISTA INDEPENDENTE JUNTOS POR SILVARES]</text:p>
          </table:table-cell>
          <table:table-cell office:value-type="string" table:style-name="ce8">
            <text:p>[IPF - INDEPENDENTES POR FAFE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30" table:style-name="ce9">
            <text:p>030730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Arões (São Romã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F - INDEPENDENTES POR FAFE]</text:p>
          </table:table-cell>
          <table:table-cell office:value-type="string" table:style-name="ce1">
            <text:p>[JPA - JUNTOS POR ARÕ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33" table:style-name="ce9">
            <text:p>030733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Travassó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F - INDEPENDENTES POR FA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36" table:style-name="ce9">
            <text:p>030736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Vinhó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sv - UNIR SERVIR VINHÓ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37" table:style-name="ce9">
            <text:p>030737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União de freguesias de Aboim, Felgueiras, Gontim e Pedraí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fglp - ABOIM FELGUEIRAS GONTIM LAGOA PEDRAÍDO]</text:p>
          </table:table-cell>
          <table:table-cell office:value-type="string" table:style-name="ce1">
            <text:p>[apafg - Amigos Pedraído, Aboim, Felgueiras, Gontim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39" table:style-name="ce9">
            <text:p>030739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União de freguesias de Antime e Silvares (São Clemente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F - INDEPENDENTES POR FA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40" table:style-name="ce9">
            <text:p>030740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União de freguesias de Ardegão, Arnozela e Seid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asa - INDEPENDENTES POR ARNOZELA SEIDÕES ARDEG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41" table:style-name="ce9">
            <text:p>030741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União de freguesias de Cepães e Farej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ucf - Lista Independente União Cepães Farej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42" table:style-name="ce9">
            <text:p>030742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União de freguesias de Freitas e Vila Cov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F - INDEPENDENTES POR FA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43" table:style-name="ce9">
            <text:p>030743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União de freguesias de Monte e Queimad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umq - LISTA INDEPENDENTE UNIÃO MONTE QUEIMADE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744" table:style-name="ce9">
            <text:p>030744</text:p>
          </table:table-cell>
          <table:table-cell office:value-type="string" table:style-name="ce1">
            <text:p>Fafe</text:p>
          </table:table-cell>
          <table:table-cell office:value-type="string" table:style-name="ce8">
            <text:p>União de freguesias de Moreira do Rei e Várzea Cov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F - INDEPENDENTES POR FA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00" table:style-name="ce9">
            <text:p>030800</text:p>
          </table:table-cell>
          <table:table-cell office:value-type="string" table:style-name="ce1">
            <text:p>Guimarãe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MPT - JUNTOS POR GUIMARÃES]</text:p>
          </table:table-cell>
          <table:table-cell office:value-type="string" table:style-name="ce1">
            <text:p>[PPM-PPV - ESPÍRITO DE GUIMARÃES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00" table:style-name="ce9">
            <text:p>030800</text:p>
          </table:table-cell>
          <table:table-cell office:value-type="string" table:style-name="ce1">
            <text:p>Guimarãe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MPT - JUNTOS POR GUIMARÃES]</text:p>
          </table:table-cell>
          <table:table-cell office:value-type="string" table:style-name="ce1">
            <text:p>[PPM-PPV - ESPÍRITO DE GUIMARÃES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01" table:style-name="ce9">
            <text:p>030801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Ald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04" table:style-name="ce9">
            <text:p>030804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Azuré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06" table:style-name="ce9">
            <text:p>030806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Barc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07" table:style-name="ce9">
            <text:p>030807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Bri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08" table:style-name="ce9">
            <text:p>030808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Cald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12" table:style-name="ce9">
            <text:p>030812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Cos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office:value-type="string" table:style-name="ce1">
            <text:p>[PPM-PPV - ESPÍRITO DE GUIMARÃES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13" table:style-name="ce9">
            <text:p>030813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Creixomi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15" table:style-name="ce9">
            <text:p>030815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Ferment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20" table:style-name="ce9">
            <text:p>030820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Gon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21" table:style-name="ce9">
            <text:p>030821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Gond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23" table:style-name="ce9">
            <text:p>030823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Guardiz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24" table:style-name="ce9">
            <text:p>030824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Infant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office:value-type="string" table:style-name="ce8">
            <text:p>[mci - Movimento Cívico por Infant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27" table:style-name="ce9">
            <text:p>030827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Long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28" table:style-name="ce9">
            <text:p>030828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Lord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30" table:style-name="ce9">
            <text:p>030830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Mesão Fri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31" table:style-name="ce9">
            <text:p>030831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Moreira de Cóneg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32" table:style-name="ce9">
            <text:p>030832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Nesper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35" table:style-name="ce9">
            <text:p>030835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Penc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36" table:style-name="ce9">
            <text:p>030836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Pinh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37" table:style-name="ce9">
            <text:p>030837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Polvor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38" table:style-name="ce9">
            <text:p>030838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Po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40" table:style-name="ce9">
            <text:p>030840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Ronf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42" table:style-name="ce9">
            <text:p>030842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Prazins (Santa Eufémi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50" table:style-name="ce9">
            <text:p>030850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Selho (São Cristóv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54" table:style-name="ce9">
            <text:p>030854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Selho (São Jorge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57" table:style-name="ce9">
            <text:p>030857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Candoso (São Martinh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58" table:style-name="ce9">
            <text:p>030858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Sande (São Martinh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65" table:style-name="ce9">
            <text:p>030865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São Torca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66" table:style-name="ce9">
            <text:p>030866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Serzed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s - Movimento Cívico por Serzedel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68" table:style-name="ce9">
            <text:p>030868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Silva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71" table:style-name="ce9">
            <text:p>030871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rgez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75" table:style-name="ce9">
            <text:p>030875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Abação e Géme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office:value-type="string" table:style-name="ce1">
            <text:p>[PPM-PPV - ESPÍRITO DE GUIMARÃES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76" table:style-name="ce9">
            <text:p>030876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Airão Santa Maria, Airão São João e Vermi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77" table:style-name="ce9">
            <text:p>030877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Arosa e Castel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pac - Movimento Cívico por Arosa e Castelõ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78" table:style-name="ce9">
            <text:p>030878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Atães e Renduf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79" table:style-name="ce9">
            <text:p>030879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Briteiros Santo Estêvão e Don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80" table:style-name="ce9">
            <text:p>030880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Briteiros São Salvador e Briteiros Santa Leocád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81" table:style-name="ce9">
            <text:p>030881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Candoso São Tiago e Mascot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82" table:style-name="ce9">
            <text:p>030882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Conde e Gandar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83" table:style-name="ce9">
            <text:p>030883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Leitões, Oleiros e Figueir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84" table:style-name="ce9">
            <text:p>030884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Oliveira, São Paio e São Sebasti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85" table:style-name="ce9">
            <text:p>030885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Prazins Santo Tirso e Corvi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86" table:style-name="ce9">
            <text:p>030886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Sande São Lourenço e Balaz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87" table:style-name="ce9">
            <text:p>030887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Sande Vila Nova e Sande São Cleme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88" table:style-name="ce9">
            <text:p>030888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Selho São Lourenço e Gominh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89" table:style-name="ce9">
            <text:p>030889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Serzedo e Calv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90" table:style-name="ce9">
            <text:p>030890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Souto Santa Maria, Souto São Salvador e Gondom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891" table:style-name="ce9">
            <text:p>030891</text:p>
          </table:table-cell>
          <table:table-cell office:value-type="string" table:style-name="ce1">
            <text:p>Guimarães</text:p>
          </table:table-cell>
          <table:table-cell office:value-type="string" table:style-name="ce8">
            <text:p>União das freguesias de Tabuadelo e São Faustin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JUNTOS POR GUIMARÃES]</text:p>
          </table:table-cell>
          <table:table-cell table:style-name="ce1"/>
          <table:table-cell office:value-type="string" table:style-name="ce8">
            <text:p>[mais - Movimento Autónomo Independente e Solidári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906" table:style-name="ce9">
            <text:p>030906</text:p>
          </table:table-cell>
          <table:table-cell office:value-type="string" table:style-name="ce1">
            <text:p>Póvoa de Lanhoso</text:p>
          </table:table-cell>
          <table:table-cell office:value-type="string" table:style-name="ce8">
            <text:p>Covel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RIC - Renovação e Inovsação de Covela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908" table:style-name="ce9">
            <text:p>030908</text:p>
          </table:table-cell>
          <table:table-cell office:value-type="string" table:style-name="ce1">
            <text:p>Póvoa de Lanhoso</text:p>
          </table:table-cell>
          <table:table-cell office:value-type="string" table:style-name="ce8">
            <text:p>Ferrei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FE - Lista Independente de Ferr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913" table:style-name="ce9">
            <text:p>030913</text:p>
          </table:table-cell>
          <table:table-cell office:value-type="string" table:style-name="ce1">
            <text:p>Póvoa de Lanhoso</text:p>
          </table:table-cell>
          <table:table-cell office:value-type="string" table:style-name="ce8">
            <text:p>Garf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g - Lista Independente <text:s/>de Gar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914" table:style-name="ce9">
            <text:p>030914</text:p>
          </table:table-cell>
          <table:table-cell office:value-type="string" table:style-name="ce1">
            <text:p>Póvoa de Lanhoso</text:p>
          </table:table-cell>
          <table:table-cell office:value-type="string" table:style-name="ce8">
            <text:p>Geraz do Minh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UGM - Lista Independente Unidos por Geraz do Minh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0931" table:style-name="ce9">
            <text:p>030931</text:p>
          </table:table-cell>
          <table:table-cell office:value-type="string" table:style-name="ce1">
            <text:p>Póvoa de Lanhoso</text:p>
          </table:table-cell>
          <table:table-cell office:value-type="string" table:style-name="ce8">
            <text:p>União das freguesias de Calvos e Frad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CeF - Lista Independente de Calvos e Frad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00" table:style-name="ce9">
            <text:p>031000</text:p>
          </table:table-cell>
          <table:table-cell office:value-type="string" table:style-name="ce1">
            <text:p>Terras de Bour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office:value-type="string" table:style-name="ce8">
            <text:p>[TBR2021 - Terras de Bouro 2021 - Novo Caminh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00" table:style-name="ce9">
            <text:p>031000</text:p>
          </table:table-cell>
          <table:table-cell office:value-type="string" table:style-name="ce1">
            <text:p>Terras de Bour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office:value-type="string" table:style-name="ce8">
            <text:p>[TBR2021 - Terras de Bouro 2021 - Novo Caminh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01" table:style-name="ce9">
            <text:p>031001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Balan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office:value-type="string" table:style-name="ce8">
            <text:p>[ipb - Independentes Pela Bal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03" table:style-name="ce9">
            <text:p>031003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Campo do Gerê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04" table:style-name="ce9">
            <text:p>031004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Carvalh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office:value-type="string" table:style-name="ce8">
            <text:p>[jpc - Juntos por Carvalh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08" table:style-name="ce9">
            <text:p>031008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Covi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09" table:style-name="ce9">
            <text:p>031009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Gondori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office:value-type="string" table:style-name="ce8">
            <text:p>[oig - Os Independentes por Gondori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10" table:style-name="ce9">
            <text:p>031010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Moimen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M - Moradores Independentes de Moiment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12" table:style-name="ce9">
            <text:p>031012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Rib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13" table:style-name="ce9">
            <text:p>031013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Rio Cal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uprc - Unidos por Rio Caldo]</text:p>
          </table:table-cell>
          <table:table-cell office:value-type="string" table:style-name="ce8">
            <text:p>[PDRC - Pelo Desenvolvimento de Rio Cald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14" table:style-name="ce9">
            <text:p>031014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Sou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/>
          <table:table-cell office:value-type="float" office:value="31015" table:style-name="ce9">
            <text:p>031015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Valdose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17" table:style-name="ce9">
            <text:p>031017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Vilar da Veig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office:value-type="string" table:style-name="ce8">
            <text:p>[UNPVV - Unidos por Vilar da Veig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18" table:style-name="ce9">
            <text:p>031018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União das freguesias de Chamoim e Vil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office:value-type="string" table:style-name="ce8">
            <text:p>[jpnf - Juntos Pelas Nossas Freguesi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19" table:style-name="ce9">
            <text:p>031019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União das freguesias de Chorense e Mo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20" table:style-name="ce9">
            <text:p>031020</text:p>
          </table:table-cell>
          <table:table-cell office:value-type="string" table:style-name="ce1">
            <text:p>Terras de Bouro</text:p>
          </table:table-cell>
          <table:table-cell office:value-type="string" table:style-name="ce8">
            <text:p>União das freguesias de Cibões e Bruf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TERRAS DO BOURO]</text:p>
          </table:table-cell>
          <table:table-cell table:style-name="ce1"/>
          <table:table-cell office:value-type="string" table:style-name="ce8">
            <text:p>[jupcb - Juntos e Unidos por Cibões e Bru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00" table:style-name="ce9">
            <text:p>031100</text:p>
          </table:table-cell>
          <table:table-cell office:value-type="string" table:style-name="ce1">
            <text:p>Vieira do Minh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00" table:style-name="ce9">
            <text:p>031100</text:p>
          </table:table-cell>
          <table:table-cell office:value-type="string" table:style-name="ce1">
            <text:p>Vieira do Minh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05" table:style-name="ce9">
            <text:p>031105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Cantel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office:value-type="string" table:style-name="ce8">
            <text:p>[CIC - CIDADÃOS INDEPENDENTES POR CANTELÃES]</text:p>
          </table:table-cell>
          <table:table-cell office:value-type="string" table:style-name="ce1">
            <text:p>[IUC - INDEPENDENTES UNIDOS POR CATELÃ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07" table:style-name="ce9">
            <text:p>031107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Eira Ved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08" table:style-name="ce9">
            <text:p>031108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Guilhofrei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09" table:style-name="ce9">
            <text:p>031109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Lour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office:value-type="string" table:style-name="ce8">
            <text:p>[RL - RENOVAR LOURE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10" table:style-name="ce9">
            <text:p>031110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Most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11" table:style-name="ce9">
            <text:p>031111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Parada do Bou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UP - INDEPENDENTES UNIDOS POR PARA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12" table:style-name="ce9">
            <text:p>031112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Pinh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13" table:style-name="ce9">
            <text:p>031113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Ross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15" table:style-name="ce9">
            <text:p>031115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Salamo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18" table:style-name="ce9">
            <text:p>031118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Tabuaç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office:value-type="string" table:style-name="ce8">
            <text:p>[LIPT - LISTA INDEPENDENTE POR TABUAÇ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20" table:style-name="ce9">
            <text:p>031120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Vieira do M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22" table:style-name="ce9">
            <text:p>031122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União das freguesias de Anissó e Sout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23" table:style-name="ce9">
            <text:p>031123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União das freguesias de Anjos e Vilar do Ch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24" table:style-name="ce9">
            <text:p>031124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União das freguesias de Caniçada e Soeng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25" table:style-name="ce9">
            <text:p>031125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União das freguesias de Ruivães e Camp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26" table:style-name="ce9">
            <text:p>031126</text:p>
          </table:table-cell>
          <table:table-cell office:value-type="string" table:style-name="ce1">
            <text:p>Vieira do Minho</text:p>
          </table:table-cell>
          <table:table-cell office:value-type="string" table:style-name="ce8">
            <text:p>União das freguesias de Ventosa e Co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VI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00" table:style-name="ce9">
            <text:p>031200</text:p>
          </table:table-cell>
          <table:table-cell office:value-type="string" table:style-name="ce1">
            <text:p>Vila Nova de Famalicã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00" table:style-name="ce9">
            <text:p>031200</text:p>
          </table:table-cell>
          <table:table-cell office:value-type="string" table:style-name="ce1">
            <text:p>Vila Nova de Famalicã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04" table:style-name="ce9">
            <text:p>031204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Bair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06" table:style-name="ce9">
            <text:p>031206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Bruf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10" table:style-name="ce9">
            <text:p>031210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Castel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12" table:style-name="ce9">
            <text:p>031212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Cru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13" table:style-name="ce9">
            <text:p>031213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Del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PD - Movimento Independente por Delã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15" table:style-name="ce9">
            <text:p>031215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Frad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16" table:style-name="ce9">
            <text:p>031216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Gavi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19" table:style-name="ce9">
            <text:p>031219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Joan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21" table:style-name="ce9">
            <text:p>031221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Land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23" table:style-name="ce9">
            <text:p>031223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Lou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24" table:style-name="ce9">
            <text:p>031224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Lousa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25" table:style-name="ce9">
            <text:p>031225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Mogeg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RC - Mogege no Rumo Cer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27" table:style-name="ce9">
            <text:p>031227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Nin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30" table:style-name="ce9">
            <text:p>031230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Pedom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32" table:style-name="ce9">
            <text:p>031232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Pousada de Saramag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33" table:style-name="ce9">
            <text:p>031233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Requi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34" table:style-name="ce9">
            <text:p>031234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Riba de Av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35" table:style-name="ce9">
            <text:p>031235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Ribeir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39" table:style-name="ce9">
            <text:p>031239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Oliveira (Santa Mari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41" table:style-name="ce9">
            <text:p>031241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Vale (São Martinh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42" table:style-name="ce9">
            <text:p>031242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Oliveira (São Mateus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PSM - Cidadãos Por São Mateu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47" table:style-name="ce9">
            <text:p>031247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Vermo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49" table:style-name="ce9">
            <text:p>031249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Vilarinho das Camb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50" table:style-name="ce9">
            <text:p>031250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União das freguesias de Antas e Abade de Vermo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office:value-type="string" table:style-name="ce8">
            <text:p>[IUPAA - Independentes Unidos por Antas e Abad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51" table:style-name="ce9">
            <text:p>031251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União das freguesias de Arnoso (Santa Maria e Santa Eulália) e Sezu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52" table:style-name="ce9">
            <text:p>031252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União das freguesias de Avidos e Lago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53" table:style-name="ce9">
            <text:p>031253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União das freguesias de Carreira e Be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54" table:style-name="ce9">
            <text:p>031254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União das freguesias de Esmeriz e Cabeçud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office:value-type="string" table:style-name="ce8">
            <text:p>[UNIR - União Independente Renovado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55" table:style-name="ce9">
            <text:p>031255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União das freguesias de Gondifelos, Cavalões e Outi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56" table:style-name="ce9">
            <text:p>031256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União das freguesias de Lemenhe, Mouquim e Jesufrei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57" table:style-name="ce9">
            <text:p>031257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União das freguesias de Ruivães e Nov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58" table:style-name="ce9">
            <text:p>031258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União das freguesias de Sei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59" table:style-name="ce9">
            <text:p>031259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União das freguesias de Vale (São Cosme), Telhado e Port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260" table:style-name="ce9">
            <text:p>031260</text:p>
          </table:table-cell>
          <table:table-cell office:value-type="string" table:style-name="ce1">
            <text:p>Vila Nova de Famalicão</text:p>
          </table:table-cell>
          <table:table-cell office:value-type="string" table:style-name="ce8">
            <text:p>União das freguesias de Vila Nova de Famalicão e Calendári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AÇÃO, MAIS FAMALIC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08" table:style-name="ce9">
            <text:p>031308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Cabanel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C - Independentes de Cabanel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13" table:style-name="ce9">
            <text:p>031313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Dossã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d - Unidos Por Dossã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24" table:style-name="ce9">
            <text:p>031324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Lanh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IL - Grupo de Independentes de Lan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25" table:style-name="ce9">
            <text:p>031325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Lour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L - Movimento Independente Pela Lour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28" table:style-name="ce9">
            <text:p>031328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Mour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M - Movimento Independente de Mou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37" table:style-name="ce9">
            <text:p>031337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Pont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.P.P - Unidos Por Po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52" table:style-name="ce9">
            <text:p>031352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Sout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.P.S. - Juntos Por Soutel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54" table:style-name="ce9">
            <text:p>031354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Turiz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T - Movimento Independente por Turi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60" table:style-name="ce9">
            <text:p>031360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União das freguesias da Ribeira do Neiv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R - Pela Ribeira]</text:p>
          </table:table-cell>
          <table:table-cell office:value-type="string" table:style-name="ce1">
            <text:p>[U.F.R.N. - União das Freguesias da Ribeira do Neiv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62" table:style-name="ce9">
            <text:p>031362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União das freguesias de Escariz (São Mamede) e Escariz (São Martinh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TE - Somos Todos Escari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63" table:style-name="ce9">
            <text:p>031363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União das freguesias de Esqueiros, Nevogilde e Travassó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.E.N.T. - Independentes Esqueiros, Nevogilde e Travassós]</text:p>
          </table:table-cell>
          <table:table-cell office:value-type="string" table:style-name="ce1">
            <text:p>[U.M. - União em Moviment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67" table:style-name="ce9">
            <text:p>031367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União das freguesias de Sande, Vilarinho, Barros e Gomi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U - Os Independentes Uni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68" table:style-name="ce9">
            <text:p>031368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União das freguesias de Valbom (São Pedro), Passô e Valbom (São Martinh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VPV - Unidos por Valbom S.P.,Passô e Valbom S.M.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369" table:style-name="ce9">
            <text:p>031369</text:p>
          </table:table-cell>
          <table:table-cell office:value-type="string" table:style-name="ce1">
            <text:p>Vila Verde</text:p>
          </table:table-cell>
          <table:table-cell office:value-type="string" table:style-name="ce8">
            <text:p>União das freguesias do Va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V - Unidos Por Vad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400" table:style-name="ce9">
            <text:p>031400</text:p>
          </table:table-cell>
          <table:table-cell office:value-type="string" table:style-name="ce1">
            <text:p>Vizel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VIZELA É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400" table:style-name="ce9">
            <text:p>031400</text:p>
          </table:table-cell>
          <table:table-cell office:value-type="string" table:style-name="ce1">
            <text:p>Vizel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VIZELA É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401" table:style-name="ce9">
            <text:p>031401</text:p>
          </table:table-cell>
          <table:table-cell office:value-type="string" table:style-name="ce1">
            <text:p>Vizela</text:p>
          </table:table-cell>
          <table:table-cell office:value-type="string" table:style-name="ce8">
            <text:p>Santa Eulál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VIZELA É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404" table:style-name="ce9">
            <text:p>031404</text:p>
          </table:table-cell>
          <table:table-cell office:value-type="string" table:style-name="ce1">
            <text:p>Vizela</text:p>
          </table:table-cell>
          <table:table-cell office:value-type="string" table:style-name="ce8">
            <text:p>Infi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VIZELA É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406" table:style-name="ce9">
            <text:p>031406</text:p>
          </table:table-cell>
          <table:table-cell office:value-type="string" table:style-name="ce1">
            <text:p>Vizela</text:p>
          </table:table-cell>
          <table:table-cell office:value-type="string" table:style-name="ce8">
            <text:p>Vizela (Santo Adri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VIZELA É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408" table:style-name="ce9">
            <text:p>031408</text:p>
          </table:table-cell>
          <table:table-cell office:value-type="string" table:style-name="ce1">
            <text:p>Vizela</text:p>
          </table:table-cell>
          <table:table-cell office:value-type="string" table:style-name="ce8">
            <text:p>União das freguesias de Caldas de Vizela (São Miguel e São Jo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VIZELA É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409" table:style-name="ce9">
            <text:p>031409</text:p>
          </table:table-cell>
          <table:table-cell office:value-type="string" table:style-name="ce1">
            <text:p>Vizela</text:p>
          </table:table-cell>
          <table:table-cell office:value-type="string" table:style-name="ce8">
            <text:p>União das freguesias de Tagilde e Vizela (São Pai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VIZELA É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00" table:style-name="ce9">
            <text:p>040100</text:p>
          </table:table-cell>
          <table:table-cell office:value-type="string" table:style-name="ce1">
            <text:p>Alfândega da Fé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00" table:style-name="ce9">
            <text:p>040100</text:p>
          </table:table-cell>
          <table:table-cell office:value-type="string" table:style-name="ce1">
            <text:p>Alfândega da Fé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02" table:style-name="ce9">
            <text:p>040102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Alfândega da Fé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03" table:style-name="ce9">
            <text:p>040103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Cerej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11" table:style-name="ce9">
            <text:p>040111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Samba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18" table:style-name="ce9">
            <text:p>040118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Vilar Ch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19" table:style-name="ce9">
            <text:p>040119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Vilarelh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20" table:style-name="ce9">
            <text:p>040120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Vilares de Vilariç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.V.V. - PELOS VILARES DA VILARI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21" table:style-name="ce9">
            <text:p>040121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União das freguesias de Agrobom, Saldonha e Vale Per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22" table:style-name="ce9">
            <text:p>040122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União das freguesias de Eucisia, Gouveia e Valver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EGV - SEMPRE COM O POV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23" table:style-name="ce9">
            <text:p>040123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União das freguesias de Ferradosa e Sendim da Se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24" table:style-name="ce9">
            <text:p>040124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União das freguesias de Gebelim e Soeim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25" table:style-name="ce9">
            <text:p>040125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União das freguesias de Parada e Sendim da Rib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126" table:style-name="ce9">
            <text:p>040126</text:p>
          </table:table-cell>
          <table:table-cell office:value-type="string" table:style-name="ce1">
            <text:p>Alfândega da Fé</text:p>
          </table:table-cell>
          <table:table-cell office:value-type="string" table:style-name="ce8">
            <text:p>União das freguesias de Pombal e Val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LFÂNDEGA POR PAIX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00" table:style-name="ce9">
            <text:p>040200</text:p>
          </table:table-cell>
          <table:table-cell office:value-type="string" table:style-name="ce1">
            <text:p>Braganç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00" table:style-name="ce9">
            <text:p>040200</text:p>
          </table:table-cell>
          <table:table-cell office:value-type="string" table:style-name="ce1">
            <text:p>Braganç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01" table:style-name="ce9">
            <text:p>040201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Alfai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04" table:style-name="ce9">
            <text:p>040204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Baç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06" table:style-name="ce9">
            <text:p>040206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Carragos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13" table:style-name="ce9">
            <text:p>040213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Espinhos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18" table:style-name="ce9">
            <text:p>040218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Gostei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I - Movimento de Cidadãos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19" table:style-name="ce9">
            <text:p>040219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Grijó de Para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21" table:style-name="ce9">
            <text:p>040221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Macedo do Ma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25" table:style-name="ce9">
            <text:p>040225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Nogu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30" table:style-name="ce9">
            <text:p>040230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Pin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36" table:style-name="ce9">
            <text:p>040236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Rebordã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39" table:style-name="ce9">
            <text:p>040239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Sals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40" table:style-name="ce9">
            <text:p>040240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Sami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41" table:style-name="ce9">
            <text:p>040241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Santa Comba de Ross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44" table:style-name="ce9">
            <text:p>040244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São Pedro de Sarracen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47" table:style-name="ce9">
            <text:p>040247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Serapic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48" table:style-name="ce9">
            <text:p>040248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Sort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52" table:style-name="ce9">
            <text:p>040252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União das freguesias de Izeda, Calvelhe e Paradinha Nov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53" table:style-name="ce9">
            <text:p>040253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União das freguesias de Parada e Faíl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55" table:style-name="ce9">
            <text:p>040255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União das freguesias de Rio Frio e Milh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56" table:style-name="ce9">
            <text:p>040256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União das freguesias de São Julião de Palácios e Deil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P - Movimento Sempre Pres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257" table:style-name="ce9">
            <text:p>040257</text:p>
          </table:table-cell>
          <table:table-cell office:value-type="string" table:style-name="ce1">
            <text:p>Bragança</text:p>
          </table:table-cell>
          <table:table-cell office:value-type="string" table:style-name="ce8">
            <text:p>União das freguesias de Sé, Santa Maria e Meixe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vbub - Vitor Barata - Unir Bragança]</text:p>
          </table:table-cell>
          <table:table-cell office:value-type="string" table:style-name="ce8">
            <text:p>[MSP - Movimento Sempre Presente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306" table:style-name="ce9">
            <text:p>040306</text:p>
          </table:table-cell>
          <table:table-cell office:value-type="string" table:style-name="ce1">
            <text:p>Carrazeda de Ansiães</text:p>
          </table:table-cell>
          <table:table-cell office:value-type="string" table:style-name="ce8">
            <text:p>Fonte Long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TPFTG - Todos por Fontelonga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40313" table:style-name="ce9">
            <text:p>040313</text:p>
          </table:table-cell>
          <table:table-cell office:value-type="string" table:style-name="ce1">
            <text:p>Carrazeda de Ansiães</text:p>
          </table:table-cell>
          <table:table-cell office:value-type="string" table:style-name="ce8">
            <text:p>Pinhal do Nort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PT - Pinhal Para To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406" table:style-name="ce9">
            <text:p>040406</text:p>
          </table:table-cell>
          <table:table-cell office:value-type="string" table:style-name="ce1">
            <text:p>Freixo de Espada a Cinta</text:p>
          </table:table-cell>
          <table:table-cell office:value-type="string" table:style-name="ce8">
            <text:p>Poiar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 - Unidos Por Poia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539" table:style-name="ce9">
            <text:p>040539</text:p>
          </table:table-cell>
          <table:table-cell office:value-type="string" table:style-name="ce1">
            <text:p>Macedo de Cavaleiros</text:p>
          </table:table-cell>
          <table:table-cell office:value-type="string" table:style-name="ce8">
            <text:p>União das freguesias de Ala e Vilarinho do Mont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NT - 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540" table:style-name="ce9">
            <text:p>040540</text:p>
          </table:table-cell>
          <table:table-cell office:value-type="string" table:style-name="ce1">
            <text:p>Macedo de Cavaleiros</text:p>
          </table:table-cell>
          <table:table-cell office:value-type="string" table:style-name="ce8">
            <text:p>União das freguesias de Bornes e Burg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IBB - Cidadãos Independentes de Bornes e Burg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600" table:style-name="ce9">
            <text:p>040600</text:p>
          </table:table-cell>
          <table:table-cell office:value-type="string" table:style-name="ce1">
            <text:p>Miranda do Dour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MPT.PPM - Trabalhar Miran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600" table:style-name="ce9">
            <text:p>040600</text:p>
          </table:table-cell>
          <table:table-cell office:value-type="string" table:style-name="ce1">
            <text:p>Miranda do Dour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MPT.PPM - Trabalhar Mirand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611" table:style-name="ce9">
            <text:p>040611</text:p>
          </table:table-cell>
          <table:table-cell office:value-type="string" table:style-name="ce1">
            <text:p>Miranda do Douro</text:p>
          </table:table-cell>
          <table:table-cell office:value-type="string" table:style-name="ce8">
            <text:p>Picot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TPF - Movimento Independente Todos pela Freguesia de Pico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00" table:style-name="ce9">
            <text:p>040900</text:p>
          </table:table-cell>
          <table:table-cell office:value-type="string" table:style-name="ce1">
            <text:p>Torre de Moncorv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00" table:style-name="ce9">
            <text:p>040900</text:p>
          </table:table-cell>
          <table:table-cell office:value-type="string" table:style-name="ce1">
            <text:p>Torre de Moncorv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01" table:style-name="ce9">
            <text:p>040901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Açor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03" table:style-name="ce9">
            <text:p>040903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Cabeça Bo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05" table:style-name="ce9">
            <text:p>040905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Carviç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06" table:style-name="ce9">
            <text:p>040906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Cast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09" table:style-name="ce9">
            <text:p>040909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Horta da Vilari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office:value-type="string" table:style-name="ce8">
            <text:p>[HU - Horta Uni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10" table:style-name="ce9">
            <text:p>040910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Lar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11" table:style-name="ce9">
            <text:p>040911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Lou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13" table:style-name="ce9">
            <text:p>040913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Mó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16" table:style-name="ce9">
            <text:p>040916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Torre de Moncorv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18" table:style-name="ce9">
            <text:p>040918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União das freguesias de Adeganha e Cardan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19" table:style-name="ce9">
            <text:p>040919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União das freguesias de Felgar e Souto da Vel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20" table:style-name="ce9">
            <text:p>040920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União das freguesias de Felgueiras e Maço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0921" table:style-name="ce9">
            <text:p>040921</text:p>
          </table:table-cell>
          <table:table-cell office:value-type="string" table:style-name="ce1">
            <text:p>Torre de Moncorvo</text:p>
          </table:table-cell>
          <table:table-cell office:value-type="string" table:style-name="ce8">
            <text:p>União das freguesias de Urros e Peredo dos Castelhan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NCORVO -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00" table:style-name="ce9">
            <text:p>041000</text:p>
          </table:table-cell>
          <table:table-cell office:value-type="string" table:style-name="ce1">
            <text:p>Vila Flor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00" table:style-name="ce9">
            <text:p>041000</text:p>
          </table:table-cell>
          <table:table-cell office:value-type="string" table:style-name="ce1">
            <text:p>Vila Flor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02" table:style-name="ce9">
            <text:p>041002</text:p>
          </table:table-cell>
          <table:table-cell office:value-type="string" table:style-name="ce1">
            <text:p>Vila Flor</text:p>
          </table:table-cell>
          <table:table-cell office:value-type="string" table:style-name="ce8">
            <text:p>Benlhevai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B - Pelo Povo de Benlhevai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05" table:style-name="ce9">
            <text:p>041005</text:p>
          </table:table-cell>
          <table:table-cell office:value-type="string" table:style-name="ce1">
            <text:p>Vila Flor</text:p>
          </table:table-cell>
          <table:table-cell office:value-type="string" table:style-name="ce8">
            <text:p>Freixie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09" table:style-name="ce9">
            <text:p>041009</text:p>
          </table:table-cell>
          <table:table-cell office:value-type="string" table:style-name="ce1">
            <text:p>Vila Flor</text:p>
          </table:table-cell>
          <table:table-cell office:value-type="string" table:style-name="ce8">
            <text:p>Roi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11" table:style-name="ce9">
            <text:p>041011</text:p>
          </table:table-cell>
          <table:table-cell office:value-type="string" table:style-name="ce1">
            <text:p>Vila Flor</text:p>
          </table:table-cell>
          <table:table-cell office:value-type="string" table:style-name="ce8">
            <text:p>Sampai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13" table:style-name="ce9">
            <text:p>041013</text:p>
          </table:table-cell>
          <table:table-cell office:value-type="string" table:style-name="ce1">
            <text:p>Vila Flor</text:p>
          </table:table-cell>
          <table:table-cell office:value-type="string" table:style-name="ce8">
            <text:p>Seixo de Manhos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14" table:style-name="ce9">
            <text:p>041014</text:p>
          </table:table-cell>
          <table:table-cell office:value-type="string" table:style-name="ce1">
            <text:p>Vila Flor</text:p>
          </table:table-cell>
          <table:table-cell office:value-type="string" table:style-name="ce8">
            <text:p>Trinda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15" table:style-name="ce9">
            <text:p>041015</text:p>
          </table:table-cell>
          <table:table-cell office:value-type="string" table:style-name="ce1">
            <text:p>Vila Flor</text:p>
          </table:table-cell>
          <table:table-cell office:value-type="string" table:style-name="ce8">
            <text:p>Vale Frechos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20" table:style-name="ce9">
            <text:p>041020</text:p>
          </table:table-cell>
          <table:table-cell office:value-type="string" table:style-name="ce1">
            <text:p>Vila Flor</text:p>
          </table:table-cell>
          <table:table-cell office:value-type="string" table:style-name="ce8">
            <text:p>União das freguesias de Assares e Lod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22" table:style-name="ce9">
            <text:p>041022</text:p>
          </table:table-cell>
          <table:table-cell office:value-type="string" table:style-name="ce1">
            <text:p>Vila Flor</text:p>
          </table:table-cell>
          <table:table-cell office:value-type="string" table:style-name="ce8">
            <text:p>União das freguesias de Valtorno e Mour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23" table:style-name="ce9">
            <text:p>041023</text:p>
          </table:table-cell>
          <table:table-cell office:value-type="string" table:style-name="ce1">
            <text:p>Vila Flor</text:p>
          </table:table-cell>
          <table:table-cell office:value-type="string" table:style-name="ce8">
            <text:p>União das freguesias de Vila Flor e Nab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024" table:style-name="ce9">
            <text:p>041024</text:p>
          </table:table-cell>
          <table:table-cell office:value-type="string" table:style-name="ce1">
            <text:p>Vila Flor</text:p>
          </table:table-cell>
          <table:table-cell office:value-type="string" table:style-name="ce8">
            <text:p>União das freguesias de Vilas Boas e Vilarinho das Azenh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PARA GANHAR VILA FL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00" table:style-name="ce9">
            <text:p>041200</text:p>
          </table:table-cell>
          <table:table-cell office:value-type="string" table:style-name="ce1">
            <text:p>Vinhai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00" table:style-name="ce9">
            <text:p>041200</text:p>
          </table:table-cell>
          <table:table-cell office:value-type="string" table:style-name="ce1">
            <text:p>Vinhai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01" table:style-name="ce9">
            <text:p>041201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Agroch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03" table:style-name="ce9">
            <text:p>041203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Cande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C - MOVIMENTO INDEPENDENTE DE CIDADÃO PELA FREGUESIA DE CANDE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04" table:style-name="ce9">
            <text:p>041204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C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06" table:style-name="ce9">
            <text:p>041206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Edr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15" table:style-name="ce9">
            <text:p>041215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Paçó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16" table:style-name="ce9">
            <text:p>041216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Penhas Junt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21" table:style-name="ce9">
            <text:p>041221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Santal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26" table:style-name="ce9">
            <text:p>041226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Tuiz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FT - SERVIR A FREGUESIA DE TUIZEL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27" table:style-name="ce9">
            <text:p>041227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Vale das Font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29" table:style-name="ce9">
            <text:p>041229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Vila Boa de Ousilh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30" table:style-name="ce9">
            <text:p>041230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Vila Ver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NCMC - UM NOVO CICLO - MUDANÇA COMPET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33" table:style-name="ce9">
            <text:p>041233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Vilar de Peregrin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35" table:style-name="ce9">
            <text:p>041235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Vinh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36" table:style-name="ce9">
            <text:p>041236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União das freguesias de Curopos e Vale de Jan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37" table:style-name="ce9">
            <text:p>041237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União das freguesias de Moimenta e Montou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39" table:style-name="ce9">
            <text:p>041239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União das freguesias de Quirás e Pinheiro Nov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40" table:style-name="ce9">
            <text:p>041240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União das freguesias de Sobreiro de Baixo e Alvared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VINHAIS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1243" table:style-name="ce9">
            <text:p>041243</text:p>
          </table:table-cell>
          <table:table-cell office:value-type="string" table:style-name="ce1">
            <text:p>Vinhais</text:p>
          </table:table-cell>
          <table:table-cell office:value-type="string" table:style-name="ce8">
            <text:p>União das freguesias de Vilar de Lomba e São Jomi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RF - RUMO AO FUT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100" table:style-name="ce9">
            <text:p>050100</text:p>
          </table:table-cell>
          <table:table-cell office:value-type="string" table:style-name="ce1">
            <text:p>Belmonte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PPCB - PESSOAS PELO CONCELHO DE BELMO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100" table:style-name="ce9">
            <text:p>050100</text:p>
          </table:table-cell>
          <table:table-cell office:value-type="string" table:style-name="ce1">
            <text:p>Belmonte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PPCB - PESSOAS PELO CONCELHO DE BELMO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102" table:style-name="ce9">
            <text:p>050102</text:p>
          </table:table-cell>
          <table:table-cell office:value-type="string" table:style-name="ce1">
            <text:p>Belmonte</text:p>
          </table:table-cell>
          <table:table-cell office:value-type="string" table:style-name="ce8">
            <text:p>Car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PCB - PESSOAS PELO CONCELHO DE BELMO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104" table:style-name="ce9">
            <text:p>050104</text:p>
          </table:table-cell>
          <table:table-cell office:value-type="string" table:style-name="ce1">
            <text:p>Belmonte</text:p>
          </table:table-cell>
          <table:table-cell office:value-type="string" table:style-name="ce8">
            <text:p>Ingui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PCB - PESSOAS PELO CONCELHO DE BELMO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105" table:style-name="ce9">
            <text:p>050105</text:p>
          </table:table-cell>
          <table:table-cell office:value-type="string" table:style-name="ce1">
            <text:p>Belmonte</text:p>
          </table:table-cell>
          <table:table-cell office:value-type="string" table:style-name="ce8">
            <text:p>Maçainh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PCB - PESSOAS PELO CONCELHO DE BELMO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106" table:style-name="ce9">
            <text:p>050106</text:p>
          </table:table-cell>
          <table:table-cell office:value-type="string" table:style-name="ce1">
            <text:p>Belmonte</text:p>
          </table:table-cell>
          <table:table-cell office:value-type="string" table:style-name="ce8">
            <text:p>União das freguesias de Belmonte e Colmeal da Torr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PCB - PESSOAS PELO CONCELHO DE BELMO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226" table:style-name="ce9">
            <text:p>050226</text:p>
          </table:table-cell>
          <table:table-cell office:value-type="string" table:style-name="ce1">
            <text:p>Castelo Branco</text:p>
          </table:table-cell>
          <table:table-cell office:value-type="string" table:style-name="ce8">
            <text:p>União das freguesias de Cebolais de Cima e Retax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CRRU - Cebolais de Cima, Retaxo e Represa Uni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228" table:style-name="ce9">
            <text:p>050228</text:p>
          </table:table-cell>
          <table:table-cell office:value-type="string" table:style-name="ce1">
            <text:p>Castelo Branco</text:p>
          </table:table-cell>
          <table:table-cell office:value-type="string" table:style-name="ce8">
            <text:p>União das freguesias de Escalos de Cima e Lous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SMF - Juntos Somos Mais Fortes]</text:p>
          </table:table-cell>
          <table:table-cell office:value-type="string" table:style-name="ce1">
            <text:p>[POR SI - SOLUÇÃO INDEPENDENTE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00" table:style-name="ce9">
            <text:p>050300</text:p>
          </table:table-cell>
          <table:table-cell office:value-type="string" table:style-name="ce1">
            <text:p>Covilhã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pfac - Pedro Farromba - Acreditar Covilhã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00" table:style-name="ce9">
            <text:p>050300</text:p>
          </table:table-cell>
          <table:table-cell office:value-type="string" table:style-name="ce1">
            <text:p>Covilhã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pfac - Pedro Farromba - Acreditar Covilhã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05" table:style-name="ce9">
            <text:p>050305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Boidob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 - Acreditar]</text:p>
          </table:table-cell>
          <table:table-cell office:value-type="string" table:style-name="ce1">
            <text:p>[bpt - Boidobra Para Todo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08" table:style-name="ce9">
            <text:p>050308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Cortes do Mei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fem - Freguesia Em Movime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09" table:style-name="ce9">
            <text:p>050309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Dominguiz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d - Acreditar - Dominguis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11" table:style-name="ce9">
            <text:p>050311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Fer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maf - Augusto Macedo - Acreditar Ferro]</text:p>
          </table:table-cell>
          <table:table-cell office:value-type="string" table:style-name="ce1">
            <text:p>[mf - Mais Ferr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12" table:style-name="ce9">
            <text:p>050312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Orjai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oqm - Porque Orjais Quer M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14" table:style-name="ce9">
            <text:p>050314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Pau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p - Primeiro o Paú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15" table:style-name="ce9">
            <text:p>050315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Perabo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bap - José Braz - Acreditar Perabo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18" table:style-name="ce9">
            <text:p>050318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São Jorge da B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mpf - Mais e Melhor Pela Fregues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22" table:style-name="ce9">
            <text:p>050322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Sobral de São Migue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s - Acreditar - Sobr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24" table:style-name="ce9">
            <text:p>050324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Tortosen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ts - Acreditar Tortosendo Semp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25" table:style-name="ce9">
            <text:p>050325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Unhais da Ser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u - Acreditar - Unh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32" table:style-name="ce9">
            <text:p>050332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União das freguesias de Barco e Couta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á - Juntos Acreditam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33" table:style-name="ce9">
            <text:p>050333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União das freguesias de Cantar-Galo e Vila do Carvalh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p - Unidos Pelas Pesso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34" table:style-name="ce9">
            <text:p>050334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União das freguesias de Casegas e Ouron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ppof - Casegas Pontes Para O Fut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35" table:style-name="ce9">
            <text:p>050335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União das freguesias de Covilhã e Canhos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tacc - Paulo Tourais - Acreditar Covilhá/Canhoso]</text:p>
          </table:table-cell>
          <table:table-cell office:value-type="string" table:style-name="ce1">
            <text:p>[upc - Unidos pela Covilhã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36" table:style-name="ce9">
            <text:p>050336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União das freguesias de Peso e Vales do Ri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upfpvr - Unidos Pelas Freguesias de Peso e Vales do Rio]</text:p>
          </table:table-cell>
          <table:table-cell office:value-type="string" table:style-name="ce8">
            <text:p>[spvr - Servir Peso e Vales do Ri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337" table:style-name="ce9">
            <text:p>050337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União das freguesias de Teixoso e Sarze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tem - Teixoso Em Mudança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50338" table:style-name="ce9">
            <text:p>050338</text:p>
          </table:table-cell>
          <table:table-cell office:value-type="string" table:style-name="ce1">
            <text:p>Covilhã</text:p>
          </table:table-cell>
          <table:table-cell office:value-type="string" table:style-name="ce8">
            <text:p>União das freguesias de Vale Formoso e Aldeia do Sou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nbu - Acreditar Numa Boa Uni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401" table:style-name="ce9">
            <text:p>050401</text:p>
          </table:table-cell>
          <table:table-cell office:value-type="string" table:style-name="ce1">
            <text:p>Fundão</text:p>
          </table:table-cell>
          <table:table-cell office:value-type="string" table:style-name="ce8">
            <text:p>Alcai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a - Movimento Independente pelo Alcaide]</text:p>
          </table:table-cell>
          <table:table-cell office:value-type="string" table:style-name="ce1">
            <text:p>[pam - Por um Alcaide Melhor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402" table:style-name="ce9">
            <text:p>050402</text:p>
          </table:table-cell>
          <table:table-cell office:value-type="string" table:style-name="ce1">
            <text:p>Fundão</text:p>
          </table:table-cell>
          <table:table-cell office:value-type="string" table:style-name="ce8">
            <text:p>Alcar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A - Unidos por Alcar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413" table:style-name="ce9">
            <text:p>050413</text:p>
          </table:table-cell>
          <table:table-cell office:value-type="string" table:style-name="ce1">
            <text:p>Fundão</text:p>
          </table:table-cell>
          <table:table-cell office:value-type="string" table:style-name="ce8">
            <text:p>Castelo Nov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CN - Unidos Por Castelo Nov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416" table:style-name="ce9">
            <text:p>050416</text:p>
          </table:table-cell>
          <table:table-cell office:value-type="string" table:style-name="ce1">
            <text:p>Fundão</text:p>
          </table:table-cell>
          <table:table-cell office:value-type="string" table:style-name="ce8">
            <text:p>Fat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RE - CRE - Construir, Realizar, Evolui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421" table:style-name="ce9">
            <text:p>050421</text:p>
          </table:table-cell>
          <table:table-cell office:value-type="string" table:style-name="ce1">
            <text:p>Fundão</text:p>
          </table:table-cell>
          <table:table-cell office:value-type="string" table:style-name="ce8">
            <text:p>Pêro Viseu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PP - Movimento Independente Por Pêro Viseu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431" table:style-name="ce9">
            <text:p>050431</text:p>
          </table:table-cell>
          <table:table-cell office:value-type="string" table:style-name="ce1">
            <text:p>Fundão</text:p>
          </table:table-cell>
          <table:table-cell office:value-type="string" table:style-name="ce8">
            <text:p>Enxam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E - Pelos Enxam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432" table:style-name="ce9">
            <text:p>050432</text:p>
          </table:table-cell>
          <table:table-cell office:value-type="string" table:style-name="ce1">
            <text:p>Fundão</text:p>
          </table:table-cell>
          <table:table-cell office:value-type="string" table:style-name="ce8">
            <text:p>Três Pov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PTP - Pelo Progresso dos Três Pov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434" table:style-name="ce9">
            <text:p>050434</text:p>
          </table:table-cell>
          <table:table-cell office:value-type="string" table:style-name="ce1">
            <text:p>Fundão</text:p>
          </table:table-cell>
          <table:table-cell office:value-type="string" table:style-name="ce8">
            <text:p>União das freguesias de Fundão, Valverde, Donas, Aldeia de Joanes e Aldeia Nova do Cab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DAR - Dedicação, Ambição, Responsabilidade]</text:p>
          </table:table-cell>
          <table:table-cell office:value-type="string" table:style-name="ce1">
            <text:p>[UPF - Unidos Pelas Freguesia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436" table:style-name="ce9">
            <text:p>050436</text:p>
          </table:table-cell>
          <table:table-cell office:value-type="string" table:style-name="ce1">
            <text:p>Fundão</text:p>
          </table:table-cell>
          <table:table-cell office:value-type="string" table:style-name="ce8">
            <text:p>União das freguesias de Vale de Prazeres e Mata da Rain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VPMR - União das Freguesias de Vale de Prazeres e Mata da Rain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500" table:style-name="ce9">
            <text:p>050500</text:p>
          </table:table-cell>
          <table:table-cell office:value-type="string" table:style-name="ce1">
            <text:p>Idanha-a-Nov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C.P.I. - Com as pessoas, por Idan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500" table:style-name="ce9">
            <text:p>050500</text:p>
          </table:table-cell>
          <table:table-cell office:value-type="string" table:style-name="ce1">
            <text:p>Idanha-a-Nov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C.P.I. - Com as pessoas, por Idan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510" table:style-name="ce9">
            <text:p>050510</text:p>
          </table:table-cell>
          <table:table-cell office:value-type="string" table:style-name="ce1">
            <text:p>Idanha-a-Nova</text:p>
          </table:table-cell>
          <table:table-cell office:value-type="string" table:style-name="ce8">
            <text:p>Penha Garc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.P.I. - Com as pessoas, por Idan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512" table:style-name="ce9">
            <text:p>050512</text:p>
          </table:table-cell>
          <table:table-cell office:value-type="string" table:style-name="ce1">
            <text:p>Idanha-a-Nova</text:p>
          </table:table-cell>
          <table:table-cell office:value-type="string" table:style-name="ce8">
            <text:p>Rosmaninh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.P.I. - Com as pessoas, por Idan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514" table:style-name="ce9">
            <text:p>050514</text:p>
          </table:table-cell>
          <table:table-cell office:value-type="string" table:style-name="ce1">
            <text:p>Idanha-a-Nova</text:p>
          </table:table-cell>
          <table:table-cell office:value-type="string" table:style-name="ce8">
            <text:p>São Miguel de Ac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.P.I. - Com as pessoas, por Idan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520" table:style-name="ce9">
            <text:p>050520</text:p>
          </table:table-cell>
          <table:table-cell office:value-type="string" table:style-name="ce1">
            <text:p>Idanha-a-Nova</text:p>
          </table:table-cell>
          <table:table-cell office:value-type="string" table:style-name="ce8">
            <text:p>União das freguesias de Monsanto e Idanha-a-Vel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.P.I. - Com as pessoas, por Idan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600" table:style-name="ce9">
            <text:p>050600</text:p>
          </table:table-cell>
          <table:table-cell office:value-type="string" table:style-name="ce1">
            <text:p>Oleiros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CO - Mais Concelho de Ol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600" table:style-name="ce9">
            <text:p>050600</text:p>
          </table:table-cell>
          <table:table-cell office:value-type="string" table:style-name="ce1">
            <text:p>Oleiros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CO - Mais Concelho de Ol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601" table:style-name="ce9">
            <text:p>050601</text:p>
          </table:table-cell>
          <table:table-cell office:value-type="string" table:style-name="ce1">
            <text:p>Oleiros</text:p>
          </table:table-cell>
          <table:table-cell office:value-type="string" table:style-name="ce8">
            <text:p>Álva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O - Mais Concelho de Ol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603" table:style-name="ce9">
            <text:p>050603</text:p>
          </table:table-cell>
          <table:table-cell office:value-type="string" table:style-name="ce1">
            <text:p>Oleiros</text:p>
          </table:table-cell>
          <table:table-cell office:value-type="string" table:style-name="ce8">
            <text:p>Camb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O - Mais Concelho de Ol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605" table:style-name="ce9">
            <text:p>050605</text:p>
          </table:table-cell>
          <table:table-cell office:value-type="string" table:style-name="ce1">
            <text:p>Oleiros</text:p>
          </table:table-cell>
          <table:table-cell office:value-type="string" table:style-name="ce8">
            <text:p>Isn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O - Mais Concelho de Ol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606" table:style-name="ce9">
            <text:p>050606</text:p>
          </table:table-cell>
          <table:table-cell office:value-type="string" table:style-name="ce1">
            <text:p>Oleiros</text:p>
          </table:table-cell>
          <table:table-cell office:value-type="string" table:style-name="ce8">
            <text:p>Madeirã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O - Mais Concelho de Ol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609" table:style-name="ce9">
            <text:p>050609</text:p>
          </table:table-cell>
          <table:table-cell office:value-type="string" table:style-name="ce1">
            <text:p>Oleiros</text:p>
          </table:table-cell>
          <table:table-cell office:value-type="string" table:style-name="ce8">
            <text:p>Orvalh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PDF - Pelo Progresso da Nossa Fregues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613" table:style-name="ce9">
            <text:p>050613</text:p>
          </table:table-cell>
          <table:table-cell office:value-type="string" table:style-name="ce1">
            <text:p>Oleiros</text:p>
          </table:table-cell>
          <table:table-cell office:value-type="string" table:style-name="ce8">
            <text:p>Estreito - Vilar Barroc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O - Mais Concelho de Ol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614" table:style-name="ce9">
            <text:p>050614</text:p>
          </table:table-cell>
          <table:table-cell office:value-type="string" table:style-name="ce1">
            <text:p>Oleiros</text:p>
          </table:table-cell>
          <table:table-cell office:value-type="string" table:style-name="ce8">
            <text:p>Oleiros - Ami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O - Mais Concelho de Ol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700" table:style-name="ce9">
            <text:p>050700</text:p>
          </table:table-cell>
          <table:table-cell office:value-type="string" table:style-name="ce1">
            <text:p>Penamacor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MPT - JUNTOS POR PENAMAC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700" table:style-name="ce9">
            <text:p>050700</text:p>
          </table:table-cell>
          <table:table-cell office:value-type="string" table:style-name="ce1">
            <text:p>Penamacor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MPT - JUNTOS POR PENAMAC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704" table:style-name="ce9">
            <text:p>050704</text:p>
          </table:table-cell>
          <table:table-cell office:value-type="string" table:style-name="ce1">
            <text:p>Penamacor</text:p>
          </table:table-cell>
          <table:table-cell office:value-type="string" table:style-name="ce8">
            <text:p>Aranh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 - JUNTOS POR PENAMAC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706" table:style-name="ce9">
            <text:p>050706</text:p>
          </table:table-cell>
          <table:table-cell office:value-type="string" table:style-name="ce1">
            <text:p>Penamacor</text:p>
          </table:table-cell>
          <table:table-cell office:value-type="string" table:style-name="ce8">
            <text:p>Benqueren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 - JUNTOS POR PENAMAC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707" table:style-name="ce9">
            <text:p>050707</text:p>
          </table:table-cell>
          <table:table-cell office:value-type="string" table:style-name="ce1">
            <text:p>Penamacor</text:p>
          </table:table-cell>
          <table:table-cell office:value-type="string" table:style-name="ce8">
            <text:p>Meim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 - JUNTOS POR PENAMAC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708" table:style-name="ce9">
            <text:p>050708</text:p>
          </table:table-cell>
          <table:table-cell office:value-type="string" table:style-name="ce1">
            <text:p>Penamacor</text:p>
          </table:table-cell>
          <table:table-cell office:value-type="string" table:style-name="ce8">
            <text:p>Meimo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 - JUNTOS POR PENAMAC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710" table:style-name="ce9">
            <text:p>050710</text:p>
          </table:table-cell>
          <table:table-cell office:value-type="string" table:style-name="ce1">
            <text:p>Penamacor</text:p>
          </table:table-cell>
          <table:table-cell office:value-type="string" table:style-name="ce8">
            <text:p>Penamaco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 - JUNTOS POR PENAMAC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711" table:style-name="ce9">
            <text:p>050711</text:p>
          </table:table-cell>
          <table:table-cell office:value-type="string" table:style-name="ce1">
            <text:p>Penamacor</text:p>
          </table:table-cell>
          <table:table-cell office:value-type="string" table:style-name="ce8">
            <text:p>Salvado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 - JUNTOS POR PENAMAC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712" table:style-name="ce9">
            <text:p>050712</text:p>
          </table:table-cell>
          <table:table-cell office:value-type="string" table:style-name="ce1">
            <text:p>Penamacor</text:p>
          </table:table-cell>
          <table:table-cell office:value-type="string" table:style-name="ce8">
            <text:p>Vale da Senhora da Póvo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 - JUNTOS POR PENAMAC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713" table:style-name="ce9">
            <text:p>050713</text:p>
          </table:table-cell>
          <table:table-cell office:value-type="string" table:style-name="ce1">
            <text:p>Penamacor</text:p>
          </table:table-cell>
          <table:table-cell office:value-type="string" table:style-name="ce8">
            <text:p>União das freguesias de Aldeia do Bispo, Águas e Aldeia de João Pi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 - JUNTOS POR PENAMAC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714" table:style-name="ce9">
            <text:p>050714</text:p>
          </table:table-cell>
          <table:table-cell office:value-type="string" table:style-name="ce1">
            <text:p>Penamacor</text:p>
          </table:table-cell>
          <table:table-cell office:value-type="string" table:style-name="ce8">
            <text:p>União das freguesias de Pedrógão de São Pedro e Bempos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 - JUNTOS POR PENAMAC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900" table:style-name="ce9">
            <text:p>050900</text:p>
          </table:table-cell>
          <table:table-cell office:value-type="string" table:style-name="ce1">
            <text:p>Sertã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.I. - Movimento Idei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900" table:style-name="ce9">
            <text:p>050900</text:p>
          </table:table-cell>
          <table:table-cell office:value-type="string" table:style-name="ce1">
            <text:p>Sertã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.I. - Movimento Idei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901" table:style-name="ce9">
            <text:p>050901</text:p>
          </table:table-cell>
          <table:table-cell office:value-type="string" table:style-name="ce1">
            <text:p>Sertã</text:p>
          </table:table-cell>
          <table:table-cell office:value-type="string" table:style-name="ce8">
            <text:p>Cabeçu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 - Movimento Idei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912" table:style-name="ce9">
            <text:p>050912</text:p>
          </table:table-cell>
          <table:table-cell office:value-type="string" table:style-name="ce1">
            <text:p>Sertã</text:p>
          </table:table-cell>
          <table:table-cell office:value-type="string" table:style-name="ce8">
            <text:p>Sertã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I. - Movimento Idei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50917" table:style-name="ce9">
            <text:p>050917</text:p>
          </table:table-cell>
          <table:table-cell office:value-type="string" table:style-name="ce1">
            <text:p>Sertã</text:p>
          </table:table-cell>
          <table:table-cell office:value-type="string" table:style-name="ce8">
            <text:p>União das freguesias de Ermida e Figueir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ALIANÇA DEMOCRÁTICA ERMIDA FIGUEIRED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102" table:style-name="ce9">
            <text:p>060102</text:p>
          </table:table-cell>
          <table:table-cell office:value-type="string" table:style-name="ce1">
            <text:p>Arganil</text:p>
          </table:table-cell>
          <table:table-cell office:value-type="string" table:style-name="ce8">
            <text:p>Argani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AT - Arganil Acima de Tu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121" table:style-name="ce9">
            <text:p>060121</text:p>
          </table:table-cell>
          <table:table-cell office:value-type="string" table:style-name="ce1">
            <text:p>Arganil</text:p>
          </table:table-cell>
          <table:table-cell office:value-type="string" table:style-name="ce8">
            <text:p>União das freguesias de Côja e Barril de Alv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C - Inovar na Continuidade]</text:p>
          </table:table-cell>
          <table:table-cell office:value-type="string" table:style-name="ce1">
            <text:p>[TPF - Todos Pelo Futur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00" table:style-name="ce9">
            <text:p>060300</text:p>
          </table:table-cell>
          <table:table-cell office:value-type="string" table:style-name="ce1">
            <text:p>Coimb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office:value-type="string" table:style-name="ce8">
            <text:p>[CPC - Cidadãos Por Coimb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00" table:style-name="ce9">
            <text:p>060300</text:p>
          </table:table-cell>
          <table:table-cell office:value-type="string" table:style-name="ce1">
            <text:p>Coimb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office:value-type="string" table:style-name="ce8">
            <text:p>[CPC - Cidadãos Por Coimb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01" table:style-name="ce9">
            <text:p>060301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Almalaguê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office:value-type="string" table:style-name="ce8">
            <text:p>[CPC - Cidadãos Por Coimb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09" table:style-name="ce9">
            <text:p>060309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Brasfem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11" table:style-name="ce9">
            <text:p>060311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C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12" table:style-name="ce9">
            <text:p>060312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Cernach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18" table:style-name="ce9">
            <text:p>060318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Santo António dos Oliv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office:value-type="string" table:style-name="ce8">
            <text:p>[CPC - Cidadãos Por Coimb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20" table:style-name="ce9">
            <text:p>060320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São João do Camp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24" table:style-name="ce9">
            <text:p>060324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São Silvestr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29" table:style-name="ce9">
            <text:p>060329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Torres do Mondeg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32" table:style-name="ce9">
            <text:p>060332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União das freguesias de Antuzede e Vil de Mat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33" table:style-name="ce9">
            <text:p>060333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União das freguesias de Assafarge e Antanho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34" table:style-name="ce9">
            <text:p>060334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União das freguesias de Coimbra (Sé Nova, Santa Cruz, Almedina e São Bartolomeu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office:value-type="string" table:style-name="ce8">
            <text:p>[CPC - Cidadãos Por Coimb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35" table:style-name="ce9">
            <text:p>060335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União das freguesias de Eiras e São Paulo de Frad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office:value-type="string" table:style-name="ce8">
            <text:p>[CPC - Cidadãos Por Coimb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36" table:style-name="ce9">
            <text:p>060336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União das freguesias de Santa Clara e Castelo Vieg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office:value-type="string" table:style-name="ce8">
            <text:p>[CPC - Cidadãos Por Coimbra]</text:p>
          </table:table-cell>
          <table:table-cell office:value-type="string" table:style-name="ce1">
            <text:p>[MJI - Movimento Juventude Independente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37" table:style-name="ce9">
            <text:p>060337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União das freguesias de São Martinho de Árvore e Lamar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38" table:style-name="ce9">
            <text:p>060338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União das freguesias de São Martinho do Bispo e Ribeira de Frad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office:value-type="string" table:style-name="ce8">
            <text:p>[CPC - Cidadãos Por Coimb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39" table:style-name="ce9">
            <text:p>060339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União das freguesias de Souselas e Bot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office:value-type="string" table:style-name="ce8">
            <text:p>[U.S.B - União de Souselas e Bot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40" table:style-name="ce9">
            <text:p>060340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União das freguesias de Taveiro, Ameal e Arzi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office:value-type="string" table:style-name="ce8">
            <text:p>[mcc2013 - Movimento de Cidadãos Cândido 2013 - Unidos Somos Mais For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341" table:style-name="ce9">
            <text:p>060341</text:p>
          </table:table-cell>
          <table:table-cell office:value-type="string" table:style-name="ce1">
            <text:p>Coimbra</text:p>
          </table:table-cell>
          <table:table-cell office:value-type="string" table:style-name="ce8">
            <text:p>União das freguesias de Trouxemil e Torre de Vil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 COIMBRA]</text:p>
          </table:table-cell>
          <table:table-cell table:style-name="ce1"/>
          <table:table-cell office:value-type="string" table:style-name="ce8">
            <text:p>[CPC - Cidadãos Por Coimb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401" table:style-name="ce9">
            <text:p>060401</text:p>
          </table:table-cell>
          <table:table-cell office:value-type="string" table:style-name="ce1">
            <text:p>Condeixa-a-Nova</text:p>
          </table:table-cell>
          <table:table-cell office:value-type="string" table:style-name="ce8">
            <text:p>Anob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PA - Movimento Por Anob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411" table:style-name="ce9">
            <text:p>060411</text:p>
          </table:table-cell>
          <table:table-cell office:value-type="string" table:style-name="ce1">
            <text:p>Condeixa-a-Nova</text:p>
          </table:table-cell>
          <table:table-cell office:value-type="string" table:style-name="ce8">
            <text:p>União das freguesias de Condeixa-a-Velha e Condeixa-a-Nov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DGU - Apostar na Diferença Ganhar Uni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00" table:style-name="ce9">
            <text:p>060500</text:p>
          </table:table-cell>
          <table:table-cell office:value-type="string" table:style-name="ce1">
            <text:p>Figueira da Foz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00" table:style-name="ce9">
            <text:p>060500</text:p>
          </table:table-cell>
          <table:table-cell office:value-type="string" table:style-name="ce1">
            <text:p>Figueira da Foz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02" table:style-name="ce9">
            <text:p>060502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Alqueid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07" table:style-name="ce9">
            <text:p>060507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Maior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08" table:style-name="ce9">
            <text:p>060508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Marinha das Ond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12" table:style-name="ce9">
            <text:p>060512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Tavare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13" table:style-name="ce9">
            <text:p>060513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Vila Ver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14" table:style-name="ce9">
            <text:p>060514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São Ped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SP - Lista Independente de São Ped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15" table:style-name="ce9">
            <text:p>060515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Bom Sucess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office:value-type="string" table:style-name="ce8">
            <text:p>[fbs - FORÇA BOM SUCESS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18" table:style-name="ce9">
            <text:p>060518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Moinhos da Gânda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19" table:style-name="ce9">
            <text:p>060519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Alhad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20" table:style-name="ce9">
            <text:p>060520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Buarc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21" table:style-name="ce9">
            <text:p>060521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Ferreira-a-No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22" table:style-name="ce9">
            <text:p>060522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Lav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ovor - Lavos: Ou Vai ou Rac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23" table:style-name="ce9">
            <text:p>060523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Pai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524" table:style-name="ce9">
            <text:p>060524</text:p>
          </table:table-cell>
          <table:table-cell office:value-type="string" table:style-name="ce1">
            <text:p>Figueira da Foz</text:p>
          </table:table-cell>
          <table:table-cell office:value-type="string" table:style-name="ce8">
            <text:p>Quiai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.MPT - SOMOS FIGUE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600" table:style-name="ce9">
            <text:p>060600</text:p>
          </table:table-cell>
          <table:table-cell office:value-type="string" table:style-name="ce1">
            <text:p>Góis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I-GÓIS - Independentes por Gó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600" table:style-name="ce9">
            <text:p>060600</text:p>
          </table:table-cell>
          <table:table-cell office:value-type="string" table:style-name="ce1">
            <text:p>Góis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I-GÓIS - Independentes por Gó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601" table:style-name="ce9">
            <text:p>060601</text:p>
          </table:table-cell>
          <table:table-cell office:value-type="string" table:style-name="ce1">
            <text:p>Góis</text:p>
          </table:table-cell>
          <table:table-cell office:value-type="string" table:style-name="ce8">
            <text:p>Alvar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-GÓIS - Independentes por Gó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604" table:style-name="ce9">
            <text:p>060604</text:p>
          </table:table-cell>
          <table:table-cell office:value-type="string" table:style-name="ce1">
            <text:p>Góis</text:p>
          </table:table-cell>
          <table:table-cell office:value-type="string" table:style-name="ce8">
            <text:p>Gói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-GÓIS - Independentes por Gó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605" table:style-name="ce9">
            <text:p>060605</text:p>
          </table:table-cell>
          <table:table-cell office:value-type="string" table:style-name="ce1">
            <text:p>Góis</text:p>
          </table:table-cell>
          <table:table-cell office:value-type="string" table:style-name="ce8">
            <text:p>Vila Nova do C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-GÓIS - Independentes por Gó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606" table:style-name="ce9">
            <text:p>060606</text:p>
          </table:table-cell>
          <table:table-cell office:value-type="string" table:style-name="ce1">
            <text:p>Góis</text:p>
          </table:table-cell>
          <table:table-cell office:value-type="string" table:style-name="ce8">
            <text:p>União das freguesias de Cadafaz e Colme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-GÓIS - Independentes por Gó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700" table:style-name="ce9">
            <text:p>060700</text:p>
          </table:table-cell>
          <table:table-cell office:value-type="string" table:style-name="ce1">
            <text:p>Lousã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LOUSÃ MAI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700" table:style-name="ce9">
            <text:p>060700</text:p>
          </table:table-cell>
          <table:table-cell office:value-type="string" table:style-name="ce1">
            <text:p>Lousã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LOUSÃ MAI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704" table:style-name="ce9">
            <text:p>060704</text:p>
          </table:table-cell>
          <table:table-cell office:value-type="string" table:style-name="ce1">
            <text:p>Lousã</text:p>
          </table:table-cell>
          <table:table-cell office:value-type="string" table:style-name="ce8">
            <text:p>Serpin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Ã MAI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706" table:style-name="ce9">
            <text:p>060706</text:p>
          </table:table-cell>
          <table:table-cell office:value-type="string" table:style-name="ce1">
            <text:p>Lousã</text:p>
          </table:table-cell>
          <table:table-cell office:value-type="string" table:style-name="ce8">
            <text:p>Gândar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Ã MAI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707" table:style-name="ce9">
            <text:p>060707</text:p>
          </table:table-cell>
          <table:table-cell office:value-type="string" table:style-name="ce1">
            <text:p>Lousã</text:p>
          </table:table-cell>
          <table:table-cell office:value-type="string" table:style-name="ce8">
            <text:p>União das freguesias de Foz de Arouce e Casal de Ermi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Ã MAI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708" table:style-name="ce9">
            <text:p>060708</text:p>
          </table:table-cell>
          <table:table-cell office:value-type="string" table:style-name="ce1">
            <text:p>Lousã</text:p>
          </table:table-cell>
          <table:table-cell office:value-type="string" table:style-name="ce8">
            <text:p>União das freguesias de Lousã e Vilar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Ã MAI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800" table:style-name="ce9">
            <text:p>060800</text:p>
          </table:table-cell>
          <table:table-cell office:value-type="string" table:style-name="ce1">
            <text:p>Mir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AR - Movimento Autárquico de Renov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800" table:style-name="ce9">
            <text:p>060800</text:p>
          </table:table-cell>
          <table:table-cell office:value-type="string" table:style-name="ce1">
            <text:p>Mir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AR - Movimento Autárquico de Renov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801" table:style-name="ce9">
            <text:p>060801</text:p>
          </table:table-cell>
          <table:table-cell office:value-type="string" table:style-name="ce1">
            <text:p>Mira</text:p>
          </table:table-cell>
          <table:table-cell office:value-type="string" table:style-name="ce8">
            <text:p>M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R - Movimento Autárquico de Renov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803" table:style-name="ce9">
            <text:p>060803</text:p>
          </table:table-cell>
          <table:table-cell office:value-type="string" table:style-name="ce1">
            <text:p>Mira</text:p>
          </table:table-cell>
          <table:table-cell office:value-type="string" table:style-name="ce8">
            <text:p>Carapelh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F - Juntos Pelo Fut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804" table:style-name="ce9">
            <text:p>060804</text:p>
          </table:table-cell>
          <table:table-cell office:value-type="string" table:style-name="ce1">
            <text:p>Mira</text:p>
          </table:table-cell>
          <table:table-cell office:value-type="string" table:style-name="ce8">
            <text:p>Praia de M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MAR - Movimento Autárquico de Renovação]</text:p>
          </table:table-cell>
          <table:table-cell office:value-type="string" table:style-name="ce8">
            <text:p>[apm - Amar Praia de Mir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900" table:style-name="ce9">
            <text:p>060900</text:p>
          </table:table-cell>
          <table:table-cell office:value-type="string" table:style-name="ce1">
            <text:p>Miranda do Corv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IRANDA NÃO PODE PARAR]</text:p>
          </table:table-cell>
          <table:table-cell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/>
          <table:table-cell office:value-type="float" office:value="60900" table:style-name="ce9">
            <text:p>060900</text:p>
          </table:table-cell>
          <table:table-cell office:value-type="string" table:style-name="ce1">
            <text:p>Miranda do Corv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IRANDA NÃO PODE PAR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901" table:style-name="ce9">
            <text:p>060901</text:p>
          </table:table-cell>
          <table:table-cell office:value-type="string" table:style-name="ce1">
            <text:p>Miranda do Corvo</text:p>
          </table:table-cell>
          <table:table-cell office:value-type="string" table:style-name="ce8">
            <text:p>Lam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IRANDA NÃO PODE PAR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902" table:style-name="ce9">
            <text:p>060902</text:p>
          </table:table-cell>
          <table:table-cell office:value-type="string" table:style-name="ce1">
            <text:p>Miranda do Corvo</text:p>
          </table:table-cell>
          <table:table-cell office:value-type="string" table:style-name="ce8">
            <text:p>Miranda do Corv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IRANDA NÃO PODE PAR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905" table:style-name="ce9">
            <text:p>060905</text:p>
          </table:table-cell>
          <table:table-cell office:value-type="string" table:style-name="ce1">
            <text:p>Miranda do Corvo</text:p>
          </table:table-cell>
          <table:table-cell office:value-type="string" table:style-name="ce8">
            <text:p>Vila No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IRANDA NÃO PODE PAR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0906" table:style-name="ce9">
            <text:p>060906</text:p>
          </table:table-cell>
          <table:table-cell office:value-type="string" table:style-name="ce1">
            <text:p>Miranda do Corvo</text:p>
          </table:table-cell>
          <table:table-cell office:value-type="string" table:style-name="ce8">
            <text:p>União das freguesias de Semide e Rio Vi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IRANDA NÃO PODE PAR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00" table:style-name="ce9">
            <text:p>061000</text:p>
          </table:table-cell>
          <table:table-cell office:value-type="string" table:style-name="ce1">
            <text:p>Montemor-o-Velh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AIS POR MONTEM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00" table:style-name="ce9">
            <text:p>061000</text:p>
          </table:table-cell>
          <table:table-cell office:value-type="string" table:style-name="ce1">
            <text:p>Montemor-o-Velh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AIS POR MONTEM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02" table:style-name="ce9">
            <text:p>061002</text:p>
          </table:table-cell>
          <table:table-cell office:value-type="string" table:style-name="ce1">
            <text:p>Montemor-o-Velho</text:p>
          </table:table-cell>
          <table:table-cell office:value-type="string" table:style-name="ce8">
            <text:p>Araze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MONTEM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03" table:style-name="ce9">
            <text:p>061003</text:p>
          </table:table-cell>
          <table:table-cell office:value-type="string" table:style-name="ce1">
            <text:p>Montemor-o-Velho</text:p>
          </table:table-cell>
          <table:table-cell office:value-type="string" table:style-name="ce8">
            <text:p>Carapinh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MONTEM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05" table:style-name="ce9">
            <text:p>061005</text:p>
          </table:table-cell>
          <table:table-cell office:value-type="string" table:style-name="ce1">
            <text:p>Montemor-o-Velho</text:p>
          </table:table-cell>
          <table:table-cell office:value-type="string" table:style-name="ce8">
            <text:p>Lice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MONTEM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06" table:style-name="ce9">
            <text:p>061006</text:p>
          </table:table-cell>
          <table:table-cell office:value-type="string" table:style-name="ce1">
            <text:p>Montemor-o-Velho</text:p>
          </table:table-cell>
          <table:table-cell office:value-type="string" table:style-name="ce8">
            <text:p>Meãs do Camp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MONTEM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08" table:style-name="ce9">
            <text:p>061008</text:p>
          </table:table-cell>
          <table:table-cell office:value-type="string" table:style-name="ce1">
            <text:p>Montemor-o-Velho</text:p>
          </table:table-cell>
          <table:table-cell office:value-type="string" table:style-name="ce8">
            <text:p>Per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MONTEM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09" table:style-name="ce9">
            <text:p>061009</text:p>
          </table:table-cell>
          <table:table-cell office:value-type="string" table:style-name="ce1">
            <text:p>Montemor-o-Velho</text:p>
          </table:table-cell>
          <table:table-cell office:value-type="string" table:style-name="ce8">
            <text:p>Santo Var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MONTEM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10" table:style-name="ce9">
            <text:p>061010</text:p>
          </table:table-cell>
          <table:table-cell office:value-type="string" table:style-name="ce1">
            <text:p>Montemor-o-Velho</text:p>
          </table:table-cell>
          <table:table-cell office:value-type="string" table:style-name="ce8">
            <text:p>Seixo de Gat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MONTEM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11" table:style-name="ce9">
            <text:p>061011</text:p>
          </table:table-cell>
          <table:table-cell office:value-type="string" table:style-name="ce1">
            <text:p>Montemor-o-Velho</text:p>
          </table:table-cell>
          <table:table-cell office:value-type="string" table:style-name="ce8">
            <text:p>Tentúg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ft - Unidos Pela Freguesia de Tentúg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15" table:style-name="ce9">
            <text:p>061015</text:p>
          </table:table-cell>
          <table:table-cell office:value-type="string" table:style-name="ce1">
            <text:p>Montemor-o-Velho</text:p>
          </table:table-cell>
          <table:table-cell office:value-type="string" table:style-name="ce8">
            <text:p>União das freguesias de Abrunheira, Verride e Vila Nova da Bar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MONTEM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016" table:style-name="ce9">
            <text:p>061016</text:p>
          </table:table-cell>
          <table:table-cell office:value-type="string" table:style-name="ce1">
            <text:p>Montemor-o-Velho</text:p>
          </table:table-cell>
          <table:table-cell office:value-type="string" table:style-name="ce8">
            <text:p>União das freguesias de Montemor-o-Velho e Gat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MONTEM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103" table:style-name="ce9">
            <text:p>061103</text:p>
          </table:table-cell>
          <table:table-cell office:value-type="string" table:style-name="ce1">
            <text:p>Oliveira do Hospital</text:p>
          </table:table-cell>
          <table:table-cell office:value-type="string" table:style-name="ce8">
            <text:p>Avô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ant - AVÔ, 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119" table:style-name="ce9">
            <text:p>061119</text:p>
          </table:table-cell>
          <table:table-cell office:value-type="string" table:style-name="ce1">
            <text:p>Oliveira do Hospital</text:p>
          </table:table-cell>
          <table:table-cell office:value-type="string" table:style-name="ce8">
            <text:p>Travanca de Lag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FTLUS - FREGUESIA DE TRAVANCA DE LAGOS UNIDA, SORRI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123" table:style-name="ce9">
            <text:p>061123</text:p>
          </table:table-cell>
          <table:table-cell office:value-type="string" table:style-name="ce1">
            <text:p>Oliveira do Hospital</text:p>
          </table:table-cell>
          <table:table-cell office:value-type="string" table:style-name="ce8">
            <text:p>União das freguesias de Lagos da Beira e Lajeos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ll - MOVIMNETO LAGOS LAJEOS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201" table:style-name="ce9">
            <text:p>061201</text:p>
          </table:table-cell>
          <table:table-cell office:value-type="string" table:style-name="ce1">
            <text:p>Pampilhosa da Serra</text:p>
          </table:table-cell>
          <table:table-cell office:value-type="string" table:style-name="ce8">
            <text:p>Cabri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s - Cabril Semp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206" table:style-name="ce9">
            <text:p>061206</text:p>
          </table:table-cell>
          <table:table-cell office:value-type="string" table:style-name="ce1">
            <text:p>Pampilhosa da Serra</text:p>
          </table:table-cell>
          <table:table-cell office:value-type="string" table:style-name="ce8">
            <text:p>Pampilhosa da Ser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p - Unidos Pela Pampilhos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300" table:style-name="ce9">
            <text:p>061300</text:p>
          </table:table-cell>
          <table:table-cell office:value-type="string" table:style-name="ce1">
            <text:p>Penacov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OR PENACO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300" table:style-name="ce9">
            <text:p>061300</text:p>
          </table:table-cell>
          <table:table-cell office:value-type="string" table:style-name="ce1">
            <text:p>Penacov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OR PENACO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301" table:style-name="ce9">
            <text:p>061301</text:p>
          </table:table-cell>
          <table:table-cell office:value-type="string" table:style-name="ce1">
            <text:p>Penacova</text:p>
          </table:table-cell>
          <table:table-cell office:value-type="string" table:style-name="ce8">
            <text:p>Carval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PENACO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302" table:style-name="ce9">
            <text:p>061302</text:p>
          </table:table-cell>
          <table:table-cell office:value-type="string" table:style-name="ce1">
            <text:p>Penacova</text:p>
          </table:table-cell>
          <table:table-cell office:value-type="string" table:style-name="ce8">
            <text:p>Figueira de Lorv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PENACO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304" table:style-name="ce9">
            <text:p>061304</text:p>
          </table:table-cell>
          <table:table-cell office:value-type="string" table:style-name="ce1">
            <text:p>Penacova</text:p>
          </table:table-cell>
          <table:table-cell office:value-type="string" table:style-name="ce8">
            <text:p>Lorv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PENACO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307" table:style-name="ce9">
            <text:p>061307</text:p>
          </table:table-cell>
          <table:table-cell office:value-type="string" table:style-name="ce1">
            <text:p>Penacova</text:p>
          </table:table-cell>
          <table:table-cell office:value-type="string" table:style-name="ce8">
            <text:p>Penaco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PENACO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310" table:style-name="ce9">
            <text:p>061310</text:p>
          </table:table-cell>
          <table:table-cell office:value-type="string" table:style-name="ce1">
            <text:p>Penacova</text:p>
          </table:table-cell>
          <table:table-cell office:value-type="string" table:style-name="ce8">
            <text:p>Sazes do Lorv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PENACO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312" table:style-name="ce9">
            <text:p>061312</text:p>
          </table:table-cell>
          <table:table-cell office:value-type="string" table:style-name="ce1">
            <text:p>Penacova</text:p>
          </table:table-cell>
          <table:table-cell office:value-type="string" table:style-name="ce8">
            <text:p>União das freguesias de Friúmes e Parad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PENACO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313" table:style-name="ce9">
            <text:p>061313</text:p>
          </table:table-cell>
          <table:table-cell office:value-type="string" table:style-name="ce1">
            <text:p>Penacova</text:p>
          </table:table-cell>
          <table:table-cell office:value-type="string" table:style-name="ce8">
            <text:p>União das freguesias de Oliveira do Mondego e Travanca do Mondeg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PENACO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314" table:style-name="ce9">
            <text:p>061314</text:p>
          </table:table-cell>
          <table:table-cell office:value-type="string" table:style-name="ce1">
            <text:p>Penacova</text:p>
          </table:table-cell>
          <table:table-cell office:value-type="string" table:style-name="ce8">
            <text:p>União das freguesias de São Pedro de Alva e São Paio de Mondeg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PENACO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402" table:style-name="ce9">
            <text:p>061402</text:p>
          </table:table-cell>
          <table:table-cell office:value-type="string" table:style-name="ce1">
            <text:p>Penela</text:p>
          </table:table-cell>
          <table:table-cell office:value-type="string" table:style-name="ce8">
            <text:p>Espinh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.E. - SOMOS ESPINH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00" table:style-name="ce9">
            <text:p>061500</text:p>
          </table:table-cell>
          <table:table-cell office:value-type="string" table:style-name="ce1">
            <text:p>Soure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office:value-type="string" table:style-name="ce8">
            <text:p>[MCPS - Movimento Cidadãos Por Sou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00" table:style-name="ce9">
            <text:p>061500</text:p>
          </table:table-cell>
          <table:table-cell office:value-type="string" table:style-name="ce1">
            <text:p>Soure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office:value-type="string" table:style-name="ce8">
            <text:p>[MCPS - Movimento Cidadãos Por Sou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01" table:style-name="ce9">
            <text:p>061501</text:p>
          </table:table-cell>
          <table:table-cell office:value-type="string" table:style-name="ce1">
            <text:p>Soure</text:p>
          </table:table-cell>
          <table:table-cell office:value-type="string" table:style-name="ce8">
            <text:p>Alfar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office:value-type="string" table:style-name="ce8">
            <text:p>[MCPS - Movimento Cidadãos Por Sou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04" table:style-name="ce9">
            <text:p>061504</text:p>
          </table:table-cell>
          <table:table-cell office:value-type="string" table:style-name="ce1">
            <text:p>Soure</text:p>
          </table:table-cell>
          <table:table-cell office:value-type="string" table:style-name="ce8">
            <text:p>Figueiró do Camp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office:value-type="string" table:style-name="ce8">
            <text:p>[MCPS - Movimento Cidadãos Por Sou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06" table:style-name="ce9">
            <text:p>061506</text:p>
          </table:table-cell>
          <table:table-cell office:value-type="string" table:style-name="ce1">
            <text:p>Soure</text:p>
          </table:table-cell>
          <table:table-cell office:value-type="string" table:style-name="ce8">
            <text:p>Granja do Ulm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office:value-type="string" table:style-name="ce8">
            <text:p>[MCPS - Movimento Cidadãos Por Sou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08" table:style-name="ce9">
            <text:p>061508</text:p>
          </table:table-cell>
          <table:table-cell office:value-type="string" table:style-name="ce1">
            <text:p>Soure</text:p>
          </table:table-cell>
          <table:table-cell office:value-type="string" table:style-name="ce8">
            <text:p>Samue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09" table:style-name="ce9">
            <text:p>061509</text:p>
          </table:table-cell>
          <table:table-cell office:value-type="string" table:style-name="ce1">
            <text:p>Soure</text:p>
          </table:table-cell>
          <table:table-cell office:value-type="string" table:style-name="ce8">
            <text:p>Sour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office:value-type="string" table:style-name="ce8">
            <text:p>[MCPS - Movimento Cidadãos Por Sou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10" table:style-name="ce9">
            <text:p>061510</text:p>
          </table:table-cell>
          <table:table-cell office:value-type="string" table:style-name="ce1">
            <text:p>Soure</text:p>
          </table:table-cell>
          <table:table-cell office:value-type="string" table:style-name="ce8">
            <text:p>Tapéu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office:value-type="string" table:style-name="ce8">
            <text:p>[MCPS - Movimento Cidadãos Por Sou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11" table:style-name="ce9">
            <text:p>061511</text:p>
          </table:table-cell>
          <table:table-cell office:value-type="string" table:style-name="ce1">
            <text:p>Soure</text:p>
          </table:table-cell>
          <table:table-cell office:value-type="string" table:style-name="ce8">
            <text:p>Vila Nova de Anç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office:value-type="string" table:style-name="ce8">
            <text:p>[MCPS - Movimento Cidadãos Por Sou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12" table:style-name="ce9">
            <text:p>061512</text:p>
          </table:table-cell>
          <table:table-cell office:value-type="string" table:style-name="ce1">
            <text:p>Soure</text:p>
          </table:table-cell>
          <table:table-cell office:value-type="string" table:style-name="ce8">
            <text:p>Vinha da Rain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13" table:style-name="ce9">
            <text:p>061513</text:p>
          </table:table-cell>
          <table:table-cell office:value-type="string" table:style-name="ce1">
            <text:p>Soure</text:p>
          </table:table-cell>
          <table:table-cell office:value-type="string" table:style-name="ce8">
            <text:p>União das freguesias de Degracias e Pombal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514" table:style-name="ce9">
            <text:p>061514</text:p>
          </table:table-cell>
          <table:table-cell office:value-type="string" table:style-name="ce1">
            <text:p>Soure</text:p>
          </table:table-cell>
          <table:table-cell office:value-type="string" table:style-name="ce8">
            <text:p>União das freguesias de Gesteira e Brunhó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SOURE PARA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00" table:style-name="ce9">
            <text:p>061600</text:p>
          </table:table-cell>
          <table:table-cell office:value-type="string" table:style-name="ce1">
            <text:p>Tábu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00" table:style-name="ce9">
            <text:p>061600</text:p>
          </table:table-cell>
          <table:table-cell office:value-type="string" table:style-name="ce1">
            <text:p>Tábu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02" table:style-name="ce9">
            <text:p>061602</text:p>
          </table:table-cell>
          <table:table-cell office:value-type="string" table:style-name="ce1">
            <text:p>Tábua</text:p>
          </table:table-cell>
          <table:table-cell office:value-type="string" table:style-name="ce8">
            <text:p>Cand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03" table:style-name="ce9">
            <text:p>061603</text:p>
          </table:table-cell>
          <table:table-cell office:value-type="string" table:style-name="ce1">
            <text:p>Tábua</text:p>
          </table:table-cell>
          <table:table-cell office:value-type="string" table:style-name="ce8">
            <text:p>Carapin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08" table:style-name="ce9">
            <text:p>061608</text:p>
          </table:table-cell>
          <table:table-cell office:value-type="string" table:style-name="ce1">
            <text:p>Tábua</text:p>
          </table:table-cell>
          <table:table-cell office:value-type="string" table:style-name="ce8">
            <text:p>Mid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09" table:style-name="ce9">
            <text:p>061609</text:p>
          </table:table-cell>
          <table:table-cell office:value-type="string" table:style-name="ce1">
            <text:p>Tábua</text:p>
          </table:table-cell>
          <table:table-cell office:value-type="string" table:style-name="ce8">
            <text:p>Mouro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11" table:style-name="ce9">
            <text:p>061611</text:p>
          </table:table-cell>
          <table:table-cell office:value-type="string" table:style-name="ce1">
            <text:p>Tábua</text:p>
          </table:table-cell>
          <table:table-cell office:value-type="string" table:style-name="ce8">
            <text:p>Póvoa de Mid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12" table:style-name="ce9">
            <text:p>061612</text:p>
          </table:table-cell>
          <table:table-cell office:value-type="string" table:style-name="ce1">
            <text:p>Tábua</text:p>
          </table:table-cell>
          <table:table-cell office:value-type="string" table:style-name="ce8">
            <text:p>São João da Boa Vis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14" table:style-name="ce9">
            <text:p>061614</text:p>
          </table:table-cell>
          <table:table-cell office:value-type="string" table:style-name="ce1">
            <text:p>Tábua</text:p>
          </table:table-cell>
          <table:table-cell office:value-type="string" table:style-name="ce8">
            <text:p>Tábu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16" table:style-name="ce9">
            <text:p>061616</text:p>
          </table:table-cell>
          <table:table-cell office:value-type="string" table:style-name="ce1">
            <text:p>Tábua</text:p>
          </table:table-cell>
          <table:table-cell office:value-type="string" table:style-name="ce8">
            <text:p>União das freguesias de Ázere e Cov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17" table:style-name="ce9">
            <text:p>061617</text:p>
          </table:table-cell>
          <table:table-cell office:value-type="string" table:style-name="ce1">
            <text:p>Tábua</text:p>
          </table:table-cell>
          <table:table-cell office:value-type="string" table:style-name="ce8">
            <text:p>União das freguesias de Covas e Vila Nova de Oliveirin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FM - Movimento Independente Unidos Faremos M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18" table:style-name="ce9">
            <text:p>061618</text:p>
          </table:table-cell>
          <table:table-cell office:value-type="string" table:style-name="ce1">
            <text:p>Tábua</text:p>
          </table:table-cell>
          <table:table-cell office:value-type="string" table:style-name="ce8">
            <text:p>União das freguesias de Espariz e Si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61619" table:style-name="ce9">
            <text:p>061619</text:p>
          </table:table-cell>
          <table:table-cell office:value-type="string" table:style-name="ce1">
            <text:p>Tábua</text:p>
          </table:table-cell>
          <table:table-cell office:value-type="string" table:style-name="ce8">
            <text:p>União das freguesias de Pinheiro de Coja e Meda de Mou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TÁBU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100" table:style-name="ce9">
            <text:p>070100</text:p>
          </table:table-cell>
          <table:table-cell office:value-type="string" table:style-name="ce1">
            <text:p>Alandroal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DITA - Defesa da Integridade Territorial e Desenvolvimento de Alandr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100" table:style-name="ce9">
            <text:p>070100</text:p>
          </table:table-cell>
          <table:table-cell office:value-type="string" table:style-name="ce1">
            <text:p>Alandroal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DITA - Defesa da Integridade Territorial e Desenvolvimento de Alandr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103" table:style-name="ce9">
            <text:p>070103</text:p>
          </table:table-cell>
          <table:table-cell office:value-type="string" table:style-name="ce1">
            <text:p>Alandroal</text:p>
          </table:table-cell>
          <table:table-cell office:value-type="string" table:style-name="ce8">
            <text:p>Santiago Maior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DITA - Defesa da Integridade Territorial e Desenvolvimento de Alandr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104" table:style-name="ce9">
            <text:p>070104</text:p>
          </table:table-cell>
          <table:table-cell office:value-type="string" table:style-name="ce1">
            <text:p>Alandroal</text:p>
          </table:table-cell>
          <table:table-cell office:value-type="string" table:style-name="ce8">
            <text:p>Capelins (Santo Antóni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DITA - Defesa da Integridade Territorial e Desenvolvimento de Alandr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105" table:style-name="ce9">
            <text:p>070105</text:p>
          </table:table-cell>
          <table:table-cell office:value-type="string" table:style-name="ce1">
            <text:p>Alandroal</text:p>
          </table:table-cell>
          <table:table-cell office:value-type="string" table:style-name="ce8">
            <text:p>Terena (São Pedr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DITA - Defesa da Integridade Territorial e Desenvolvimento de Alandr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107" table:style-name="ce9">
            <text:p>070107</text:p>
          </table:table-cell>
          <table:table-cell office:value-type="string" table:style-name="ce1">
            <text:p>Alandroal</text:p>
          </table:table-cell>
          <table:table-cell office:value-type="string" table:style-name="ce8">
            <text:p>União das freguesias de Alandroal (Nossa Senhora da Conceição), São Brás dos Matos (Mina do Bugalho) e Juromenha (Nossa Senhora do Loret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DITA - Defesa da Integridade Territorial e Desenvolvimento de Alandr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300" table:style-name="ce9">
            <text:p>070300</text:p>
          </table:table-cell>
          <table:table-cell office:value-type="string" table:style-name="ce1">
            <text:p>Borb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UB - Movimento Unidos por Borb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300" table:style-name="ce9">
            <text:p>070300</text:p>
          </table:table-cell>
          <table:table-cell office:value-type="string" table:style-name="ce1">
            <text:p>Borb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UB - Movimento Unidos por Borb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301" table:style-name="ce9">
            <text:p>070301</text:p>
          </table:table-cell>
          <table:table-cell office:value-type="string" table:style-name="ce1">
            <text:p>Borba</text:p>
          </table:table-cell>
          <table:table-cell office:value-type="string" table:style-name="ce8">
            <text:p>Borba (Matriz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UB - Movimento Unidos por Borb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302" table:style-name="ce9">
            <text:p>070302</text:p>
          </table:table-cell>
          <table:table-cell office:value-type="string" table:style-name="ce1">
            <text:p>Borba</text:p>
          </table:table-cell>
          <table:table-cell office:value-type="string" table:style-name="ce8">
            <text:p>Ora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UB - Movimento Unidos por Borb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303" table:style-name="ce9">
            <text:p>070303</text:p>
          </table:table-cell>
          <table:table-cell office:value-type="string" table:style-name="ce1">
            <text:p>Borba</text:p>
          </table:table-cell>
          <table:table-cell office:value-type="string" table:style-name="ce8">
            <text:p>Rio de Moinh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UB - Movimento Unidos por Borb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304" table:style-name="ce9">
            <text:p>070304</text:p>
          </table:table-cell>
          <table:table-cell office:value-type="string" table:style-name="ce1">
            <text:p>Borba</text:p>
          </table:table-cell>
          <table:table-cell office:value-type="string" table:style-name="ce8">
            <text:p>Borba (São Bartolomeu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UB - Movimento Unidos por Borb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400" table:style-name="ce9">
            <text:p>070400</text:p>
          </table:table-cell>
          <table:table-cell office:value-type="string" table:style-name="ce1">
            <text:p>Estremoz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IETZ - Movimento Independente Por Estremo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400" table:style-name="ce9">
            <text:p>070400</text:p>
          </table:table-cell>
          <table:table-cell office:value-type="string" table:style-name="ce1">
            <text:p>Estremoz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IETZ - Movimento Independente Por Estremo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401" table:style-name="ce9">
            <text:p>070401</text:p>
          </table:table-cell>
          <table:table-cell office:value-type="string" table:style-name="ce1">
            <text:p>Estremoz</text:p>
          </table:table-cell>
          <table:table-cell office:value-type="string" table:style-name="ce8">
            <text:p>Arc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PA - Mais Independência Por Arc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414" table:style-name="ce9">
            <text:p>070414</text:p>
          </table:table-cell>
          <table:table-cell office:value-type="string" table:style-name="ce1">
            <text:p>Estremoz</text:p>
          </table:table-cell>
          <table:table-cell office:value-type="string" table:style-name="ce8">
            <text:p>União das freguesias de Estremoz (Santa Maria e Santo André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ETZ - Movimento Independente Por Estremo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415" table:style-name="ce9">
            <text:p>070415</text:p>
          </table:table-cell>
          <table:table-cell office:value-type="string" table:style-name="ce1">
            <text:p>Estremoz</text:p>
          </table:table-cell>
          <table:table-cell office:value-type="string" table:style-name="ce8">
            <text:p>União das freguesias de São Bento do Cortiço e Santo Estêv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ETZ - Movimento Independente Por Estremo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416" table:style-name="ce9">
            <text:p>070416</text:p>
          </table:table-cell>
          <table:table-cell office:value-type="string" table:style-name="ce1">
            <text:p>Estremoz</text:p>
          </table:table-cell>
          <table:table-cell office:value-type="string" table:style-name="ce8">
            <text:p>União das freguesias de São Lourenço de Mamporcão e São Bento de Ana Lou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ETZ - Movimento Independente Por Estremo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417" table:style-name="ce9">
            <text:p>070417</text:p>
          </table:table-cell>
          <table:table-cell office:value-type="string" table:style-name="ce1">
            <text:p>Estremoz</text:p>
          </table:table-cell>
          <table:table-cell office:value-type="string" table:style-name="ce8">
            <text:p>União das freguesias do Ameixial (Santa Vitória e São Bent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ETZ - Movimento Independente Por Estremo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00" table:style-name="ce9">
            <text:p>070500</text:p>
          </table:table-cell>
          <table:table-cell office:value-type="string" table:style-name="ce1">
            <text:p>Évo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00" table:style-name="ce9">
            <text:p>070500</text:p>
          </table:table-cell>
          <table:table-cell office:value-type="string" table:style-name="ce1">
            <text:p>Évo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02" table:style-name="ce9">
            <text:p>070502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Nossa Senhora da Graça do Divo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03" table:style-name="ce9">
            <text:p>070503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Nossa Senhora de Mache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06" table:style-name="ce9">
            <text:p>070506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São Bento do Ma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09" table:style-name="ce9">
            <text:p>070509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São Miguel de Mache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13" table:style-name="ce9">
            <text:p>070513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Torre de Coelhei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15" table:style-name="ce9">
            <text:p>070515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Canavi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22" table:style-name="ce9">
            <text:p>070522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União das freguesias de Bacelo e Senhora da Saú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23" table:style-name="ce9">
            <text:p>070523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União das freguesias de Évora (São Mamede, Sé, São Pedro e Santo Ant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24" table:style-name="ce9">
            <text:p>070524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União das freguesias de Malagueira e Horta das Figueir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25" table:style-name="ce9">
            <text:p>070525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União das freguesias de Nossa Senhora da Tourega e Nossa Senhora de Guadalup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26" table:style-name="ce9">
            <text:p>070526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União das freguesias de São Manços e São Vicente do Pig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527" table:style-name="ce9">
            <text:p>070527</text:p>
          </table:table-cell>
          <table:table-cell office:value-type="string" table:style-name="ce1">
            <text:p>Évora</text:p>
          </table:table-cell>
          <table:table-cell office:value-type="string" table:style-name="ce8">
            <text:p>União das freguesias de São Sebastião da Giesteira e Nossa Senhora da Boa Fé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ÉVORA PRIMEI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700" table:style-name="ce9">
            <text:p>070700</text:p>
          </table:table-cell>
          <table:table-cell office:value-type="string" table:style-name="ce1">
            <text:p>Mo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OR MO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700" table:style-name="ce9">
            <text:p>070700</text:p>
          </table:table-cell>
          <table:table-cell office:value-type="string" table:style-name="ce1">
            <text:p>Mo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OR MO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701" table:style-name="ce9">
            <text:p>070701</text:p>
          </table:table-cell>
          <table:table-cell office:value-type="string" table:style-name="ce1">
            <text:p>Mora</text:p>
          </table:table-cell>
          <table:table-cell office:value-type="string" table:style-name="ce8">
            <text:p>Brot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B.C.F. - Brotas Com Fut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704" table:style-name="ce9">
            <text:p>070704</text:p>
          </table:table-cell>
          <table:table-cell office:value-type="string" table:style-name="ce1">
            <text:p>Mora</text:p>
          </table:table-cell>
          <table:table-cell office:value-type="string" table:style-name="ce8">
            <text:p>Pav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MO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800" table:style-name="ce9">
            <text:p>070800</text:p>
          </table:table-cell>
          <table:table-cell office:value-type="string" table:style-name="ce1">
            <text:p>Mourã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RUMO À MUDANÇA NO CONCELHO DE MOUR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800" table:style-name="ce9">
            <text:p>070800</text:p>
          </table:table-cell>
          <table:table-cell office:value-type="string" table:style-name="ce1">
            <text:p>Mourã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RUMO À MUDANÇA NO CONCELHO DE MOUR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801" table:style-name="ce9">
            <text:p>070801</text:p>
          </table:table-cell>
          <table:table-cell office:value-type="string" table:style-name="ce1">
            <text:p>Mourão</text:p>
          </table:table-cell>
          <table:table-cell office:value-type="string" table:style-name="ce8">
            <text:p>Granj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 - A Granja Merece M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802" table:style-name="ce9">
            <text:p>070802</text:p>
          </table:table-cell>
          <table:table-cell office:value-type="string" table:style-name="ce1">
            <text:p>Mourão</text:p>
          </table:table-cell>
          <table:table-cell office:value-type="string" table:style-name="ce8">
            <text:p>Lu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RUMO À MUDANÇA NO CONCELHO DE MOUR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803" table:style-name="ce9">
            <text:p>070803</text:p>
          </table:table-cell>
          <table:table-cell office:value-type="string" table:style-name="ce1">
            <text:p>Mourão</text:p>
          </table:table-cell>
          <table:table-cell office:value-type="string" table:style-name="ce8">
            <text:p>Mour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RUMO À MUDANÇA NO CONCELHO DE MOUR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0900" table:style-name="ce9">
            <text:p>070900</text:p>
          </table:table-cell>
          <table:table-cell office:value-type="string" table:style-name="ce1">
            <text:p>Portel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PPD/PSD - DESENVOLVER PORTEL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000" table:style-name="ce9">
            <text:p>071000</text:p>
          </table:table-cell>
          <table:table-cell office:value-type="string" table:style-name="ce1">
            <text:p>Redond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PPD/PSD - REDONDO SEMPRE]</text:p>
          </table:table-cell>
          <table:table-cell table:style-name="ce1"/>
          <table:table-cell office:value-type="string" table:style-name="ce8">
            <text:p>[MICRE - MOVIMENTO INDEPENDENTE DO CONCELHO DE REDON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000" table:style-name="ce9">
            <text:p>071000</text:p>
          </table:table-cell>
          <table:table-cell office:value-type="string" table:style-name="ce1">
            <text:p>Redond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PPD/PSD - REDONDO SEMPRE]</text:p>
          </table:table-cell>
          <table:table-cell table:style-name="ce1"/>
          <table:table-cell office:value-type="string" table:style-name="ce8">
            <text:p>[MICRE - MOVIMENTO INDEPENDENTE DO CONCELHO DE REDON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001" table:style-name="ce9">
            <text:p>071001</text:p>
          </table:table-cell>
          <table:table-cell office:value-type="string" table:style-name="ce1">
            <text:p>Redondo</text:p>
          </table:table-cell>
          <table:table-cell office:value-type="string" table:style-name="ce8">
            <text:p>Montoi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CRE - MOVIMENTO INDEPENDENTE DO CONCELHO DE REDON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002" table:style-name="ce9">
            <text:p>071002</text:p>
          </table:table-cell>
          <table:table-cell office:value-type="string" table:style-name="ce1">
            <text:p>Redondo</text:p>
          </table:table-cell>
          <table:table-cell office:value-type="string" table:style-name="ce8">
            <text:p>Redon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REDONDO SEMPRE]</text:p>
          </table:table-cell>
          <table:table-cell table:style-name="ce1"/>
          <table:table-cell office:value-type="string" table:style-name="ce8">
            <text:p>[MICRE - MOVIMENTO INDEPENDENTE DO CONCELHO DE REDON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100" table:style-name="ce9">
            <text:p>071100</text:p>
          </table:table-cell>
          <table:table-cell office:value-type="string" table:style-name="ce1">
            <text:p>Reguengos de Monsaraz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OR REGUENG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100" table:style-name="ce9">
            <text:p>071100</text:p>
          </table:table-cell>
          <table:table-cell office:value-type="string" table:style-name="ce1">
            <text:p>Reguengos de Monsaraz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OR REGUENG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102" table:style-name="ce9">
            <text:p>071102</text:p>
          </table:table-cell>
          <table:table-cell office:value-type="string" table:style-name="ce1">
            <text:p>Reguengos de Monsaraz</text:p>
          </table:table-cell>
          <table:table-cell office:value-type="string" table:style-name="ce8">
            <text:p>Corv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C - Movimento Independente Freguesia de Corv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103" table:style-name="ce9">
            <text:p>071103</text:p>
          </table:table-cell>
          <table:table-cell office:value-type="string" table:style-name="ce1">
            <text:p>Reguengos de Monsaraz</text:p>
          </table:table-cell>
          <table:table-cell office:value-type="string" table:style-name="ce8">
            <text:p>Monsara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REGUENG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104" table:style-name="ce9">
            <text:p>071104</text:p>
          </table:table-cell>
          <table:table-cell office:value-type="string" table:style-name="ce1">
            <text:p>Reguengos de Monsaraz</text:p>
          </table:table-cell>
          <table:table-cell office:value-type="string" table:style-name="ce8">
            <text:p>Reguengos de Monsara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REGUENG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106" table:style-name="ce9">
            <text:p>071106</text:p>
          </table:table-cell>
          <table:table-cell office:value-type="string" table:style-name="ce1">
            <text:p>Reguengos de Monsaraz</text:p>
          </table:table-cell>
          <table:table-cell office:value-type="string" table:style-name="ce8">
            <text:p>União das freguesias de Campo e Camp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REGUENG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400" table:style-name="ce9">
            <text:p>071400</text:p>
          </table:table-cell>
          <table:table-cell office:value-type="string" table:style-name="ce1">
            <text:p>Vila Viços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UMA CERTEZA, VILA VIÇOSA]</text:p>
          </table:table-cell>
          <table:table-cell table:style-name="ce1"/>
          <table:table-cell office:value-type="string" table:style-name="ce8">
            <text:p>[MUC - Movimento de Unidade dos Cidadãos do Concelho de Vila Viçosa]</text:p>
          </table:table-cell>
          <table:table-cell office:value-type="string" table:style-name="ce8">
            <text:p>[CIEMO - Cidadãos em moviment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400" table:style-name="ce9">
            <text:p>071400</text:p>
          </table:table-cell>
          <table:table-cell office:value-type="string" table:style-name="ce1">
            <text:p>Vila Viços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UMA CERTEZA, VILA VIÇOSA]</text:p>
          </table:table-cell>
          <table:table-cell table:style-name="ce1"/>
          <table:table-cell office:value-type="string" table:style-name="ce8">
            <text:p>[MUC - Movimento de Unidade dos Cidadãos do Concelho de Vila Viçosa]</text:p>
          </table:table-cell>
          <table:table-cell office:value-type="string" table:style-name="ce8">
            <text:p>[CIEMO - Cidadãos em moviment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401" table:style-name="ce9">
            <text:p>071401</text:p>
          </table:table-cell>
          <table:table-cell office:value-type="string" table:style-name="ce1">
            <text:p>Vila Viçosa</text:p>
          </table:table-cell>
          <table:table-cell office:value-type="string" table:style-name="ce8">
            <text:p>Bencate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MA CERTEZA, VILA VIÇOSA]</text:p>
          </table:table-cell>
          <table:table-cell table:style-name="ce1"/>
          <table:table-cell office:value-type="string" table:style-name="ce8">
            <text:p>[MUC - Movimento de Unidade dos Cidadãos do Concelho de Vila Viçosa]</text:p>
          </table:table-cell>
          <table:table-cell office:value-type="string" table:style-name="ce8">
            <text:p>[CIEMO - Cidadãos em moviment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402" table:style-name="ce9">
            <text:p>071402</text:p>
          </table:table-cell>
          <table:table-cell office:value-type="string" table:style-name="ce1">
            <text:p>Vila Viçosa</text:p>
          </table:table-cell>
          <table:table-cell office:value-type="string" table:style-name="ce8">
            <text:p>Cilad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MA CERTEZA, VILA VIÇOSA]</text:p>
          </table:table-cell>
          <table:table-cell table:style-name="ce1"/>
          <table:table-cell office:value-type="string" table:style-name="ce8">
            <text:p>[MUC - Movimento de Unidade dos Cidadãos do Concelho de Vila Viçosa]</text:p>
          </table:table-cell>
          <table:table-cell office:value-type="string" table:style-name="ce8">
            <text:p>[CIEMO - Cidadãos em moviment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404" table:style-name="ce9">
            <text:p>071404</text:p>
          </table:table-cell>
          <table:table-cell office:value-type="string" table:style-name="ce1">
            <text:p>Vila Viçosa</text:p>
          </table:table-cell>
          <table:table-cell office:value-type="string" table:style-name="ce8">
            <text:p>Pard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MA CERTEZA, VILA VIÇOSA]</text:p>
          </table:table-cell>
          <table:table-cell table:style-name="ce1"/>
          <table:table-cell office:value-type="string" table:style-name="ce8">
            <text:p>[MUC - Movimento de Unidade dos Cidadãos do Concelho de Vila Viçosa]</text:p>
          </table:table-cell>
          <table:table-cell office:value-type="string" table:style-name="ce8">
            <text:p>[CIEMO - Cidadãos em moviment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71406" table:style-name="ce9">
            <text:p>071406</text:p>
          </table:table-cell>
          <table:table-cell office:value-type="string" table:style-name="ce1">
            <text:p>Vila Viçosa</text:p>
          </table:table-cell>
          <table:table-cell office:value-type="string" table:style-name="ce8">
            <text:p>Nossa Senhora da Conceição e São Bartolomeu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MA CERTEZA, VILA VIÇOSA]</text:p>
          </table:table-cell>
          <table:table-cell table:style-name="ce1"/>
          <table:table-cell office:value-type="string" table:style-name="ce8">
            <text:p>[MUC - Movimento de Unidade dos Cidadãos do Concelho de Vila Viçosa]</text:p>
          </table:table-cell>
          <table:table-cell office:value-type="string" table:style-name="ce8">
            <text:p>[CIEMO - Cidadãos em moviment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0100" table:style-name="ce9">
            <text:p>080100</text:p>
          </table:table-cell>
          <table:table-cell office:value-type="string" table:style-name="ce1">
            <text:p>Albufei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MPT.PPM - Albufeira Merece Melhor]</text:p>
          </table:table-cell>
          <table:table-cell table:style-name="ce1"/>
          <table:table-cell office:value-type="string" table:style-name="ce8">
            <text:p>[V.I.V.A. - Vontade Independente Viver Albufeira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80100" table:style-name="ce9">
            <text:p>080100</text:p>
          </table:table-cell>
          <table:table-cell office:value-type="string" table:style-name="ce1">
            <text:p>Albufei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MPT.PPM - Albufeira Merece Melhor]</text:p>
          </table:table-cell>
          <table:table-cell table:style-name="ce1"/>
          <table:table-cell office:value-type="string" table:style-name="ce8">
            <text:p>[V.I.V.A. - Vontade Independente Viver Albuf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0102" table:style-name="ce9">
            <text:p>080102</text:p>
          </table:table-cell>
          <table:table-cell office:value-type="string" table:style-name="ce1">
            <text:p>Albufeira</text:p>
          </table:table-cell>
          <table:table-cell office:value-type="string" table:style-name="ce8">
            <text:p>Gu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Albufeira Merece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0103" table:style-name="ce9">
            <text:p>080103</text:p>
          </table:table-cell>
          <table:table-cell office:value-type="string" table:style-name="ce1">
            <text:p>Albufeira</text:p>
          </table:table-cell>
          <table:table-cell office:value-type="string" table:style-name="ce8">
            <text:p>Padern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Albufeira Merece Melhor]</text:p>
          </table:table-cell>
          <table:table-cell table:style-name="ce1"/>
          <table:table-cell office:value-type="string" table:style-name="ce8">
            <text:p>[M.I.P. - Movimento Independente de Padern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0104" table:style-name="ce9">
            <text:p>080104</text:p>
          </table:table-cell>
          <table:table-cell office:value-type="string" table:style-name="ce1">
            <text:p>Albufeira</text:p>
          </table:table-cell>
          <table:table-cell office:value-type="string" table:style-name="ce8">
            <text:p>Ferreir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Albufeira Merece Melhor]</text:p>
          </table:table-cell>
          <table:table-cell table:style-name="ce1"/>
          <table:table-cell office:value-type="string" table:style-name="ce8">
            <text:p>[V.I.V.A. - Vontade Independente Viver Albuf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0106" table:style-name="ce9">
            <text:p>080106</text:p>
          </table:table-cell>
          <table:table-cell office:value-type="string" table:style-name="ce1">
            <text:p>Albufeira</text:p>
          </table:table-cell>
          <table:table-cell office:value-type="string" table:style-name="ce8">
            <text:p>Albufeira e Olhos de Águ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Albufeira Merece Melhor]</text:p>
          </table:table-cell>
          <table:table-cell table:style-name="ce1"/>
          <table:table-cell office:value-type="string" table:style-name="ce10">
            <text:p>[V.I.V.A. - Vontade Independente Viver Albufeira]</text:p>
          </table:table-cell>
          <table:table-cell office:value-type="string" table:style-name="ce8">
            <text:p>[M.I.M.A. - Movimento Independente Mobilizar Albufeira]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500" table:style-name="ce9">
            <text:p>080500</text:p>
          </table:table-cell>
          <table:table-cell office:value-type="string" table:style-name="ce1">
            <text:p>Far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MPT.PPM - JUNTOS POR FARO]</text:p>
          </table:table-cell>
          <table:table-cell table:style-name="ce1"/>
          <table:table-cell office:value-type="string" table:style-name="ce8">
            <text:p>[CFC-SF - VITORINO - SALVAR FARO, COM CORAÇÃO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500" table:style-name="ce9">
            <text:p>080500</text:p>
          </table:table-cell>
          <table:table-cell office:value-type="string" table:style-name="ce1">
            <text:p>Far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MPT.PPM - JUNTOS POR FARO]</text:p>
          </table:table-cell>
          <table:table-cell table:style-name="ce1"/>
          <table:table-cell office:value-type="string" table:style-name="ce8">
            <text:p>[CFC-SF - VITORINO - SALVAR FARO, COM COR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503" table:style-name="ce9">
            <text:p>080503</text:p>
          </table:table-cell>
          <table:table-cell office:value-type="string" table:style-name="ce1">
            <text:p>Faro</text:p>
          </table:table-cell>
          <table:table-cell office:value-type="string" table:style-name="ce8">
            <text:p>Santa Bárbara de Nex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JUNTOS POR FARO]</text:p>
          </table:table-cell>
          <table:table-cell table:style-name="ce1"/>
          <table:table-cell office:value-type="string" table:style-name="ce8">
            <text:p>[CFC-SFn - VITORINO - SALVAR NEXE, COM COR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506" table:style-name="ce9">
            <text:p>080506</text:p>
          </table:table-cell>
          <table:table-cell office:value-type="string" table:style-name="ce1">
            <text:p>Faro</text:p>
          </table:table-cell>
          <table:table-cell office:value-type="string" table:style-name="ce8">
            <text:p>Monteneg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JUNTOS POR FARO]</text:p>
          </table:table-cell>
          <table:table-cell table:style-name="ce1"/>
          <table:table-cell office:value-type="string" table:style-name="ce8">
            <text:p>[CFC-SFm - VITORINO - SALVAR MONTENEGRO, COM COR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507" table:style-name="ce9">
            <text:p>080507</text:p>
          </table:table-cell>
          <table:table-cell office:value-type="string" table:style-name="ce1">
            <text:p>Faro</text:p>
          </table:table-cell>
          <table:table-cell office:value-type="string" table:style-name="ce8">
            <text:p>União das freguesias de Conceição e Estoi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JUNTOS POR FARO]</text:p>
          </table:table-cell>
          <table:table-cell table:style-name="ce1"/>
          <table:table-cell office:value-type="string" table:style-name="ce8">
            <text:p>[CFC-SFce - VITORINO - SALVAR CONCEIÇÃO e ESTOI, COR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508" table:style-name="ce9">
            <text:p>080508</text:p>
          </table:table-cell>
          <table:table-cell office:value-type="string" table:style-name="ce1">
            <text:p>Faro</text:p>
          </table:table-cell>
          <table:table-cell office:value-type="string" table:style-name="ce8">
            <text:p>União das freguesias de Faro (Sé e São Pedr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JUNTOS POR FARO]</text:p>
          </table:table-cell>
          <table:table-cell table:style-name="ce1"/>
          <table:table-cell office:value-type="string" table:style-name="ce8">
            <text:p>[CFC-SFt - VITORINO - SALVAR SÉ e S. PEDRO, COR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700" table:style-name="ce9">
            <text:p>080700</text:p>
          </table:table-cell>
          <table:table-cell office:value-type="string" table:style-name="ce1">
            <text:p>Lago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MPT - TODOS SOMOS LAGOS]</text:p>
          </table:table-cell>
          <table:table-cell office:value-type="string" table:style-name="ce1">
            <text:p>[PPM/PPV/PND - PLATAFORMA DE CIDADANIA LAGOS]</text:p>
          </table:table-cell>
          <table:table-cell office:value-type="string" table:style-name="ce8">
            <text:p>[lcfcipl - Lagos com Futuro - Cidadãos Independentes por Lag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0700" table:style-name="ce9">
            <text:p>080700</text:p>
          </table:table-cell>
          <table:table-cell office:value-type="string" table:style-name="ce1">
            <text:p>Lago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MPT - TODOS SOMOS LAGOS]</text:p>
          </table:table-cell>
          <table:table-cell office:value-type="string" table:style-name="ce1">
            <text:p>[PPM/PPV/PND - PLATAFORMA DE CIDADANIA LAGOS]</text:p>
          </table:table-cell>
          <table:table-cell office:value-type="string" table:style-name="ce8">
            <text:p>[lcfcipl - Lagos com Futuro - Cidadãos Independentes por Lag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703" table:style-name="ce9">
            <text:p>080703</text:p>
          </table:table-cell>
          <table:table-cell office:value-type="string" table:style-name="ce1">
            <text:p>Lagos</text:p>
          </table:table-cell>
          <table:table-cell office:value-type="string" table:style-name="ce8">
            <text:p>Lu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 - TODOS SOMOS LAGOS]</text:p>
          </table:table-cell>
          <table:table-cell office:value-type="string" table:style-name="ce1">
            <text:p>[PPM/PPV/PND - PLATAFORMA DE CIDADANIA LAGOS]</text:p>
          </table:table-cell>
          <table:table-cell office:value-type="string" table:style-name="ce8">
            <text:p>[lcfcipl - Lagos com Futuro - Cidadãos Independentes por Lag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704" table:style-name="ce9">
            <text:p>080704</text:p>
          </table:table-cell>
          <table:table-cell office:value-type="string" table:style-name="ce1">
            <text:p>Lagos</text:p>
          </table:table-cell>
          <table:table-cell office:value-type="string" table:style-name="ce8">
            <text:p>Odiáxer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 - TODOS SOMOS LAGOS]</text:p>
          </table:table-cell>
          <table:table-cell table:style-name="ce1"/>
          <table:table-cell office:value-type="string" table:style-name="ce8">
            <text:p>[lcfcipl - Lagos com Futuro - Cidadãos Independentes por Lag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707" table:style-name="ce9">
            <text:p>080707</text:p>
          </table:table-cell>
          <table:table-cell office:value-type="string" table:style-name="ce1">
            <text:p>Lagos</text:p>
          </table:table-cell>
          <table:table-cell office:value-type="string" table:style-name="ce8">
            <text:p>União das freguesias de Bensafrim e Barão de São Jo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 - TODOS SOMOS LAGOS]</text:p>
          </table:table-cell>
          <table:table-cell table:style-name="ce1"/>
          <table:table-cell office:value-type="string" table:style-name="ce8">
            <text:p>[lcfcipl - Lagos com Futuro - Cidadãos Independentes por Lag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0708" table:style-name="ce9">
            <text:p>080708</text:p>
          </table:table-cell>
          <table:table-cell office:value-type="string" table:style-name="ce1">
            <text:p>Lagos</text:p>
          </table:table-cell>
          <table:table-cell office:value-type="string" table:style-name="ce8">
            <text:p>União das freguesias de Lagos (São Sebastião e Santa Mari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 - TODOS SOMOS LAGOS]</text:p>
          </table:table-cell>
          <table:table-cell office:value-type="string" table:style-name="ce1">
            <text:p>[PPM/PPV/PND - PLATAFORMA DE CIDADANIA LAGOS]</text:p>
          </table:table-cell>
          <table:table-cell office:value-type="string" table:style-name="ce8">
            <text:p>[lcfcipl - Lagos com Futuro - Cidadãos Independentes por Lag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800" table:style-name="ce9">
            <text:p>080800</text:p>
          </table:table-cell>
          <table:table-cell office:value-type="string" table:style-name="ce1">
            <text:p>Loulé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ICA - Movimento de Intervenção e Cidadania Ativ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805" table:style-name="ce9">
            <text:p>080805</text:p>
          </table:table-cell>
          <table:table-cell office:value-type="string" table:style-name="ce1">
            <text:p>Loulé</text:p>
          </table:table-cell>
          <table:table-cell office:value-type="string" table:style-name="ce8">
            <text:p>Quart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CA - Movimento de Intervenção e Cidadania Ativ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812" table:style-name="ce9">
            <text:p>080812</text:p>
          </table:table-cell>
          <table:table-cell office:value-type="string" table:style-name="ce1">
            <text:p>Loulé</text:p>
          </table:table-cell>
          <table:table-cell office:value-type="string" table:style-name="ce8">
            <text:p>União de freguesias de Querença, Tôr e Benafim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cepb - Grupo de Cidadãos Eleitores por Benafim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80900" table:style-name="ce9">
            <text:p>080900</text:p>
          </table:table-cell>
          <table:table-cell office:value-type="string" table:style-name="ce1">
            <text:p>Monchique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I - Monchique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0900" table:style-name="ce9">
            <text:p>080900</text:p>
          </table:table-cell>
          <table:table-cell office:value-type="string" table:style-name="ce1">
            <text:p>Monchique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I - Monchique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0903" table:style-name="ce9">
            <text:p>080903</text:p>
          </table:table-cell>
          <table:table-cell office:value-type="string" table:style-name="ce1">
            <text:p>Monchique</text:p>
          </table:table-cell>
          <table:table-cell office:value-type="string" table:style-name="ce8">
            <text:p>Monchiqu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 - Monchique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000" table:style-name="ce9">
            <text:p>081000</text:p>
          </table:table-cell>
          <table:table-cell office:value-type="string" table:style-name="ce1">
            <text:p>Olhão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nrgce - Novo Rumo - Grupo de Cidadãoes Eleito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000" table:style-name="ce9">
            <text:p>081000</text:p>
          </table:table-cell>
          <table:table-cell office:value-type="string" table:style-name="ce1">
            <text:p>Olhão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nrgce - Novo Rumo - Grupo de Cidadãoes Eleito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003" table:style-name="ce9">
            <text:p>081003</text:p>
          </table:table-cell>
          <table:table-cell office:value-type="string" table:style-name="ce1">
            <text:p>Olhão</text:p>
          </table:table-cell>
          <table:table-cell office:value-type="string" table:style-name="ce8">
            <text:p>Olh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rgce - Novo Rumo - Grupo de Cidadãoes Eleito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004" table:style-name="ce9">
            <text:p>081004</text:p>
          </table:table-cell>
          <table:table-cell office:value-type="string" table:style-name="ce1">
            <text:p>Olhão</text:p>
          </table:table-cell>
          <table:table-cell office:value-type="string" table:style-name="ce8">
            <text:p>Pech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rgce - Novo Rumo - Grupo de Cidadãoes Eleito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005" table:style-name="ce9">
            <text:p>081005</text:p>
          </table:table-cell>
          <table:table-cell office:value-type="string" table:style-name="ce1">
            <text:p>Olhão</text:p>
          </table:table-cell>
          <table:table-cell office:value-type="string" table:style-name="ce8">
            <text:p>Quelf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rgce - Novo Rumo - Grupo de Cidadãoes Eleito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006" table:style-name="ce9">
            <text:p>081006</text:p>
          </table:table-cell>
          <table:table-cell office:value-type="string" table:style-name="ce1">
            <text:p>Olhão</text:p>
          </table:table-cell>
          <table:table-cell office:value-type="string" table:style-name="ce8">
            <text:p>União das freguesias de Moncarapacho e Fuse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rgce - Novo Rumo - Grupo de Cidadãoes Eleito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100" table:style-name="ce9">
            <text:p>081100</text:p>
          </table:table-cell>
          <table:table-cell office:value-type="string" table:style-name="ce1">
            <text:p>Portimã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MPT.PPM - Servir Portim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100" table:style-name="ce9">
            <text:p>081100</text:p>
          </table:table-cell>
          <table:table-cell office:value-type="string" table:style-name="ce1">
            <text:p>Portimã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MPT.PPM - Servir Portim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101" table:style-name="ce9">
            <text:p>081101</text:p>
          </table:table-cell>
          <table:table-cell office:value-type="string" table:style-name="ce1">
            <text:p>Portimão</text:p>
          </table:table-cell>
          <table:table-cell office:value-type="string" table:style-name="ce8">
            <text:p>Alvo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ervir Portim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102" table:style-name="ce9">
            <text:p>081102</text:p>
          </table:table-cell>
          <table:table-cell office:value-type="string" table:style-name="ce1">
            <text:p>Portimão</text:p>
          </table:table-cell>
          <table:table-cell office:value-type="string" table:style-name="ce8">
            <text:p>Mexilhoeira Gra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ervir Portim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103" table:style-name="ce9">
            <text:p>081103</text:p>
          </table:table-cell>
          <table:table-cell office:value-type="string" table:style-name="ce1">
            <text:p>Portimão</text:p>
          </table:table-cell>
          <table:table-cell office:value-type="string" table:style-name="ce8">
            <text:p>Portim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ervir Portim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309" table:style-name="ce9">
            <text:p>081309</text:p>
          </table:table-cell>
          <table:table-cell office:value-type="string" table:style-name="ce1">
            <text:p>Silves</text:p>
          </table:table-cell>
          <table:table-cell office:value-type="string" table:style-name="ce8">
            <text:p>União das freguesias de Alcantarilha e Pê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 -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400" table:style-name="ce9">
            <text:p>081400</text:p>
          </table:table-cell>
          <table:table-cell office:value-type="string" table:style-name="ce1">
            <text:p>Tavi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MPT.PPM - MOVIMENTO POR TAV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400" table:style-name="ce9">
            <text:p>081400</text:p>
          </table:table-cell>
          <table:table-cell office:value-type="string" table:style-name="ce1">
            <text:p>Tavi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MPT.PPM - MOVIMENTO POR TAV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401" table:style-name="ce9">
            <text:p>081401</text:p>
          </table:table-cell>
          <table:table-cell office:value-type="string" table:style-name="ce1">
            <text:p>Tavira</text:p>
          </table:table-cell>
          <table:table-cell office:value-type="string" table:style-name="ce8">
            <text:p>Cachop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MOVIMENTO POR TAV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404" table:style-name="ce9">
            <text:p>081404</text:p>
          </table:table-cell>
          <table:table-cell office:value-type="string" table:style-name="ce1">
            <text:p>Tavira</text:p>
          </table:table-cell>
          <table:table-cell office:value-type="string" table:style-name="ce8">
            <text:p>Santa Catarina da Fonte do Bisp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MOVIMENTO POR TAVIRA]</text:p>
          </table:table-cell>
          <table:table-cell table:style-name="ce1"/>
          <table:table-cell office:value-type="string" table:style-name="ce10">
            <text:p>[upscci - Unidos Por Santa Catarina - Cidadãos Independentes]</text:p>
          </table:table-cell>
          <table:table-cell office:value-type="string" table:style-name="ce8">
            <text:p>[S.C.E.P. - Santa Catarina É Possível - Cidadãos Independent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408" table:style-name="ce9">
            <text:p>081408</text:p>
          </table:table-cell>
          <table:table-cell office:value-type="string" table:style-name="ce1">
            <text:p>Tavira</text:p>
          </table:table-cell>
          <table:table-cell office:value-type="string" table:style-name="ce8">
            <text:p>Santa Luz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.L.I. - Santa Luzia Independente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81410" table:style-name="ce9">
            <text:p>081410</text:p>
          </table:table-cell>
          <table:table-cell office:value-type="string" table:style-name="ce1">
            <text:p>Tavira</text:p>
          </table:table-cell>
          <table:table-cell office:value-type="string" table:style-name="ce8">
            <text:p>União das freguesias de Conceição e Cabanas de Tav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MOVIMENTO POR TAV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411" table:style-name="ce9">
            <text:p>081411</text:p>
          </table:table-cell>
          <table:table-cell office:value-type="string" table:style-name="ce1">
            <text:p>Tavira</text:p>
          </table:table-cell>
          <table:table-cell office:value-type="string" table:style-name="ce8">
            <text:p>União das freguesias de Luz de Tavira e Santo Estêv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MOVIMENTO POR TAVI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412" table:style-name="ce9">
            <text:p>081412</text:p>
          </table:table-cell>
          <table:table-cell office:value-type="string" table:style-name="ce1">
            <text:p>Tavira</text:p>
          </table:table-cell>
          <table:table-cell office:value-type="string" table:style-name="ce8">
            <text:p>União das freguesias de Tavira (Santa Maria e Santiag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MOVIMENTO POR TAVIRA]</text:p>
          </table:table-cell>
          <table:table-cell table:style-name="ce1"/>
          <table:table-cell office:value-type="string" table:style-name="ce8">
            <text:p>[M.T. - M.T. Mais Tavira - Cidadãos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81501" table:style-name="ce9">
            <text:p>081501</text:p>
          </table:table-cell>
          <table:table-cell office:value-type="string" table:style-name="ce1">
            <text:p>Vila do Bispo</text:p>
          </table:table-cell>
          <table:table-cell office:value-type="string" table:style-name="ce8">
            <text:p>Barão de São Migue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UP - Lista Unitária do Progress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00" table:style-name="ce9">
            <text:p>090100</text:p>
          </table:table-cell>
          <table:table-cell office:value-type="string" table:style-name="ce1">
            <text:p>Aguiar da Beir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00" table:style-name="ce9">
            <text:p>090100</text:p>
          </table:table-cell>
          <table:table-cell office:value-type="string" table:style-name="ce1">
            <text:p>Aguiar da Beir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02" table:style-name="ce9">
            <text:p>090102</text:p>
          </table:table-cell>
          <table:table-cell office:value-type="string" table:style-name="ce1">
            <text:p>Aguiar da Beira</text:p>
          </table:table-cell>
          <table:table-cell office:value-type="string" table:style-name="ce8">
            <text:p>Carapi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03" table:style-name="ce9">
            <text:p>090103</text:p>
          </table:table-cell>
          <table:table-cell office:value-type="string" table:style-name="ce1">
            <text:p>Aguiar da Beira</text:p>
          </table:table-cell>
          <table:table-cell office:value-type="string" table:style-name="ce8">
            <text:p>Cortiça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05" table:style-name="ce9">
            <text:p>090105</text:p>
          </table:table-cell>
          <table:table-cell office:value-type="string" table:style-name="ce1">
            <text:p>Aguiar da Beira</text:p>
          </table:table-cell>
          <table:table-cell office:value-type="string" table:style-name="ce8">
            <text:p>Dornel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06" table:style-name="ce9">
            <text:p>090106</text:p>
          </table:table-cell>
          <table:table-cell office:value-type="string" table:style-name="ce1">
            <text:p>Aguiar da Beira</text:p>
          </table:table-cell>
          <table:table-cell office:value-type="string" table:style-name="ce8">
            <text:p>Eira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07" table:style-name="ce9">
            <text:p>090107</text:p>
          </table:table-cell>
          <table:table-cell office:value-type="string" table:style-name="ce1">
            <text:p>Aguiar da Beira</text:p>
          </table:table-cell>
          <table:table-cell office:value-type="string" table:style-name="ce8">
            <text:p>Forninh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09" table:style-name="ce9">
            <text:p>090109</text:p>
          </table:table-cell>
          <table:table-cell office:value-type="string" table:style-name="ce1">
            <text:p>Aguiar da Beira</text:p>
          </table:table-cell>
          <table:table-cell office:value-type="string" table:style-name="ce8">
            <text:p>Pena Ver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10" table:style-name="ce9">
            <text:p>090110</text:p>
          </table:table-cell>
          <table:table-cell office:value-type="string" table:style-name="ce1">
            <text:p>Aguiar da Beira</text:p>
          </table:table-cell>
          <table:table-cell office:value-type="string" table:style-name="ce8">
            <text:p>Pinhei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14" table:style-name="ce9">
            <text:p>090114</text:p>
          </table:table-cell>
          <table:table-cell office:value-type="string" table:style-name="ce1">
            <text:p>Aguiar da Beira</text:p>
          </table:table-cell>
          <table:table-cell office:value-type="string" table:style-name="ce8">
            <text:p>União das freguesias de Aguiar da Beira e Coruch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15" table:style-name="ce9">
            <text:p>090115</text:p>
          </table:table-cell>
          <table:table-cell office:value-type="string" table:style-name="ce1">
            <text:p>Aguiar da Beira</text:p>
          </table:table-cell>
          <table:table-cell office:value-type="string" table:style-name="ce8">
            <text:p>União das freguesias de Sequeiros e Gradiz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116" table:style-name="ce9">
            <text:p>090116</text:p>
          </table:table-cell>
          <table:table-cell office:value-type="string" table:style-name="ce1">
            <text:p>Aguiar da Beira</text:p>
          </table:table-cell>
          <table:table-cell office:value-type="string" table:style-name="ce8">
            <text:p>União das freguesias de Souto de Aguiar da Beira e Valver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pnt - Movimento Independente -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200" table:style-name="ce9">
            <text:p>090200</text:p>
          </table:table-cell>
          <table:table-cell office:value-type="string" table:style-name="ce1">
            <text:p>Almeid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OR CAUSAS COMUN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200" table:style-name="ce9">
            <text:p>090200</text:p>
          </table:table-cell>
          <table:table-cell office:value-type="string" table:style-name="ce1">
            <text:p>Almeid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OR CAUSAS COMUN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209" table:style-name="ce9">
            <text:p>090209</text:p>
          </table:table-cell>
          <table:table-cell office:value-type="string" table:style-name="ce1">
            <text:p>Almeida</text:p>
          </table:table-cell>
          <table:table-cell office:value-type="string" table:style-name="ce8">
            <text:p>Freine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f - Juntos Por Freine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210" table:style-name="ce9">
            <text:p>090210</text:p>
          </table:table-cell>
          <table:table-cell office:value-type="string" table:style-name="ce1">
            <text:p>Almeida</text:p>
          </table:table-cell>
          <table:table-cell office:value-type="string" table:style-name="ce8">
            <text:p>Freix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tupf - Todos Unidos Pelo Freix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213" table:style-name="ce9">
            <text:p>090213</text:p>
          </table:table-cell>
          <table:table-cell office:value-type="string" table:style-name="ce1">
            <text:p>Almeida</text:p>
          </table:table-cell>
          <table:table-cell office:value-type="string" table:style-name="ce8">
            <text:p>Malhada Sor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mm - Juntos Porque a Malhada Merec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230" table:style-name="ce9">
            <text:p>090230</text:p>
          </table:table-cell>
          <table:table-cell office:value-type="string" table:style-name="ce1">
            <text:p>Almeida</text:p>
          </table:table-cell>
          <table:table-cell office:value-type="string" table:style-name="ce8">
            <text:p>União das freguesias de Amoreira, Parada e Cabr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 - Movimento Independente da Uni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231" table:style-name="ce9">
            <text:p>090231</text:p>
          </table:table-cell>
          <table:table-cell office:value-type="string" table:style-name="ce1">
            <text:p>Almeida</text:p>
          </table:table-cell>
          <table:table-cell office:value-type="string" table:style-name="ce8">
            <text:p>União das freguesias de Azinhal, Peva e Valver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pdtf - Pelo Progresso das três Freguesi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232" table:style-name="ce9">
            <text:p>090232</text:p>
          </table:table-cell>
          <table:table-cell office:value-type="string" table:style-name="ce1">
            <text:p>Almeida</text:p>
          </table:table-cell>
          <table:table-cell office:value-type="string" table:style-name="ce8">
            <text:p>União das freguesias de Castelo Mendo, Ade, Monteperobolso e Mesquit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faf - União faz a For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235" table:style-name="ce9">
            <text:p>090235</text:p>
          </table:table-cell>
          <table:table-cell office:value-type="string" table:style-name="ce1">
            <text:p>Almeida</text:p>
          </table:table-cell>
          <table:table-cell office:value-type="string" table:style-name="ce8">
            <text:p>União das freguesias de Malpartida e Vale de Coel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fdna - Pelo Futuro das Nossas Aldei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00" table:style-name="ce9">
            <text:p>090300</text:p>
          </table:table-cell>
          <table:table-cell office:value-type="string" table:style-name="ce1">
            <text:p>Celorico da Bei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00" table:style-name="ce9">
            <text:p>090300</text:p>
          </table:table-cell>
          <table:table-cell office:value-type="string" table:style-name="ce1">
            <text:p>Celorico da Bei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02" table:style-name="ce9">
            <text:p>090302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Baraç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04" table:style-name="ce9">
            <text:p>090304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Carrapichan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06" table:style-name="ce9">
            <text:p>090306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Forno Telh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07" table:style-name="ce9">
            <text:p>090307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Lajeosa do Mondeg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08" table:style-name="ce9">
            <text:p>090308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Linha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09" table:style-name="ce9">
            <text:p>090309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Maçal do Ch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10" table:style-name="ce9">
            <text:p>090310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Mesquit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11" table:style-name="ce9">
            <text:p>090311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Minhoc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14" table:style-name="ce9">
            <text:p>090314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Rato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18" table:style-name="ce9">
            <text:p>090318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Vale de Aza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22" table:style-name="ce9">
            <text:p>090322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Casas do So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23" table:style-name="ce9">
            <text:p>090323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União das freguesias de Açores e Vel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24" table:style-name="ce9">
            <text:p>090324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União das freguesias de Celorico (São Pedro e Santa Maria) e Vila Boa do Mondeg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25" table:style-name="ce9">
            <text:p>090325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União das freguesias de Cortiçô da Serra, Vide Entre Vinhas e Salgueir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326" table:style-name="ce9">
            <text:p>090326</text:p>
          </table:table-cell>
          <table:table-cell office:value-type="string" table:style-name="ce1">
            <text:p>Celorico da Beira</text:p>
          </table:table-cell>
          <table:table-cell office:value-type="string" table:style-name="ce8">
            <text:p>União das freguesias de Rapa e Cadafa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UDAR CELORIC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504" table:style-name="ce9">
            <text:p>090504</text:p>
          </table:table-cell>
          <table:table-cell office:value-type="string" table:style-name="ce1">
            <text:p>Fornos de Algodres</text:p>
          </table:table-cell>
          <table:table-cell office:value-type="string" table:style-name="ce8">
            <text:p>Figueiró da Granj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f - Independentes por Figueiró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512" table:style-name="ce9">
            <text:p>090512</text:p>
          </table:table-cell>
          <table:table-cell office:value-type="string" table:style-name="ce1">
            <text:p>Fornos de Algodres</text:p>
          </table:table-cell>
          <table:table-cell office:value-type="string" table:style-name="ce8">
            <text:p>Queiriz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q - Independentes por Queiri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00" table:style-name="ce9">
            <text:p>090600</text:p>
          </table:table-cell>
          <table:table-cell office:value-type="string" table:style-name="ce1">
            <text:p>Gouvei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00" table:style-name="ce9">
            <text:p>090600</text:p>
          </table:table-cell>
          <table:table-cell office:value-type="string" table:style-name="ce1">
            <text:p>Gouvei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02" table:style-name="ce9">
            <text:p>090602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Arcoz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office:value-type="string" table:style-name="ce8">
            <text:p>[mdciu - Movimento de Cidadãos Independentes Uni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03" table:style-name="ce9">
            <text:p>090603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Cativ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05" table:style-name="ce9">
            <text:p>090605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Folgosinh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fcf - Folgosinho Com Fut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12" table:style-name="ce9">
            <text:p>090612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Nesper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13" table:style-name="ce9">
            <text:p>090613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Paços da Se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14" table:style-name="ce9">
            <text:p>090614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Ribamondeg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17" table:style-name="ce9">
            <text:p>090617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São Pai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pu - São Paio Uni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19" table:style-name="ce9">
            <text:p>090619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Vila Cortês da Se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21" table:style-name="ce9">
            <text:p>090621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Vila Nova de Taze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office:value-type="string" table:style-name="ce8">
            <text:p>[ofevnt - O Futuro É ... Vila Nova de Tazem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23" table:style-name="ce9">
            <text:p>090623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União das freguesias de Aldeias e Mangualde da Se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office:value-type="string" table:style-name="ce8">
            <text:p>[aemdsrf - Aldeias e Mangualde da Serra Rumo ao Fut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24" table:style-name="ce9">
            <text:p>090624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União das freguesias de Figueiró da Serra e Freixo da Se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25" table:style-name="ce9">
            <text:p>090625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União das freguesias de Gouveia (São Pedro e São Juli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26" table:style-name="ce9">
            <text:p>090626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União das freguesias de Melo e Nab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office:value-type="string" table:style-name="ce8">
            <text:p>[iupnt - Independentes Unido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27" table:style-name="ce9">
            <text:p>090627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União das freguesias de Moimenta da Serra e Vinhó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evnc - Moimenta e Vinhó no Cor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628" table:style-name="ce9">
            <text:p>090628</text:p>
          </table:table-cell>
          <table:table-cell office:value-type="string" table:style-name="ce1">
            <text:p>Gouveia</text:p>
          </table:table-cell>
          <table:table-cell office:value-type="string" table:style-name="ce8">
            <text:p>União das freguesias de Rio Torto e Lagarinh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UVEIA MELHOR]</text:p>
          </table:table-cell>
          <table:table-cell table:style-name="ce1"/>
          <table:table-cell office:value-type="string" table:style-name="ce8">
            <text:p>[rteli - Rio Torto e Lagarinhos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00" table:style-name="ce9">
            <text:p>090700</text:p>
          </table:table-cell>
          <table:table-cell office:value-type="string" table:style-name="ce1">
            <text:p>Guard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00" table:style-name="ce9">
            <text:p>090700</text:p>
          </table:table-cell>
          <table:table-cell office:value-type="string" table:style-name="ce1">
            <text:p>Guard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03" table:style-name="ce9">
            <text:p>090703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Aldeia do Bisp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04" table:style-name="ce9">
            <text:p>090704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Aldeia Viç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06" table:style-name="ce9">
            <text:p>090706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Arrifan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09" table:style-name="ce9">
            <text:p>090709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Benespe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11" table:style-name="ce9">
            <text:p>090711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Casal de Cinz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13" table:style-name="ce9">
            <text:p>090713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Cavadou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14" table:style-name="ce9">
            <text:p>090714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Codess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16" table:style-name="ce9">
            <text:p>090716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Fa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17" table:style-name="ce9">
            <text:p>090717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Famalic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F - POR FAMALIC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22" table:style-name="ce9">
            <text:p>090722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João Ant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23" table:style-name="ce9">
            <text:p>090723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Maçainh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24" table:style-name="ce9">
            <text:p>090724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Marmel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office:value-type="string" table:style-name="ce8">
            <text:p>[UPM - UNIDOS PELO MARMEL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25" table:style-name="ce9">
            <text:p>090725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Mei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28" table:style-name="ce9">
            <text:p>090728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Panoias de Cim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30" table:style-name="ce9">
            <text:p>090730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Pêra do Moç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32" table:style-name="ce9">
            <text:p>090732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Porto da Carn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34" table:style-name="ce9">
            <text:p>090734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Ram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38" table:style-name="ce9">
            <text:p>090738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Santana da Azin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46" table:style-name="ce9">
            <text:p>090746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Vale de Estr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47" table:style-name="ce9">
            <text:p>090747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Valhelh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48" table:style-name="ce9">
            <text:p>090748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V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PV - MOVIMENTO INDEPENDENTES PELA VE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49" table:style-name="ce9">
            <text:p>090749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Videmont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V - INDEPENDENTES POR VIDEMO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50" table:style-name="ce9">
            <text:p>090750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Vila Cortês do Mondeg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51" table:style-name="ce9">
            <text:p>090751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Vila Fernan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53" table:style-name="ce9">
            <text:p>090753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Vila Garc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57" table:style-name="ce9">
            <text:p>090757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Gonça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58" table:style-name="ce9">
            <text:p>090758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Guard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office:value-type="string" table:style-name="ce8">
            <text:p>[JPG - JUNTOS PELA GUAR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59" table:style-name="ce9">
            <text:p>090759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Jarmelo São Migue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60" table:style-name="ce9">
            <text:p>090760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Jarmelo São Ped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office:value-type="string" table:style-name="ce8">
            <text:p>[ju - JARMELO UNI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62" table:style-name="ce9">
            <text:p>090762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União de freguesias de Corujeira e Trin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64" table:style-name="ce9">
            <text:p>090764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União de freguesias de Pousade e Albar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65" table:style-name="ce9">
            <text:p>090765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União de freguesias de Rochoso e Monte Margarid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766" table:style-name="ce9">
            <text:p>090766</text:p>
          </table:table-cell>
          <table:table-cell office:value-type="string" table:style-name="ce1">
            <text:p>Guarda</text:p>
          </table:table-cell>
          <table:table-cell office:value-type="string" table:style-name="ce8">
            <text:p>Ad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uarda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803" table:style-name="ce9">
            <text:p>090803</text:p>
          </table:table-cell>
          <table:table-cell office:value-type="string" table:style-name="ce1">
            <text:p>Manteigas</text:p>
          </table:table-cell>
          <table:table-cell office:value-type="string" table:style-name="ce8">
            <text:p>Manteigas (São Pedr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PS - São Pedro Semp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902" table:style-name="ce9">
            <text:p>090902</text:p>
          </table:table-cell>
          <table:table-cell office:value-type="string" table:style-name="ce1">
            <text:p>Meda</text:p>
          </table:table-cell>
          <table:table-cell office:value-type="string" table:style-name="ce8">
            <text:p>Barr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bu - Movimento Barreira Uni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905" table:style-name="ce9">
            <text:p>090905</text:p>
          </table:table-cell>
          <table:table-cell office:value-type="string" table:style-name="ce1">
            <text:p>Meda</text:p>
          </table:table-cell>
          <table:table-cell office:value-type="string" table:style-name="ce8">
            <text:p>Corisca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S - Coriscada Semp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907" table:style-name="ce9">
            <text:p>090907</text:p>
          </table:table-cell>
          <table:table-cell office:value-type="string" table:style-name="ce1">
            <text:p>Meda</text:p>
          </table:table-cell>
          <table:table-cell office:value-type="string" table:style-name="ce8">
            <text:p>Longroiv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dadl - Liga dos Amigos de Longrov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912" table:style-name="ce9">
            <text:p>090912</text:p>
          </table:table-cell>
          <table:table-cell office:value-type="string" table:style-name="ce1">
            <text:p>Meda</text:p>
          </table:table-cell>
          <table:table-cell office:value-type="string" table:style-name="ce8">
            <text:p>Poço do Can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PC - Amigos do Poço do Ca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0914" table:style-name="ce9">
            <text:p>090914</text:p>
          </table:table-cell>
          <table:table-cell office:value-type="string" table:style-name="ce1">
            <text:p>Meda</text:p>
          </table:table-cell>
          <table:table-cell office:value-type="string" table:style-name="ce8">
            <text:p>Rabaç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tpr - Todos Pelo Rabaç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103" table:style-name="ce9">
            <text:p>091103</text:p>
          </table:table-cell>
          <table:table-cell office:value-type="string" table:style-name="ce1">
            <text:p>Sabugal</text:p>
          </table:table-cell>
          <table:table-cell office:value-type="string" table:style-name="ce8">
            <text:p>Aldeia da Pont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dpu - Aldeia da Ponte Uni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106" table:style-name="ce9">
            <text:p>091106</text:p>
          </table:table-cell>
          <table:table-cell office:value-type="string" table:style-name="ce1">
            <text:p>Sabugal</text:p>
          </table:table-cell>
          <table:table-cell office:value-type="string" table:style-name="ce8">
            <text:p>Aldeia Vel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AV - Amigos de Aldeia Vel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107" table:style-name="ce9">
            <text:p>091107</text:p>
          </table:table-cell>
          <table:table-cell office:value-type="string" table:style-name="ce1">
            <text:p>Sabugal</text:p>
          </table:table-cell>
          <table:table-cell office:value-type="string" table:style-name="ce8">
            <text:p>Alfaiat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da - Amigos de Alfaia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112" table:style-name="ce9">
            <text:p>091112</text:p>
          </table:table-cell>
          <table:table-cell office:value-type="string" table:style-name="ce1">
            <text:p>Sabugal</text:p>
          </table:table-cell>
          <table:table-cell office:value-type="string" table:style-name="ce8">
            <text:p>Castelei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C - Juntos Pelo Castel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114" table:style-name="ce9">
            <text:p>091114</text:p>
          </table:table-cell>
          <table:table-cell office:value-type="string" table:style-name="ce1">
            <text:p>Sabugal</text:p>
          </table:table-cell>
          <table:table-cell office:value-type="string" table:style-name="ce8">
            <text:p>Fói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fncc - Foios No Caminho Cer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118" table:style-name="ce9">
            <text:p>091118</text:p>
          </table:table-cell>
          <table:table-cell office:value-type="string" table:style-name="ce1">
            <text:p>Sabugal</text:p>
          </table:table-cell>
          <table:table-cell office:value-type="string" table:style-name="ce8">
            <text:p>Malca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IM - Cidadãos Independentes de Malcat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134" table:style-name="ce9">
            <text:p>091134</text:p>
          </table:table-cell>
          <table:table-cell office:value-type="string" table:style-name="ce1">
            <text:p>Sabugal</text:p>
          </table:table-cell>
          <table:table-cell office:value-type="string" table:style-name="ce8">
            <text:p>Sou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. Soito - Unidos Pelo Soi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145" table:style-name="ce9">
            <text:p>091145</text:p>
          </table:table-cell>
          <table:table-cell office:value-type="string" table:style-name="ce1">
            <text:p>Sabugal</text:p>
          </table:table-cell>
          <table:table-cell office:value-type="string" table:style-name="ce8">
            <text:p>União das freguesias de Sabugal e Aldeia de Santo Antóni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F - Mais Fregues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00" table:style-name="ce9">
            <text:p>091200</text:p>
          </table:table-cell>
          <table:table-cell office:value-type="string" table:style-name="ce1">
            <text:p>Sei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00" table:style-name="ce9">
            <text:p>091200</text:p>
          </table:table-cell>
          <table:table-cell office:value-type="string" table:style-name="ce1">
            <text:p>Sei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01" table:style-name="ce9">
            <text:p>091201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Alvoco da Ser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FAS - Independentes Freguesia Alvôco da S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05" table:style-name="ce9">
            <text:p>091205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Girabolh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07" table:style-name="ce9">
            <text:p>091207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Lorig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08" table:style-name="ce9">
            <text:p>091208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Paranh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09" table:style-name="ce9">
            <text:p>091209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Pinhanç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10" table:style-name="ce9">
            <text:p>091210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Sabugu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12" table:style-name="ce9">
            <text:p>091212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Sandomi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13" table:style-name="ce9">
            <text:p>091213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Santa Comb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16" table:style-name="ce9">
            <text:p>091216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Santiag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21" table:style-name="ce9">
            <text:p>091221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Teix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24" table:style-name="ce9">
            <text:p>091224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Travancin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25" table:style-name="ce9">
            <text:p>091225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Valezim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VEP - Valezim Está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28" table:style-name="ce9">
            <text:p>091228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Vila Cova à Coelh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30" table:style-name="ce9">
            <text:p>091230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União das freguesias de Carragozela e Várzea de Merug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U - Independentes Uni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31" table:style-name="ce9">
            <text:p>091231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União das freguesias de Sameice e Santa Eulál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32" table:style-name="ce9">
            <text:p>091232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União das freguesias de Santa Marinha e São Mart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33" table:style-name="ce9">
            <text:p>091233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União das freguesias de Seia, São Romão e Lapa dos Dinhei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34" table:style-name="ce9">
            <text:p>091234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União das freguesias de Torrozelo e Folhad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35" table:style-name="ce9">
            <text:p>091235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União das freguesias de Tourais e Laj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LO VALOR DA NOSSA TERRA]</text:p>
          </table:table-cell>
          <table:table-cell table:style-name="ce1"/>
          <table:table-cell office:value-type="string" table:style-name="ce8">
            <text:p>[ITL - Independentes de Tourais e Lag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236" table:style-name="ce9">
            <text:p>091236</text:p>
          </table:table-cell>
          <table:table-cell office:value-type="string" table:style-name="ce1">
            <text:p>Seia</text:p>
          </table:table-cell>
          <table:table-cell office:value-type="string" table:style-name="ce8">
            <text:p>União das freguesias de Vide e Cabeç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UFVC - Independentes da União das Freguesias de Vide e Cabeça]</text:p>
          </table:table-cell>
          <table:table-cell office:value-type="string" table:style-name="ce1">
            <text:p>[PFM - Por um Futuro Melhor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304" table:style-name="ce9">
            <text:p>091304</text:p>
          </table:table-cell>
          <table:table-cell office:value-type="string" table:style-name="ce1">
            <text:p>Trancoso</text:p>
          </table:table-cell>
          <table:table-cell office:value-type="string" table:style-name="ce8">
            <text:p>Cogu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pc - Movimento pela Cogu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305" table:style-name="ce9">
            <text:p>091305</text:p>
          </table:table-cell>
          <table:table-cell office:value-type="string" table:style-name="ce1">
            <text:p>Trancoso</text:p>
          </table:table-cell>
          <table:table-cell office:value-type="string" table:style-name="ce8">
            <text:p>Cótim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dadc - Liga dos Amigos dos Cótim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311" table:style-name="ce9">
            <text:p>091311</text:p>
          </table:table-cell>
          <table:table-cell office:value-type="string" table:style-name="ce1">
            <text:p>Trancoso</text:p>
          </table:table-cell>
          <table:table-cell office:value-type="string" table:style-name="ce8">
            <text:p>Moimentin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pm - Movimento por Moimentinh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315" table:style-name="ce9">
            <text:p>091315</text:p>
          </table:table-cell>
          <table:table-cell office:value-type="string" table:style-name="ce1">
            <text:p>Trancoso</text:p>
          </table:table-cell>
          <table:table-cell office:value-type="string" table:style-name="ce8">
            <text:p>Rebolei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pr - Movimento Pró Rebol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333" table:style-name="ce9">
            <text:p>091333</text:p>
          </table:table-cell>
          <table:table-cell office:value-type="string" table:style-name="ce1">
            <text:p>Trancoso</text:p>
          </table:table-cell>
          <table:table-cell office:value-type="string" table:style-name="ce8">
            <text:p>União das freguesias de Vale do Seixo e Vila Garc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uptvsvg - Movimento Independente Unidos Pela Terra - Vale do Seixo e Vila Grac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91335" table:style-name="ce9">
            <text:p>091335</text:p>
          </table:table-cell>
          <table:table-cell office:value-type="string" table:style-name="ce1">
            <text:p>Trancoso</text:p>
          </table:table-cell>
          <table:table-cell office:value-type="string" table:style-name="ce8">
            <text:p>União das freguesias de Vilares e Carnic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uvc - Juntos pela União - Vilares e Carnicães]</text:p>
          </table:table-cell>
          <table:table-cell office:value-type="string" table:style-name="ce1">
            <text:p>[upntv - Unidos pela Nossa Terra - Vilar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104" table:style-name="ce9">
            <text:p>100104</text:p>
          </table:table-cell>
          <table:table-cell office:value-type="string" table:style-name="ce1">
            <text:p>Alcobaça</text:p>
          </table:table-cell>
          <table:table-cell office:value-type="string" table:style-name="ce8">
            <text:p>Bárri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afp - Independentes A Freguesia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105" table:style-name="ce9">
            <text:p>100105</text:p>
          </table:table-cell>
          <table:table-cell office:value-type="string" table:style-name="ce1">
            <text:p>Alcobaça</text:p>
          </table:table-cell>
          <table:table-cell office:value-type="string" table:style-name="ce8">
            <text:p>Benedi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b - Independentes Pela Benedit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108" table:style-name="ce9">
            <text:p>100108</text:p>
          </table:table-cell>
          <table:table-cell office:value-type="string" table:style-name="ce1">
            <text:p>Alcobaça</text:p>
          </table:table-cell>
          <table:table-cell office:value-type="string" table:style-name="ce8">
            <text:p>Évora de Alcobaç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f - Unidos pela Fregues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109" table:style-name="ce9">
            <text:p>100109</text:p>
          </table:table-cell>
          <table:table-cell office:value-type="string" table:style-name="ce1">
            <text:p>Alcobaça</text:p>
          </table:table-cell>
          <table:table-cell office:value-type="string" table:style-name="ce8">
            <text:p>Maiorg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m - Independentes pela Maiorg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112" table:style-name="ce9">
            <text:p>100112</text:p>
          </table:table-cell>
          <table:table-cell office:value-type="string" table:style-name="ce1">
            <text:p>Alcobaça</text:p>
          </table:table-cell>
          <table:table-cell office:value-type="string" table:style-name="ce8">
            <text:p>São Martinho do Por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fv - Força Viva]</text:p>
          </table:table-cell>
          <table:table-cell office:value-type="string" table:style-name="ce1">
            <text:p>[SMP - Cidadãos Independent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120" table:style-name="ce9">
            <text:p>100120</text:p>
          </table:table-cell>
          <table:table-cell office:value-type="string" table:style-name="ce1">
            <text:p>Alcobaça</text:p>
          </table:table-cell>
          <table:table-cell office:value-type="string" table:style-name="ce8">
            <text:p>Aljubarro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afep - Independentes A Freguesia Em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122" table:style-name="ce9">
            <text:p>100122</text:p>
          </table:table-cell>
          <table:table-cell office:value-type="string" table:style-name="ce1">
            <text:p>Alcobaça</text:p>
          </table:table-cell>
          <table:table-cell office:value-type="string" table:style-name="ce8">
            <text:p>União das freguesias de Coz, Alpedriz e Mont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udfcam - Independentes pela União das Freguesias de Coz, Alpedriz e Mo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208" table:style-name="ce9">
            <text:p>100208</text:p>
          </table:table-cell>
          <table:table-cell office:value-type="string" table:style-name="ce1">
            <text:p>Alvaiázere</text:p>
          </table:table-cell>
          <table:table-cell office:value-type="string" table:style-name="ce8">
            <text:p>Alvaiázer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A - Independentes por Alvaiáze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309" table:style-name="ce9">
            <text:p>100309</text:p>
          </table:table-cell>
          <table:table-cell office:value-type="string" table:style-name="ce1">
            <text:p>Ansião</text:p>
          </table:table-cell>
          <table:table-cell office:value-type="string" table:style-name="ce8">
            <text:p>Ansi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LTA - Movimento Autárquico Lagarteira, Torre e Ansi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600" table:style-name="ce9">
            <text:p>100600</text:p>
          </table:table-cell>
          <table:table-cell office:value-type="string" table:style-name="ce1">
            <text:p>Caldas da Rainh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VC - Viver o Concelho 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600" table:style-name="ce9">
            <text:p>100600</text:p>
          </table:table-cell>
          <table:table-cell office:value-type="string" table:style-name="ce1">
            <text:p>Caldas da Rainh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VC - Viver o Concelho 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606" table:style-name="ce9">
            <text:p>100606</text:p>
          </table:table-cell>
          <table:table-cell office:value-type="string" table:style-name="ce1">
            <text:p>Caldas da Rainha</text:p>
          </table:table-cell>
          <table:table-cell office:value-type="string" table:style-name="ce8">
            <text:p>Foz do Arelh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VC - Viver o Concelho 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608" table:style-name="ce9">
            <text:p>100608</text:p>
          </table:table-cell>
          <table:table-cell office:value-type="string" table:style-name="ce1">
            <text:p>Caldas da Rainha</text:p>
          </table:table-cell>
          <table:table-cell office:value-type="string" table:style-name="ce8">
            <text:p>Nadadou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PN - Movimento pelo Nadado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609" table:style-name="ce9">
            <text:p>100609</text:p>
          </table:table-cell>
          <table:table-cell office:value-type="string" table:style-name="ce1">
            <text:p>Caldas da Rainha</text:p>
          </table:table-cell>
          <table:table-cell office:value-type="string" table:style-name="ce8">
            <text:p>Salir de Mat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VC - Viver o Concelho 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611" table:style-name="ce9">
            <text:p>100611</text:p>
          </table:table-cell>
          <table:table-cell office:value-type="string" table:style-name="ce1">
            <text:p>Caldas da Rainha</text:p>
          </table:table-cell>
          <table:table-cell office:value-type="string" table:style-name="ce8">
            <text:p>Santa Catarin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VC - Viver o Concelho 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617" table:style-name="ce9">
            <text:p>100617</text:p>
          </table:table-cell>
          <table:table-cell office:value-type="string" table:style-name="ce1">
            <text:p>Caldas da Rainha</text:p>
          </table:table-cell>
          <table:table-cell office:value-type="string" table:style-name="ce8">
            <text:p>União das freguesias de Caldas da Rainha - Nossa Senhora do Pópulo, Coto e São Gregóri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VC - Viver o Concelho 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618" table:style-name="ce9">
            <text:p>100618</text:p>
          </table:table-cell>
          <table:table-cell office:value-type="string" table:style-name="ce1">
            <text:p>Caldas da Rainha</text:p>
          </table:table-cell>
          <table:table-cell office:value-type="string" table:style-name="ce8">
            <text:p>União das freguesias de Caldas da Rainha - Santo Onofre e Serra do Bou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VC - Viver o Concelho 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619" table:style-name="ce9">
            <text:p>100619</text:p>
          </table:table-cell>
          <table:table-cell office:value-type="string" table:style-name="ce1">
            <text:p>Caldas da Rainha</text:p>
          </table:table-cell>
          <table:table-cell office:value-type="string" table:style-name="ce8">
            <text:p>União das freguesias de Tornada e Salir do Por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VC - Viver o Concelho 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0700" table:style-name="ce9">
            <text:p>100700</text:p>
          </table:table-cell>
          <table:table-cell office:value-type="string" table:style-name="ce1">
            <text:p>Castanheira de Pêr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AIS - Movimento Autárquico Independente Salvar Castanh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0700" table:style-name="ce9">
            <text:p>100700</text:p>
          </table:table-cell>
          <table:table-cell office:value-type="string" table:style-name="ce1">
            <text:p>Castanheira de Pêr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AIS - Movimento Autárquico Independente Salvar Castanh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0703" table:style-name="ce9">
            <text:p>100703</text:p>
          </table:table-cell>
          <table:table-cell office:value-type="string" table:style-name="ce1">
            <text:p>Castanheira de Pêra</text:p>
          </table:table-cell>
          <table:table-cell office:value-type="string" table:style-name="ce8">
            <text:p>União das freguesias de Castanheira de Pêra e Coentr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utárquico Independente Salvar Castanh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0932" table:style-name="ce9">
            <text:p>100932</text:p>
          </table:table-cell>
          <table:table-cell office:value-type="string" table:style-name="ce1">
            <text:p>Leiria</text:p>
          </table:table-cell>
          <table:table-cell office:value-type="string" table:style-name="ce8">
            <text:p>União das freguesias de Colmeias e Memór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V - Movimento Cidadãos Independentes Mais Melh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0939" table:style-name="ce9">
            <text:p>100939</text:p>
          </table:table-cell>
          <table:table-cell office:value-type="string" table:style-name="ce1">
            <text:p>Leiria</text:p>
          </table:table-cell>
          <table:table-cell office:value-type="string" table:style-name="ce8">
            <text:p>União das freguesias de Santa Eufémia e Boa Vis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fseb - Independentes das Freguesias de Santa Eufémia e Boa Vista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01000" table:style-name="ce9">
            <text:p>101000</text:p>
          </table:table-cell>
          <table:table-cell office:value-type="string" table:style-name="ce1">
            <text:p>Marinha Grande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+cmg - + Concelho Marinha Grande]</text:p>
          </table:table-cell>
          <table:table-cell office:value-type="string" table:style-name="ce8">
            <text:p>[MpM - Movimento Pela Marinha]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1000" table:style-name="ce9">
            <text:p>101000</text:p>
          </table:table-cell>
          <table:table-cell office:value-type="string" table:style-name="ce1">
            <text:p>Marinha Grande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pM - Movimento Pela Marinha]</text:p>
          </table:table-cell>
          <table:table-cell office:value-type="string" table:style-name="ce8">
            <text:p>[+cmg - + Concelho Marinha Grande]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1001" table:style-name="ce9">
            <text:p>101001</text:p>
          </table:table-cell>
          <table:table-cell office:value-type="string" table:style-name="ce1">
            <text:p>Marinha Grande</text:p>
          </table:table-cell>
          <table:table-cell office:value-type="string" table:style-name="ce8">
            <text:p>Marinha Gran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pM - Movimento Pela Marinha]</text:p>
          </table:table-cell>
          <table:table-cell office:value-type="string" table:style-name="ce8">
            <text:p>[+cmg - + Concelho Marinha Grande]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1002" table:style-name="ce9">
            <text:p>101002</text:p>
          </table:table-cell>
          <table:table-cell office:value-type="string" table:style-name="ce1">
            <text:p>Marinha Grande</text:p>
          </table:table-cell>
          <table:table-cell office:value-type="string" table:style-name="ce8">
            <text:p>Vieira de Leir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pM - Movimento Pela Marinha]</text:p>
          </table:table-cell>
          <table:table-cell office:value-type="string" table:style-name="ce8">
            <text:p>[+cmg - + Concelho Marinha Grande]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1003" table:style-name="ce9">
            <text:p>101003</text:p>
          </table:table-cell>
          <table:table-cell office:value-type="string" table:style-name="ce1">
            <text:p>Marinha Grande</text:p>
          </table:table-cell>
          <table:table-cell office:value-type="string" table:style-name="ce8">
            <text:p>Moi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+cmg - + Concelho Marinha Grande]</text:p>
          </table:table-cell>
          <table:table-cell office:value-type="string" table:style-name="ce1">
            <text:p>[MpM - Movimento Pela Marinha]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1100" table:style-name="ce9">
            <text:p>101100</text:p>
          </table:table-cell>
          <table:table-cell office:value-type="string" table:style-name="ce1">
            <text:p>Nazaré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gcicn - Grupo de Cidadãos Independentes do Concelho da Nazaré]</text:p>
          </table:table-cell>
          <table:table-cell office:value-type="string" table:style-name="ce1">
            <text:p>[nv - NazaréViva]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1100" table:style-name="ce9">
            <text:p>101100</text:p>
          </table:table-cell>
          <table:table-cell office:value-type="string" table:style-name="ce1">
            <text:p>Nazaré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10">
            <text:p>[nv - NazaréViva]</text:p>
          </table:table-cell>
          <table:table-cell office:value-type="string" table:style-name="ce8">
            <text:p>[gcicn - Grupo de Cidadãos Independentes do Concelho da Nazaré]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1101" table:style-name="ce9">
            <text:p>101101</text:p>
          </table:table-cell>
          <table:table-cell office:value-type="string" table:style-name="ce1">
            <text:p>Nazaré</text:p>
          </table:table-cell>
          <table:table-cell office:value-type="string" table:style-name="ce8">
            <text:p>Famalic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v - NazaréViv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1102" table:style-name="ce9">
            <text:p>101102</text:p>
          </table:table-cell>
          <table:table-cell office:value-type="string" table:style-name="ce1">
            <text:p>Nazaré</text:p>
          </table:table-cell>
          <table:table-cell office:value-type="string" table:style-name="ce8">
            <text:p>Nazaré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cicn - Grupo de Cidadãos Independentes do Concelho da Nazaré]</text:p>
          </table:table-cell>
          <table:table-cell office:value-type="string" table:style-name="ce1">
            <text:p>[nv - NazaréViva]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1103" table:style-name="ce9">
            <text:p>101103</text:p>
          </table:table-cell>
          <table:table-cell office:value-type="string" table:style-name="ce1">
            <text:p>Nazaré</text:p>
          </table:table-cell>
          <table:table-cell office:value-type="string" table:style-name="ce8">
            <text:p>Valado dos Frad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nv - NazaréViva]</text:p>
          </table:table-cell>
          <table:table-cell office:value-type="string" table:style-name="ce8">
            <text:p>[gcicn - Grupo de Cidadãos Independentes do Concelho da Nazaré]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1201" table:style-name="ce9">
            <text:p>101201</text:p>
          </table:table-cell>
          <table:table-cell office:value-type="string" table:style-name="ce1">
            <text:p>Óbidos</text:p>
          </table:table-cell>
          <table:table-cell office:value-type="string" table:style-name="ce8">
            <text:p>A dos Neg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F - Unidos Pela Fregues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2"/>
          <table:table-cell office:value-type="float" office:value="101208" table:style-name="ce9">
            <text:p>101208</text:p>
          </table:table-cell>
          <table:table-cell office:value-type="string" table:style-name="ce1">
            <text:p>Óbidos</text:p>
          </table:table-cell>
          <table:table-cell office:value-type="string" table:style-name="ce8">
            <text:p>Gaeir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P - Gaeiras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209" table:style-name="ce9">
            <text:p>101209</text:p>
          </table:table-cell>
          <table:table-cell office:value-type="string" table:style-name="ce1">
            <text:p>Óbidos</text:p>
          </table:table-cell>
          <table:table-cell office:value-type="string" table:style-name="ce8">
            <text:p>Uss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PU - Movimento Pela Uss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514" table:style-name="ce9">
            <text:p>101514</text:p>
          </table:table-cell>
          <table:table-cell office:value-type="string" table:style-name="ce1">
            <text:p>Pombal</text:p>
          </table:table-cell>
          <table:table-cell office:value-type="string" table:style-name="ce8">
            <text:p>Vila Cã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VC - Unidos por Vila Cã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602" table:style-name="ce9">
            <text:p>101602</text:p>
          </table:table-cell>
          <table:table-cell office:value-type="string" table:style-name="ce1">
            <text:p>Porto de Mós</text:p>
          </table:table-cell>
          <table:table-cell office:value-type="string" table:style-name="ce8">
            <text:p>Alqueidão da Ser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FAS - Juntos Fazemos Alqueidão da S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608" table:style-name="ce9">
            <text:p>101608</text:p>
          </table:table-cell>
          <table:table-cell office:value-type="string" table:style-name="ce1">
            <text:p>Porto de Mós</text:p>
          </table:table-cell>
          <table:table-cell office:value-type="string" table:style-name="ce8">
            <text:p>Mira de Air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IMA - Independentes por Mira de Ai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609" table:style-name="ce9">
            <text:p>101609</text:p>
          </table:table-cell>
          <table:table-cell office:value-type="string" table:style-name="ce1">
            <text:p>Porto de Mós</text:p>
          </table:table-cell>
          <table:table-cell office:value-type="string" table:style-name="ce8">
            <text:p>Pedreir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p - Independentes por Pedreir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610" table:style-name="ce9">
            <text:p>101610</text:p>
          </table:table-cell>
          <table:table-cell office:value-type="string" table:style-name="ce1">
            <text:p>Porto de Mós</text:p>
          </table:table-cell>
          <table:table-cell office:value-type="string" table:style-name="ce8">
            <text:p>São Ben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sb - Independentes por São Be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613" table:style-name="ce9">
            <text:p>101613</text:p>
          </table:table-cell>
          <table:table-cell office:value-type="string" table:style-name="ce1">
            <text:p>Porto de Mós</text:p>
          </table:table-cell>
          <table:table-cell office:value-type="string" table:style-name="ce8">
            <text:p>Serro Ventos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USV - Unidos por Serro Ventos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01615" table:style-name="ce9">
            <text:p>101615</text:p>
          </table:table-cell>
          <table:table-cell office:value-type="string" table:style-name="ce1">
            <text:p>Porto de Mós</text:p>
          </table:table-cell>
          <table:table-cell office:value-type="string" table:style-name="ce8">
            <text:p>União das freguesias de Alvados e Alcar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aa - Unidos por Alvados / Alcar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00" table:style-name="ce9">
            <text:p>110100</text:p>
          </table:table-cell>
          <table:table-cell office:value-type="string" table:style-name="ce1">
            <text:p>Alenquer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00" table:style-name="ce9">
            <text:p>110100</text:p>
          </table:table-cell>
          <table:table-cell office:value-type="string" table:style-name="ce1">
            <text:p>Alenquer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06" table:style-name="ce9">
            <text:p>110106</text:p>
          </table:table-cell>
          <table:table-cell office:value-type="string" table:style-name="ce1">
            <text:p>Alenquer</text:p>
          </table:table-cell>
          <table:table-cell office:value-type="string" table:style-name="ce8">
            <text:p>Carno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07" table:style-name="ce9">
            <text:p>110107</text:p>
          </table:table-cell>
          <table:table-cell office:value-type="string" table:style-name="ce1">
            <text:p>Alenquer</text:p>
          </table:table-cell>
          <table:table-cell office:value-type="string" table:style-name="ce8">
            <text:p>Me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08" table:style-name="ce9">
            <text:p>110108</text:p>
          </table:table-cell>
          <table:table-cell office:value-type="string" table:style-name="ce1">
            <text:p>Alenquer</text:p>
          </table:table-cell>
          <table:table-cell office:value-type="string" table:style-name="ce8">
            <text:p>Olhalv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fcc - Freguesia Com Cor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09" table:style-name="ce9">
            <text:p>110109</text:p>
          </table:table-cell>
          <table:table-cell office:value-type="string" table:style-name="ce1">
            <text:p>Alenquer</text:p>
          </table:table-cell>
          <table:table-cell office:value-type="string" table:style-name="ce8">
            <text:p>O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13" table:style-name="ce9">
            <text:p>110113</text:p>
          </table:table-cell>
          <table:table-cell office:value-type="string" table:style-name="ce1">
            <text:p>Alenquer</text:p>
          </table:table-cell>
          <table:table-cell office:value-type="string" table:style-name="ce8">
            <text:p>Vent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14" table:style-name="ce9">
            <text:p>110114</text:p>
          </table:table-cell>
          <table:table-cell office:value-type="string" table:style-name="ce1">
            <text:p>Alenquer</text:p>
          </table:table-cell>
          <table:table-cell office:value-type="string" table:style-name="ce8">
            <text:p>Vila Verde dos Franc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17" table:style-name="ce9">
            <text:p>110117</text:p>
          </table:table-cell>
          <table:table-cell office:value-type="string" table:style-name="ce1">
            <text:p>Alenquer</text:p>
          </table:table-cell>
          <table:table-cell office:value-type="string" table:style-name="ce8">
            <text:p>União das freguesias de Abrigada e Cabanas de Tor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18" table:style-name="ce9">
            <text:p>110118</text:p>
          </table:table-cell>
          <table:table-cell office:value-type="string" table:style-name="ce1">
            <text:p>Alenquer</text:p>
          </table:table-cell>
          <table:table-cell office:value-type="string" table:style-name="ce8">
            <text:p>União das freguesias de Aldeia Galega da Merceana e Aldeia Gavin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19" table:style-name="ce9">
            <text:p>110119</text:p>
          </table:table-cell>
          <table:table-cell office:value-type="string" table:style-name="ce1">
            <text:p>Alenquer</text:p>
          </table:table-cell>
          <table:table-cell office:value-type="string" table:style-name="ce8">
            <text:p>União das freguesias de Alenquer (Santo Estêvão e Trian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20" table:style-name="ce9">
            <text:p>110120</text:p>
          </table:table-cell>
          <table:table-cell office:value-type="string" table:style-name="ce1">
            <text:p>Alenquer</text:p>
          </table:table-cell>
          <table:table-cell office:value-type="string" table:style-name="ce8">
            <text:p>União das freguesias de Carregado e Cadaf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121" table:style-name="ce9">
            <text:p>110121</text:p>
          </table:table-cell>
          <table:table-cell office:value-type="string" table:style-name="ce1">
            <text:p>Alenquer</text:p>
          </table:table-cell>
          <table:table-cell office:value-type="string" table:style-name="ce8">
            <text:p>União das freguesias de Ribafria e Pereiro de Palhacan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300" table:style-name="ce9">
            <text:p>110300</text:p>
          </table:table-cell>
          <table:table-cell office:value-type="string" table:style-name="ce1">
            <text:p>Azambuj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MPT.PPM - PELO FUTURO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300" table:style-name="ce9">
            <text:p>110300</text:p>
          </table:table-cell>
          <table:table-cell office:value-type="string" table:style-name="ce1">
            <text:p>Azambuj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MPT.PPM - PELO FUTURO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301" table:style-name="ce9">
            <text:p>110301</text:p>
          </table:table-cell>
          <table:table-cell office:value-type="string" table:style-name="ce1">
            <text:p>Azambuja</text:p>
          </table:table-cell>
          <table:table-cell office:value-type="string" table:style-name="ce8">
            <text:p>Alcoentr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O FUTURO DA NOSSA TERRA]</text:p>
          </table:table-cell>
          <table:table-cell table:style-name="ce1"/>
          <table:table-cell office:value-type="string" table:style-name="ce8">
            <text:p>[GCI - Grupo de Cidadãos Independentes-Coragem Para Fazer Difer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302" table:style-name="ce9">
            <text:p>110302</text:p>
          </table:table-cell>
          <table:table-cell office:value-type="string" table:style-name="ce1">
            <text:p>Azambuja</text:p>
          </table:table-cell>
          <table:table-cell office:value-type="string" table:style-name="ce8">
            <text:p>Aveiras de Baix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O FUTURO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303" table:style-name="ce9">
            <text:p>110303</text:p>
          </table:table-cell>
          <table:table-cell office:value-type="string" table:style-name="ce1">
            <text:p>Azambuja</text:p>
          </table:table-cell>
          <table:table-cell office:value-type="string" table:style-name="ce8">
            <text:p>Aveiras de Cim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O FUTURO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304" table:style-name="ce9">
            <text:p>110304</text:p>
          </table:table-cell>
          <table:table-cell office:value-type="string" table:style-name="ce1">
            <text:p>Azambuja</text:p>
          </table:table-cell>
          <table:table-cell office:value-type="string" table:style-name="ce8">
            <text:p>Azambuj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O FUTURO DA NOSSA TERRA]</text:p>
          </table:table-cell>
          <table:table-cell table:style-name="ce1"/>
          <table:table-cell office:value-type="string" table:style-name="ce8">
            <text:p>[MAS - Movimento Azambuja Soci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306" table:style-name="ce9">
            <text:p>110306</text:p>
          </table:table-cell>
          <table:table-cell office:value-type="string" table:style-name="ce1">
            <text:p>Azambuja</text:p>
          </table:table-cell>
          <table:table-cell office:value-type="string" table:style-name="ce8">
            <text:p>Vale do Paraís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CE - Grupo de Cidadãos Eleitores-Juntos Por Vale do Parais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307" table:style-name="ce9">
            <text:p>110307</text:p>
          </table:table-cell>
          <table:table-cell office:value-type="string" table:style-name="ce1">
            <text:p>Azambuja</text:p>
          </table:table-cell>
          <table:table-cell office:value-type="string" table:style-name="ce8">
            <text:p>Vila Nova da Rain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V - Movimento Independente Vilanovens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310" table:style-name="ce9">
            <text:p>110310</text:p>
          </table:table-cell>
          <table:table-cell office:value-type="string" table:style-name="ce1">
            <text:p>Azambuja</text:p>
          </table:table-cell>
          <table:table-cell office:value-type="string" table:style-name="ce8">
            <text:p>União das freguesias de Manique do Intendente, Vila Nova de São Pedro e Maçus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.PPM - PELO FUTURO D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400" table:style-name="ce9">
            <text:p>110400</text:p>
          </table:table-cell>
          <table:table-cell office:value-type="string" table:style-name="ce1">
            <text:p>Cadaval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MPT.PPM - Saber, Juventude e Inovaç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400" table:style-name="ce9">
            <text:p>110400</text:p>
          </table:table-cell>
          <table:table-cell office:value-type="string" table:style-name="ce1">
            <text:p>Cadaval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MPT.PPM - Saber, Juventude e Inovaç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401" table:style-name="ce9">
            <text:p>110401</text:p>
          </table:table-cell>
          <table:table-cell office:value-type="string" table:style-name="ce1">
            <text:p>Cadaval</text:p>
          </table:table-cell>
          <table:table-cell office:value-type="string" table:style-name="ce8">
            <text:p>Algube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aber, Juventude e Inovaç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407" table:style-name="ce9">
            <text:p>110407</text:p>
          </table:table-cell>
          <table:table-cell office:value-type="string" table:style-name="ce1">
            <text:p>Cadaval</text:p>
          </table:table-cell>
          <table:table-cell office:value-type="string" table:style-name="ce8">
            <text:p>Per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aber, Juventude e Inovaç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409" table:style-name="ce9">
            <text:p>110409</text:p>
          </table:table-cell>
          <table:table-cell office:value-type="string" table:style-name="ce1">
            <text:p>Cadaval</text:p>
          </table:table-cell>
          <table:table-cell office:value-type="string" table:style-name="ce8">
            <text:p>Vermel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aber, Juventude e Inovaç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410" table:style-name="ce9">
            <text:p>110410</text:p>
          </table:table-cell>
          <table:table-cell office:value-type="string" table:style-name="ce1">
            <text:p>Cadaval</text:p>
          </table:table-cell>
          <table:table-cell office:value-type="string" table:style-name="ce8">
            <text:p>Vil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aber, Juventude e Inovaç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411" table:style-name="ce9">
            <text:p>110411</text:p>
          </table:table-cell>
          <table:table-cell office:value-type="string" table:style-name="ce1">
            <text:p>Cadaval</text:p>
          </table:table-cell>
          <table:table-cell office:value-type="string" table:style-name="ce8">
            <text:p>União das freguesias do Cadaval e Pêro Moni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aber, Juventude e Inovaç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412" table:style-name="ce9">
            <text:p>110412</text:p>
          </table:table-cell>
          <table:table-cell office:value-type="string" table:style-name="ce1">
            <text:p>Cadaval</text:p>
          </table:table-cell>
          <table:table-cell office:value-type="string" table:style-name="ce8">
            <text:p>União das freguesias de Lamas e Cerc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aber, Juventude e Inovaç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413" table:style-name="ce9">
            <text:p>110413</text:p>
          </table:table-cell>
          <table:table-cell office:value-type="string" table:style-name="ce1">
            <text:p>Cadaval</text:p>
          </table:table-cell>
          <table:table-cell office:value-type="string" table:style-name="ce8">
            <text:p>União das freguesias de Painho e Figuei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aber, Juventude e Inovaçã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500" table:style-name="ce9">
            <text:p>110500</text:p>
          </table:table-cell>
          <table:table-cell office:value-type="string" table:style-name="ce1">
            <text:p>Cascai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VIVA CASCAIS]</text:p>
          </table:table-cell>
          <table:table-cell office:value-type="string" table:style-name="ce1">
            <text:p>[PPM/PPV/PND - PLATAFORMA DE CIDADANIA CASCAIS]</text:p>
          </table:table-cell>
          <table:table-cell office:value-type="string" table:style-name="ce8">
            <text:p>[scmi - Ser Cascais - <text:s/>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500" table:style-name="ce9">
            <text:p>110500</text:p>
          </table:table-cell>
          <table:table-cell office:value-type="string" table:style-name="ce1">
            <text:p>Cascai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VIVA CASCAIS]</text:p>
          </table:table-cell>
          <table:table-cell office:value-type="string" table:style-name="ce1">
            <text:p>[PPM/PPV/PND - PLATAFORMA DE CIDADANIA CASCAIS]</text:p>
          </table:table-cell>
          <table:table-cell office:value-type="string" table:style-name="ce8">
            <text:p>[scmi - Ser Cascais - <text:s/>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501" table:style-name="ce9">
            <text:p>110501</text:p>
          </table:table-cell>
          <table:table-cell office:value-type="string" table:style-name="ce1">
            <text:p>Cascais</text:p>
          </table:table-cell>
          <table:table-cell office:value-type="string" table:style-name="ce8">
            <text:p>Alcabidech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VIVA CASCAIS]</text:p>
          </table:table-cell>
          <table:table-cell office:value-type="string" table:style-name="ce1">
            <text:p>[PPM/PPV/PND - PLATAFORMA DE CIDADANIA CASCAIS]</text:p>
          </table:table-cell>
          <table:table-cell office:value-type="string" table:style-name="ce8">
            <text:p>[scmi - Ser Cascais - <text:s/>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506" table:style-name="ce9">
            <text:p>110506</text:p>
          </table:table-cell>
          <table:table-cell office:value-type="string" table:style-name="ce1">
            <text:p>Cascais</text:p>
          </table:table-cell>
          <table:table-cell office:value-type="string" table:style-name="ce8">
            <text:p>São Domingos de Ran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VIVA CASCAIS]</text:p>
          </table:table-cell>
          <table:table-cell office:value-type="string" table:style-name="ce1">
            <text:p>[PPM/PPV/PND - PLATAFORMA DE CIDADANIA CASCAIS]</text:p>
          </table:table-cell>
          <table:table-cell office:value-type="string" table:style-name="ce8">
            <text:p>[scmi - Ser Cascais - <text:s/>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507" table:style-name="ce9">
            <text:p>110507</text:p>
          </table:table-cell>
          <table:table-cell office:value-type="string" table:style-name="ce1">
            <text:p>Cascais</text:p>
          </table:table-cell>
          <table:table-cell office:value-type="string" table:style-name="ce8">
            <text:p>União das freguesias de Carcavelos e Pare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VIVA CASCAIS]</text:p>
          </table:table-cell>
          <table:table-cell office:value-type="string" table:style-name="ce1">
            <text:p>[PPM/PPV/PND - PLATAFORMA DE CIDADANIA CASCAIS]</text:p>
          </table:table-cell>
          <table:table-cell office:value-type="string" table:style-name="ce8">
            <text:p>[scmi - Ser Cascais - <text:s/>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508" table:style-name="ce9">
            <text:p>110508</text:p>
          </table:table-cell>
          <table:table-cell office:value-type="string" table:style-name="ce1">
            <text:p>Cascais</text:p>
          </table:table-cell>
          <table:table-cell office:value-type="string" table:style-name="ce8">
            <text:p>União das freguesias de Cascais e Estori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VIVA CASCAIS]</text:p>
          </table:table-cell>
          <table:table-cell office:value-type="string" table:style-name="ce1">
            <text:p>[PPM/PPV/PND - PLATAFORMA DE CIDADANIA CASCAIS]</text:p>
          </table:table-cell>
          <table:table-cell office:value-type="string" table:style-name="ce8">
            <text:p>[scmi - Ser Cascais - <text:s/>Moviment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00" table:style-name="ce9">
            <text:p>110600</text:p>
          </table:table-cell>
          <table:table-cell office:value-type="string" table:style-name="ce1">
            <text:p>Lisbo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00" table:style-name="ce9">
            <text:p>110600</text:p>
          </table:table-cell>
          <table:table-cell office:value-type="string" table:style-name="ce1">
            <text:p>Lisbo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01" table:style-name="ce9">
            <text:p>110601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Ajud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02" table:style-name="ce9">
            <text:p>110602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Alcânta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office:value-type="string" table:style-name="ce8">
            <text:p>[maca - Move Alcântra - Cidadãos Por Alcântra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07" table:style-name="ce9">
            <text:p>110607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Bea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08" table:style-name="ce9">
            <text:p>110608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Benfi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10" table:style-name="ce9">
            <text:p>110610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Campoli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11" table:style-name="ce9">
            <text:p>110611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Carni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18" table:style-name="ce9">
            <text:p>110618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Lumi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21" table:style-name="ce9">
            <text:p>110621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Marvi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33" table:style-name="ce9">
            <text:p>110633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Oliv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table:style-name="ce1"/>
          <table:table-cell office:value-type="string" table:style-name="ce8">
            <text:p>[oct - Olivais Com To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39" table:style-name="ce9">
            <text:p>110639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São Domingos de Benfi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54" table:style-name="ce9">
            <text:p>110654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Alvala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55" table:style-name="ce9">
            <text:p>110655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Are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56" table:style-name="ce9">
            <text:p>110656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Arroi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57" table:style-name="ce9">
            <text:p>110657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Avenidas Nov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office:value-type="string" table:style-name="ce8">
            <text:p>[ifans - Idalina Flora - Avenidas Novas Semp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58" table:style-name="ce9">
            <text:p>110658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Belé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59" table:style-name="ce9">
            <text:p>110659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Campo de Ouriqu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60" table:style-name="ce9">
            <text:p>110660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Estr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office:value-type="string" table:style-name="ce8">
            <text:p>[MaisEstrela - MaisEstre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61" table:style-name="ce9">
            <text:p>110661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Misericórd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62" table:style-name="ce9">
            <text:p>110662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Parque das Naç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office:value-type="string" table:style-name="ce8">
            <text:p>[PNPN - Parque das Nações Por Nó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63" table:style-name="ce9">
            <text:p>110663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Penha de Fran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office:value-type="string" table:style-name="ce8">
            <text:p>[MAPES - Mais Penha e São Jo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64" table:style-name="ce9">
            <text:p>110664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Santa Cla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65" table:style-name="ce9">
            <text:p>110665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Santa Maria Maio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office:value-type="string" table:style-name="ce1">
            <text:p>[PPM/PPV/PND - PLATAFORMA DE CIDADANIA LISBOA]</text:p>
          </table:table-cell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66" table:style-name="ce9">
            <text:p>110666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Santo Antóni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667" table:style-name="ce9">
            <text:p>110667</text:p>
          </table:table-cell>
          <table:table-cell office:value-type="string" table:style-name="ce1">
            <text:p>Lisboa</text:p>
          </table:table-cell>
          <table:table-cell office:value-type="string" table:style-name="ce8">
            <text:p>São Vice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ENTIR LISBO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00" table:style-name="ce9">
            <text:p>110700</text:p>
          </table:table-cell>
          <table:table-cell office:value-type="string" table:style-name="ce1">
            <text:p>Loure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00" table:style-name="ce9">
            <text:p>110700</text:p>
          </table:table-cell>
          <table:table-cell office:value-type="string" table:style-name="ce1">
            <text:p>Loure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02" table:style-name="ce9">
            <text:p>110702</text:p>
          </table:table-cell>
          <table:table-cell office:value-type="string" table:style-name="ce1">
            <text:p>Loures</text:p>
          </table:table-cell>
          <table:table-cell office:value-type="string" table:style-name="ce8">
            <text:p>Buc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05" table:style-name="ce9">
            <text:p>110705</text:p>
          </table:table-cell>
          <table:table-cell office:value-type="string" table:style-name="ce1">
            <text:p>Loures</text:p>
          </table:table-cell>
          <table:table-cell office:value-type="string" table:style-name="ce8">
            <text:p>Fanh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07" table:style-name="ce9">
            <text:p>110707</text:p>
          </table:table-cell>
          <table:table-cell office:value-type="string" table:style-name="ce1">
            <text:p>Loures</text:p>
          </table:table-cell>
          <table:table-cell office:value-type="string" table:style-name="ce8">
            <text:p>Lou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08" table:style-name="ce9">
            <text:p>110708</text:p>
          </table:table-cell>
          <table:table-cell office:value-type="string" table:style-name="ce1">
            <text:p>Loures</text:p>
          </table:table-cell>
          <table:table-cell office:value-type="string" table:style-name="ce8">
            <text:p>Lou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26" table:style-name="ce9">
            <text:p>110726</text:p>
          </table:table-cell>
          <table:table-cell office:value-type="string" table:style-name="ce1">
            <text:p>Loures</text:p>
          </table:table-cell>
          <table:table-cell office:value-type="string" table:style-name="ce8">
            <text:p>União das freguesias de Moscavide e Port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27" table:style-name="ce9">
            <text:p>110727</text:p>
          </table:table-cell>
          <table:table-cell office:value-type="string" table:style-name="ce1">
            <text:p>Loures</text:p>
          </table:table-cell>
          <table:table-cell office:value-type="string" table:style-name="ce8">
            <text:p>União das freguesias de Sacavém e Prior Vel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28" table:style-name="ce9">
            <text:p>110728</text:p>
          </table:table-cell>
          <table:table-cell office:value-type="string" table:style-name="ce1">
            <text:p>Loures</text:p>
          </table:table-cell>
          <table:table-cell office:value-type="string" table:style-name="ce8">
            <text:p>União das freguesias de Santa Iria de Azoia, São João da Talha e Bobad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29" table:style-name="ce9">
            <text:p>110729</text:p>
          </table:table-cell>
          <table:table-cell office:value-type="string" table:style-name="ce1">
            <text:p>Loures</text:p>
          </table:table-cell>
          <table:table-cell office:value-type="string" table:style-name="ce8">
            <text:p>União das freguesias de Santo Antão e São Julião do Toj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30" table:style-name="ce9">
            <text:p>110730</text:p>
          </table:table-cell>
          <table:table-cell office:value-type="string" table:style-name="ce1">
            <text:p>Loures</text:p>
          </table:table-cell>
          <table:table-cell office:value-type="string" table:style-name="ce8">
            <text:p>União das freguesias de Santo António dos Cavaleiros e Fri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731" table:style-name="ce9">
            <text:p>110731</text:p>
          </table:table-cell>
          <table:table-cell office:value-type="string" table:style-name="ce1">
            <text:p>Loures</text:p>
          </table:table-cell>
          <table:table-cell office:value-type="string" table:style-name="ce8">
            <text:p>União das freguesias de Camarate, Unhos e Apelaç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LOURES SABE MUDA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800" table:style-name="ce9">
            <text:p>110800</text:p>
          </table:table-cell>
          <table:table-cell office:value-type="string" table:style-name="ce1">
            <text:p>Lourinhã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AIS LOURINHÃ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800" table:style-name="ce9">
            <text:p>110800</text:p>
          </table:table-cell>
          <table:table-cell office:value-type="string" table:style-name="ce1">
            <text:p>Lourinhã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AIS LOURINHÃ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803" table:style-name="ce9">
            <text:p>110803</text:p>
          </table:table-cell>
          <table:table-cell office:value-type="string" table:style-name="ce1">
            <text:p>Lourinhã</text:p>
          </table:table-cell>
          <table:table-cell office:value-type="string" table:style-name="ce8">
            <text:p>Moita dos Ferrei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LOURINHÃ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805" table:style-name="ce9">
            <text:p>110805</text:p>
          </table:table-cell>
          <table:table-cell office:value-type="string" table:style-name="ce1">
            <text:p>Lourinhã</text:p>
          </table:table-cell>
          <table:table-cell office:value-type="string" table:style-name="ce8">
            <text:p>Reguengo Gra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LOURINHÃ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806" table:style-name="ce9">
            <text:p>110806</text:p>
          </table:table-cell>
          <table:table-cell office:value-type="string" table:style-name="ce1">
            <text:p>Lourinhã</text:p>
          </table:table-cell>
          <table:table-cell office:value-type="string" table:style-name="ce8">
            <text:p>Santa Bárba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LOURINHÃ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808" table:style-name="ce9">
            <text:p>110808</text:p>
          </table:table-cell>
          <table:table-cell office:value-type="string" table:style-name="ce1">
            <text:p>Lourinhã</text:p>
          </table:table-cell>
          <table:table-cell office:value-type="string" table:style-name="ce8">
            <text:p>Vim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LOURINHÃ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810" table:style-name="ce9">
            <text:p>110810</text:p>
          </table:table-cell>
          <table:table-cell office:value-type="string" table:style-name="ce1">
            <text:p>Lourinhã</text:p>
          </table:table-cell>
          <table:table-cell office:value-type="string" table:style-name="ce8">
            <text:p>Ribam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LOURINHÃ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812" table:style-name="ce9">
            <text:p>110812</text:p>
          </table:table-cell>
          <table:table-cell office:value-type="string" table:style-name="ce1">
            <text:p>Lourinhã</text:p>
          </table:table-cell>
          <table:table-cell office:value-type="string" table:style-name="ce8">
            <text:p>União das freguesias de Lourinhã e Atala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LOURINHÃ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813" table:style-name="ce9">
            <text:p>110813</text:p>
          </table:table-cell>
          <table:table-cell office:value-type="string" table:style-name="ce1">
            <text:p>Lourinhã</text:p>
          </table:table-cell>
          <table:table-cell office:value-type="string" table:style-name="ce8">
            <text:p>União das freguesias de Miragaia e Martel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LOURINHÃ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814" table:style-name="ce9">
            <text:p>110814</text:p>
          </table:table-cell>
          <table:table-cell office:value-type="string" table:style-name="ce1">
            <text:p>Lourinhã</text:p>
          </table:table-cell>
          <table:table-cell office:value-type="string" table:style-name="ce8">
            <text:p>União das freguesias de São Bartolomeu dos Galegos e Mol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LOURINHÃ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00" table:style-name="ce9">
            <text:p>110900</text:p>
          </table:table-cell>
          <table:table-cell office:value-type="string" table:style-name="ce1">
            <text:p>Maf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00" table:style-name="ce9">
            <text:p>110900</text:p>
          </table:table-cell>
          <table:table-cell office:value-type="string" table:style-name="ce1">
            <text:p>Maf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02" table:style-name="ce9">
            <text:p>110902</text:p>
          </table:table-cell>
          <table:table-cell office:value-type="string" table:style-name="ce1">
            <text:p>Mafra</text:p>
          </table:table-cell>
          <table:table-cell office:value-type="string" table:style-name="ce8">
            <text:p>Carvo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04" table:style-name="ce9">
            <text:p>110904</text:p>
          </table:table-cell>
          <table:table-cell office:value-type="string" table:style-name="ce1">
            <text:p>Mafra</text:p>
          </table:table-cell>
          <table:table-cell office:value-type="string" table:style-name="ce8">
            <text:p>Encarnaç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06" table:style-name="ce9">
            <text:p>110906</text:p>
          </table:table-cell>
          <table:table-cell office:value-type="string" table:style-name="ce1">
            <text:p>Mafra</text:p>
          </table:table-cell>
          <table:table-cell office:value-type="string" table:style-name="ce8">
            <text:p>Eric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office:value-type="string" table:style-name="ce8">
            <text:p>[pef - Pela Ericeira Fregues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09" table:style-name="ce9">
            <text:p>110909</text:p>
          </table:table-cell>
          <table:table-cell office:value-type="string" table:style-name="ce1">
            <text:p>Mafra</text:p>
          </table:table-cell>
          <table:table-cell office:value-type="string" table:style-name="ce8">
            <text:p>Maf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11" table:style-name="ce9">
            <text:p>110911</text:p>
          </table:table-cell>
          <table:table-cell office:value-type="string" table:style-name="ce1">
            <text:p>Mafra</text:p>
          </table:table-cell>
          <table:table-cell office:value-type="string" table:style-name="ce8">
            <text:p>Milhara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13" table:style-name="ce9">
            <text:p>110913</text:p>
          </table:table-cell>
          <table:table-cell office:value-type="string" table:style-name="ce1">
            <text:p>Mafra</text:p>
          </table:table-cell>
          <table:table-cell office:value-type="string" table:style-name="ce8">
            <text:p>Santo Isido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18" table:style-name="ce9">
            <text:p>110918</text:p>
          </table:table-cell>
          <table:table-cell office:value-type="string" table:style-name="ce1">
            <text:p>Mafra</text:p>
          </table:table-cell>
          <table:table-cell office:value-type="string" table:style-name="ce8">
            <text:p>União das freguesias de Azueira e Sobral da Abelh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19" table:style-name="ce9">
            <text:p>110919</text:p>
          </table:table-cell>
          <table:table-cell office:value-type="string" table:style-name="ce1">
            <text:p>Mafra</text:p>
          </table:table-cell>
          <table:table-cell office:value-type="string" table:style-name="ce8">
            <text:p>União das freguesias de Enxara do Bispo, Gradil e Vila Franca do Rosári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20" table:style-name="ce9">
            <text:p>110920</text:p>
          </table:table-cell>
          <table:table-cell office:value-type="string" table:style-name="ce1">
            <text:p>Mafra</text:p>
          </table:table-cell>
          <table:table-cell office:value-type="string" table:style-name="ce8">
            <text:p>União das freguesias de Igreja Nova e Chelei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21" table:style-name="ce9">
            <text:p>110921</text:p>
          </table:table-cell>
          <table:table-cell office:value-type="string" table:style-name="ce1">
            <text:p>Mafra</text:p>
          </table:table-cell>
          <table:table-cell office:value-type="string" table:style-name="ce8">
            <text:p>União das freguesias de Malveira e São Miguel de Alcain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0922" table:style-name="ce9">
            <text:p>110922</text:p>
          </table:table-cell>
          <table:table-cell office:value-type="string" table:style-name="ce1">
            <text:p>Mafra</text:p>
          </table:table-cell>
          <table:table-cell office:value-type="string" table:style-name="ce8">
            <text:p>União das freguesias de Venda do Pinheiro e Santo Estêvão das Galé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Mafra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00" table:style-name="ce9">
            <text:p>111000</text:p>
          </table:table-cell>
          <table:table-cell office:value-type="string" table:style-name="ce1">
            <text:p>Oeiras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IOMAF - Isaltino Oeiras Mais À Fr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00" table:style-name="ce9">
            <text:p>111000</text:p>
          </table:table-cell>
          <table:table-cell office:value-type="string" table:style-name="ce1">
            <text:p>Oeiras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IOMAF - Isaltino Oeiras Mais À Fr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02" table:style-name="ce9">
            <text:p>111002</text:p>
          </table:table-cell>
          <table:table-cell office:value-type="string" table:style-name="ce1">
            <text:p>Oeiras</text:p>
          </table:table-cell>
          <table:table-cell office:value-type="string" table:style-name="ce8">
            <text:p>Barcaren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OMAF - Isaltino Oeiras Mais À Fr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09" table:style-name="ce9">
            <text:p>111009</text:p>
          </table:table-cell>
          <table:table-cell office:value-type="string" table:style-name="ce1">
            <text:p>Oeiras</text:p>
          </table:table-cell>
          <table:table-cell office:value-type="string" table:style-name="ce8">
            <text:p>Porto Salv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OMAF - Isaltino Oeiras Mais À Frente]</text:p>
          </table:table-cell>
          <table:table-cell office:value-type="string" table:style-name="ce1">
            <text:p>[MMS - Movimento Mudança Sustentável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12" table:style-name="ce9">
            <text:p>111012</text:p>
          </table:table-cell>
          <table:table-cell office:value-type="string" table:style-name="ce1">
            <text:p>Oeiras</text:p>
          </table:table-cell>
          <table:table-cell office:value-type="string" table:style-name="ce8">
            <text:p>União das freguesias de Algés, Linda-a-Velha e Cruz Quebrada-Dafun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OMAF - Isaltino Oeiras Mais À Fr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13" table:style-name="ce9">
            <text:p>111013</text:p>
          </table:table-cell>
          <table:table-cell office:value-type="string" table:style-name="ce1">
            <text:p>Oeiras</text:p>
          </table:table-cell>
          <table:table-cell office:value-type="string" table:style-name="ce8">
            <text:p>União das freguesias de Carnaxide e Queij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OMAF - Isaltino Oeiras Mais À Fr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014" table:style-name="ce9">
            <text:p>111014</text:p>
          </table:table-cell>
          <table:table-cell office:value-type="string" table:style-name="ce1">
            <text:p>Oeiras</text:p>
          </table:table-cell>
          <table:table-cell office:value-type="string" table:style-name="ce8">
            <text:p>União das freguesias de Oeiras e São Julião da Barra, Paço de Arcos e Caxi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OMAF - Isaltino Oeiras Mais À Frente]</text:p>
          </table:table-cell>
          <table:table-cell office:value-type="string" table:style-name="ce1">
            <text:p>[MMS - Movimento Mudança Sustentável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00" table:style-name="ce9">
            <text:p>111100</text:p>
          </table:table-cell>
          <table:table-cell office:value-type="string" table:style-name="ce1">
            <text:p>Sint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office:value-type="string" table:style-name="ce1">
            <text:p>[spci - Sintra Paixão Com Independênc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00" table:style-name="ce9">
            <text:p>111100</text:p>
          </table:table-cell>
          <table:table-cell office:value-type="string" table:style-name="ce1">
            <text:p>Sint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office:value-type="string" table:style-name="ce1">
            <text:p>[spci - Sintra Paixão Com Independênc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02" table:style-name="ce9">
            <text:p>111102</text:p>
          </table:table-cell>
          <table:table-cell office:value-type="string" table:style-name="ce1">
            <text:p>Sintra</text:p>
          </table:table-cell>
          <table:table-cell office:value-type="string" table:style-name="ce8">
            <text:p>Algueirão-Mem Martin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M.U.D.A. - Movimento Unido pela Democracia Activa]</text:p>
          </table:table-cell>
          <table:table-cell office:value-type="string" table:style-name="ce1">
            <text:p>[scma - Sintrenses Com Marco Almeida]</text:p>
          </table:table-cell>
          <table:table-cell office:value-type="string" table:style-name="ce8">
            <text:p>[spci - Sintra Paixão Com Independência]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11105" table:style-name="ce9">
            <text:p>111105</text:p>
          </table:table-cell>
          <table:table-cell office:value-type="string" table:style-name="ce1">
            <text:p>Sintra</text:p>
          </table:table-cell>
          <table:table-cell office:value-type="string" table:style-name="ce8">
            <text:p>Cola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08" table:style-name="ce9">
            <text:p>111108</text:p>
          </table:table-cell>
          <table:table-cell office:value-type="string" table:style-name="ce1">
            <text:p>Sintra</text:p>
          </table:table-cell>
          <table:table-cell office:value-type="string" table:style-name="ce8">
            <text:p>Rio de Mou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office:value-type="string" table:style-name="ce1">
            <text:p>[spci - Sintra Paixão Com Independênc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15" table:style-name="ce9">
            <text:p>111115</text:p>
          </table:table-cell>
          <table:table-cell office:value-type="string" table:style-name="ce1">
            <text:p>Sintra</text:p>
          </table:table-cell>
          <table:table-cell office:value-type="string" table:style-name="ce8">
            <text:p>Casal de Camb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22" table:style-name="ce9">
            <text:p>111122</text:p>
          </table:table-cell>
          <table:table-cell office:value-type="string" table:style-name="ce1">
            <text:p>Sintra</text:p>
          </table:table-cell>
          <table:table-cell office:value-type="string" table:style-name="ce8">
            <text:p>União das freguesias de Agualva e Mira-Sint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office:value-type="string" table:style-name="ce1">
            <text:p>[spci - Sintra Paixão Com Independênc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23" table:style-name="ce9">
            <text:p>111123</text:p>
          </table:table-cell>
          <table:table-cell office:value-type="string" table:style-name="ce1">
            <text:p>Sintra</text:p>
          </table:table-cell>
          <table:table-cell office:value-type="string" table:style-name="ce8">
            <text:p>União das freguesias de Almargem do Bispo, Pêro Pinheiro e Montelav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office:value-type="string" table:style-name="ce1">
            <text:p>[spci - Sintra Paixão Com Independênc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24" table:style-name="ce9">
            <text:p>111124</text:p>
          </table:table-cell>
          <table:table-cell office:value-type="string" table:style-name="ce1">
            <text:p>Sintra</text:p>
          </table:table-cell>
          <table:table-cell office:value-type="string" table:style-name="ce8">
            <text:p>União das freguesias do Cacém e São Marc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25" table:style-name="ce9">
            <text:p>111125</text:p>
          </table:table-cell>
          <table:table-cell office:value-type="string" table:style-name="ce1">
            <text:p>Sintra</text:p>
          </table:table-cell>
          <table:table-cell office:value-type="string" table:style-name="ce8">
            <text:p>União das freguesias de Massamá e Monte Abra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office:value-type="string" table:style-name="ce1">
            <text:p>[spci - Sintra Paixão Com Independênc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26" table:style-name="ce9">
            <text:p>111126</text:p>
          </table:table-cell>
          <table:table-cell office:value-type="string" table:style-name="ce1">
            <text:p>Sintra</text:p>
          </table:table-cell>
          <table:table-cell office:value-type="string" table:style-name="ce8">
            <text:p>União das freguesias de Queluz e B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office:value-type="string" table:style-name="ce1">
            <text:p>[spci - Sintra Paixão Com Independênc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27" table:style-name="ce9">
            <text:p>111127</text:p>
          </table:table-cell>
          <table:table-cell office:value-type="string" table:style-name="ce1">
            <text:p>Sintra</text:p>
          </table:table-cell>
          <table:table-cell office:value-type="string" table:style-name="ce8">
            <text:p>União das freguesias de São João das Lampas e Terruge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office:value-type="string" table:style-name="ce1">
            <text:p>[spci - Sintra Paixão Com Independênc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128" table:style-name="ce9">
            <text:p>111128</text:p>
          </table:table-cell>
          <table:table-cell office:value-type="string" table:style-name="ce1">
            <text:p>Sintra</text:p>
          </table:table-cell>
          <table:table-cell office:value-type="string" table:style-name="ce8">
            <text:p>União das freguesias de Sintra (Santa Maria e São Miguel, São Martinho e São Pedro de Penaferrim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SINTRA PODE MAIS]</text:p>
          </table:table-cell>
          <table:table-cell table:style-name="ce1"/>
          <table:table-cell office:value-type="string" table:style-name="ce8">
            <text:p>[scma - Sintrenses Com Marco Almeida]</text:p>
          </table:table-cell>
          <table:table-cell office:value-type="string" table:style-name="ce1">
            <text:p>[spci - Sintra Paixão Com Independênc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200" table:style-name="ce9">
            <text:p>111200</text:p>
          </table:table-cell>
          <table:table-cell office:value-type="string" table:style-name="ce1">
            <text:p>Sobral de Monte Agraç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200" table:style-name="ce9">
            <text:p>111200</text:p>
          </table:table-cell>
          <table:table-cell office:value-type="string" table:style-name="ce1">
            <text:p>Sobral de Monte Agraç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201" table:style-name="ce9">
            <text:p>111201</text:p>
          </table:table-cell>
          <table:table-cell office:value-type="string" table:style-name="ce1">
            <text:p>Sobral de Monte Agraço</text:p>
          </table:table-cell>
          <table:table-cell office:value-type="string" table:style-name="ce8">
            <text:p>Santo Quintin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202" table:style-name="ce9">
            <text:p>111202</text:p>
          </table:table-cell>
          <table:table-cell office:value-type="string" table:style-name="ce1">
            <text:p>Sobral de Monte Agraço</text:p>
          </table:table-cell>
          <table:table-cell office:value-type="string" table:style-name="ce8">
            <text:p>Sapatar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203" table:style-name="ce9">
            <text:p>111203</text:p>
          </table:table-cell>
          <table:table-cell office:value-type="string" table:style-name="ce1">
            <text:p>Sobral de Monte Agraço</text:p>
          </table:table-cell>
          <table:table-cell office:value-type="string" table:style-name="ce8">
            <text:p>Sobral de Monte Agraç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00" table:style-name="ce9">
            <text:p>111300</text:p>
          </table:table-cell>
          <table:table-cell office:value-type="string" table:style-name="ce1">
            <text:p>Torres Vedra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MPT.PPM - Soluções Claras]</text:p>
          </table:table-cell>
          <table:table-cell table:style-name="ce1"/>
          <table:table-cell office:value-type="string" table:style-name="ce8">
            <text:p>[tnl - TORRES NAS LINH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00" table:style-name="ce9">
            <text:p>111300</text:p>
          </table:table-cell>
          <table:table-cell office:value-type="string" table:style-name="ce1">
            <text:p>Torres Vedra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MPT.PPM - Soluções Claras]</text:p>
          </table:table-cell>
          <table:table-cell table:style-name="ce1"/>
          <table:table-cell office:value-type="string" table:style-name="ce8">
            <text:p>[tnl - TORRES NAS LINH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06" table:style-name="ce9">
            <text:p>111306</text:p>
          </table:table-cell>
          <table:table-cell office:value-type="string" table:style-name="ce1">
            <text:p>Torres Vedras</text:p>
          </table:table-cell>
          <table:table-cell office:value-type="string" table:style-name="ce8">
            <text:p>Freir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oluções Clar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10" table:style-name="ce9">
            <text:p>111310</text:p>
          </table:table-cell>
          <table:table-cell office:value-type="string" table:style-name="ce1">
            <text:p>Torres Vedras</text:p>
          </table:table-cell>
          <table:table-cell office:value-type="string" table:style-name="ce8">
            <text:p>Ponte do Ro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pr - Juntos por Ponte do Ro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11" table:style-name="ce9">
            <text:p>111311</text:p>
          </table:table-cell>
          <table:table-cell office:value-type="string" table:style-name="ce1">
            <text:p>Torres Vedras</text:p>
          </table:table-cell>
          <table:table-cell office:value-type="string" table:style-name="ce8">
            <text:p>Ramalh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oluções Claras]</text:p>
          </table:table-cell>
          <table:table-cell table:style-name="ce1"/>
          <table:table-cell office:value-type="string" table:style-name="ce8">
            <text:p>[upf - UNIDOS PELA FREGUES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14" table:style-name="ce9">
            <text:p>111314</text:p>
          </table:table-cell>
          <table:table-cell office:value-type="string" table:style-name="ce1">
            <text:p>Torres Vedras</text:p>
          </table:table-cell>
          <table:table-cell office:value-type="string" table:style-name="ce8">
            <text:p>São Pedro da Cad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oluções Clar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16" table:style-name="ce9">
            <text:p>111316</text:p>
          </table:table-cell>
          <table:table-cell office:value-type="string" table:style-name="ce1">
            <text:p>Torres Vedras</text:p>
          </table:table-cell>
          <table:table-cell office:value-type="string" table:style-name="ce8">
            <text:p>Silv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oluções Clar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17" table:style-name="ce9">
            <text:p>111317</text:p>
          </table:table-cell>
          <table:table-cell office:value-type="string" table:style-name="ce1">
            <text:p>Torres Vedras</text:p>
          </table:table-cell>
          <table:table-cell office:value-type="string" table:style-name="ce8">
            <text:p>Turcif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oluções Clar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18" table:style-name="ce9">
            <text:p>111318</text:p>
          </table:table-cell>
          <table:table-cell office:value-type="string" table:style-name="ce1">
            <text:p>Torres Vedras</text:p>
          </table:table-cell>
          <table:table-cell office:value-type="string" table:style-name="ce8">
            <text:p>Vent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oluções Claras]</text:p>
          </table:table-cell>
          <table:table-cell table:style-name="ce1"/>
          <table:table-cell office:value-type="string" table:style-name="ce8">
            <text:p>[tnl - TORRES NAS LINH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21" table:style-name="ce9">
            <text:p>111321</text:p>
          </table:table-cell>
          <table:table-cell office:value-type="string" table:style-name="ce1">
            <text:p>Torres Vedras</text:p>
          </table:table-cell>
          <table:table-cell office:value-type="string" table:style-name="ce8">
            <text:p>União das freguesias de A dos Cunhados e Mac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oluções Clar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23" table:style-name="ce9">
            <text:p>111323</text:p>
          </table:table-cell>
          <table:table-cell office:value-type="string" table:style-name="ce1">
            <text:p>Torres Vedras</text:p>
          </table:table-cell>
          <table:table-cell office:value-type="string" table:style-name="ce8">
            <text:p>União das freguesias de Carvoeira e Carm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oluções Clar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24" table:style-name="ce9">
            <text:p>111324</text:p>
          </table:table-cell>
          <table:table-cell office:value-type="string" table:style-name="ce1">
            <text:p>Torres Vedras</text:p>
          </table:table-cell>
          <table:table-cell office:value-type="string" table:style-name="ce8">
            <text:p>União das freguesias de Dois Portos e Run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Soluções Claras]</text:p>
          </table:table-cell>
          <table:table-cell table:style-name="ce1"/>
          <table:table-cell office:value-type="string" table:style-name="ce8">
            <text:p>[upm - UNIÃO PELA MUD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326" table:style-name="ce9">
            <text:p>111326</text:p>
          </table:table-cell>
          <table:table-cell office:value-type="string" table:style-name="ce1">
            <text:p>Torres Vedras</text:p>
          </table:table-cell>
          <table:table-cell office:value-type="string" table:style-name="ce8">
            <text:p>União das freguesias de Torres Vedras (São Pedro, Santiago, Santa Maria do Castelo e São Miguel) e Matac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t - Juntos por Todos]</text:p>
          </table:table-cell>
          <table:table-cell office:value-type="string" table:style-name="ce1">
            <text:p>[tnl - TORRES NAS LINHA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400" table:style-name="ce9">
            <text:p>111400</text:p>
          </table:table-cell>
          <table:table-cell office:value-type="string" table:style-name="ce1">
            <text:p>Vila Franca de Xi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MPT.PPM - COLIGAÇÃO NOVO RUM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400" table:style-name="ce9">
            <text:p>111400</text:p>
          </table:table-cell>
          <table:table-cell office:value-type="string" table:style-name="ce1">
            <text:p>Vila Franca de Xi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MPT.PPM - COLIGAÇÃO NOVO RUM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408" table:style-name="ce9">
            <text:p>111408</text:p>
          </table:table-cell>
          <table:table-cell office:value-type="string" table:style-name="ce1">
            <text:p>Vila Franca de Xira</text:p>
          </table:table-cell>
          <table:table-cell office:value-type="string" table:style-name="ce8">
            <text:p>Vialong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COLIGAÇÃO NOVO RUM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409" table:style-name="ce9">
            <text:p>111409</text:p>
          </table:table-cell>
          <table:table-cell office:value-type="string" table:style-name="ce1">
            <text:p>Vila Franca de Xira</text:p>
          </table:table-cell>
          <table:table-cell office:value-type="string" table:style-name="ce8">
            <text:p>Vila Franca de X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COLIGAÇÃO NOVO RUM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412" table:style-name="ce9">
            <text:p>111412</text:p>
          </table:table-cell>
          <table:table-cell office:value-type="string" table:style-name="ce1">
            <text:p>Vila Franca de Xira</text:p>
          </table:table-cell>
          <table:table-cell office:value-type="string" table:style-name="ce8">
            <text:p>União das freguesias de Alhandra, São João dos Montes e Calhandri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COLIGAÇÃO NOVO RUM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413" table:style-name="ce9">
            <text:p>111413</text:p>
          </table:table-cell>
          <table:table-cell office:value-type="string" table:style-name="ce1">
            <text:p>Vila Franca de Xira</text:p>
          </table:table-cell>
          <table:table-cell office:value-type="string" table:style-name="ce8">
            <text:p>União das freguesias de Alverca do Ribatejo e Sobral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COLIGAÇÃO NOVO RUMO]</text:p>
          </table:table-cell>
          <table:table-cell table:style-name="ce1"/>
          <table:table-cell office:value-type="string" table:style-name="ce8">
            <text:p>[mcdas - Movimento Comunidades Democráticas - Alverca e Sobralinh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414" table:style-name="ce9">
            <text:p>111414</text:p>
          </table:table-cell>
          <table:table-cell office:value-type="string" table:style-name="ce1">
            <text:p>Vila Franca de Xira</text:p>
          </table:table-cell>
          <table:table-cell office:value-type="string" table:style-name="ce8">
            <text:p>União das freguesias de Castanheira do Ribatejo e Cachoeir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COLIGAÇÃO NOVO RUM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415" table:style-name="ce9">
            <text:p>111415</text:p>
          </table:table-cell>
          <table:table-cell office:value-type="string" table:style-name="ce1">
            <text:p>Vila Franca de Xira</text:p>
          </table:table-cell>
          <table:table-cell office:value-type="string" table:style-name="ce8">
            <text:p>União das freguesias de Póvoa de Santa Iria e Forte da Ca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.PPM - COLIGAÇÃO NOVO RUM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500" table:style-name="ce9">
            <text:p>111500</text:p>
          </table:table-cell>
          <table:table-cell office:value-type="string" table:style-name="ce1">
            <text:p>Amado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AMADOR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500" table:style-name="ce9">
            <text:p>111500</text:p>
          </table:table-cell>
          <table:table-cell office:value-type="string" table:style-name="ce1">
            <text:p>Amado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AMADOR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512" table:style-name="ce9">
            <text:p>111512</text:p>
          </table:table-cell>
          <table:table-cell office:value-type="string" table:style-name="ce1">
            <text:p>Amadora</text:p>
          </table:table-cell>
          <table:table-cell office:value-type="string" table:style-name="ce8">
            <text:p>Alfragi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MADOR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513" table:style-name="ce9">
            <text:p>111513</text:p>
          </table:table-cell>
          <table:table-cell office:value-type="string" table:style-name="ce1">
            <text:p>Amadora</text:p>
          </table:table-cell>
          <table:table-cell office:value-type="string" table:style-name="ce8">
            <text:p>Águas Liv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MADORA MAIS]</text:p>
          </table:table-cell>
          <table:table-cell table:style-name="ce1"/>
          <table:table-cell office:value-type="string" table:style-name="ce8">
            <text:p>[MIAL - Movimento Independente Águas Liv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514" table:style-name="ce9">
            <text:p>111514</text:p>
          </table:table-cell>
          <table:table-cell office:value-type="string" table:style-name="ce1">
            <text:p>Amadora</text:p>
          </table:table-cell>
          <table:table-cell office:value-type="string" table:style-name="ce8">
            <text:p>Encosta do So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MADOR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515" table:style-name="ce9">
            <text:p>111515</text:p>
          </table:table-cell>
          <table:table-cell office:value-type="string" table:style-name="ce1">
            <text:p>Amadora</text:p>
          </table:table-cell>
          <table:table-cell office:value-type="string" table:style-name="ce8">
            <text:p>Falagueira - Venda No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MADOR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516" table:style-name="ce9">
            <text:p>111516</text:p>
          </table:table-cell>
          <table:table-cell office:value-type="string" table:style-name="ce1">
            <text:p>Amadora</text:p>
          </table:table-cell>
          <table:table-cell office:value-type="string" table:style-name="ce8">
            <text:p>Mina de Águ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MADOR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517" table:style-name="ce9">
            <text:p>111517</text:p>
          </table:table-cell>
          <table:table-cell office:value-type="string" table:style-name="ce1">
            <text:p>Amadora</text:p>
          </table:table-cell>
          <table:table-cell office:value-type="string" table:style-name="ce8">
            <text:p>Vent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MADORA MAIS]</text:p>
          </table:table-cell>
          <table:table-cell table:style-name="ce1"/>
          <table:table-cell office:value-type="string" table:style-name="ce8">
            <text:p>[ma - MAIS Amado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600" table:style-name="ce9">
            <text:p>111600</text:p>
          </table:table-cell>
          <table:table-cell office:value-type="string" table:style-name="ce1">
            <text:p>Odivela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MPT.PPM - Odivelas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600" table:style-name="ce9">
            <text:p>111600</text:p>
          </table:table-cell>
          <table:table-cell office:value-type="string" table:style-name="ce1">
            <text:p>Odivela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MPT.PPM - Odivelas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603" table:style-name="ce9">
            <text:p>111603</text:p>
          </table:table-cell>
          <table:table-cell office:value-type="string" table:style-name="ce1">
            <text:p>Odivelas</text:p>
          </table:table-cell>
          <table:table-cell office:value-type="string" table:style-name="ce8">
            <text:p>Odiv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Odivelas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608" table:style-name="ce9">
            <text:p>111608</text:p>
          </table:table-cell>
          <table:table-cell office:value-type="string" table:style-name="ce1">
            <text:p>Odivelas</text:p>
          </table:table-cell>
          <table:table-cell office:value-type="string" table:style-name="ce8">
            <text:p>União das freguesias de Pontinha e Fam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Odivelas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609" table:style-name="ce9">
            <text:p>111609</text:p>
          </table:table-cell>
          <table:table-cell office:value-type="string" table:style-name="ce1">
            <text:p>Odivelas</text:p>
          </table:table-cell>
          <table:table-cell office:value-type="string" table:style-name="ce8">
            <text:p>União das freguesias de Póvoa de Santo Adrião e Olival Bas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Odivelas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11610" table:style-name="ce9">
            <text:p>111610</text:p>
          </table:table-cell>
          <table:table-cell office:value-type="string" table:style-name="ce1">
            <text:p>Odivelas</text:p>
          </table:table-cell>
          <table:table-cell office:value-type="string" table:style-name="ce8">
            <text:p>União das freguesias de Ramada e Caneç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.PPM - Odivelas Merece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0700" table:style-name="ce9">
            <text:p>120700</text:p>
          </table:table-cell>
          <table:table-cell office:value-type="string" table:style-name="ce1">
            <text:p>Elva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PPM - ELVA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0700" table:style-name="ce9">
            <text:p>120700</text:p>
          </table:table-cell>
          <table:table-cell office:value-type="string" table:style-name="ce1">
            <text:p>Elva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PPM - ELVA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0706" table:style-name="ce9">
            <text:p>120706</text:p>
          </table:table-cell>
          <table:table-cell office:value-type="string" table:style-name="ce1">
            <text:p>Elvas</text:p>
          </table:table-cell>
          <table:table-cell office:value-type="string" table:style-name="ce8">
            <text:p>Santa Eulál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ELVA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0707" table:style-name="ce9">
            <text:p>120707</text:p>
          </table:table-cell>
          <table:table-cell office:value-type="string" table:style-name="ce1">
            <text:p>Elvas</text:p>
          </table:table-cell>
          <table:table-cell office:value-type="string" table:style-name="ce8">
            <text:p>São Brás e São Lourenç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ELVA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0708" table:style-name="ce9">
            <text:p>120708</text:p>
          </table:table-cell>
          <table:table-cell office:value-type="string" table:style-name="ce1">
            <text:p>Elvas</text:p>
          </table:table-cell>
          <table:table-cell office:value-type="string" table:style-name="ce8">
            <text:p>São Vicente e Vent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ELVA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0712" table:style-name="ce9">
            <text:p>120712</text:p>
          </table:table-cell>
          <table:table-cell office:value-type="string" table:style-name="ce1">
            <text:p>Elvas</text:p>
          </table:table-cell>
          <table:table-cell office:value-type="string" table:style-name="ce8">
            <text:p>Assunção, Ajuda, Salvador e Santo Ildefons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ELVA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0713" table:style-name="ce9">
            <text:p>120713</text:p>
          </table:table-cell>
          <table:table-cell office:value-type="string" table:style-name="ce1">
            <text:p>Elvas</text:p>
          </table:table-cell>
          <table:table-cell office:value-type="string" table:style-name="ce8">
            <text:p>Caia, São Pedro e Alcáço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ELVA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0714" table:style-name="ce9">
            <text:p>120714</text:p>
          </table:table-cell>
          <table:table-cell office:value-type="string" table:style-name="ce1">
            <text:p>Elvas</text:p>
          </table:table-cell>
          <table:table-cell office:value-type="string" table:style-name="ce8">
            <text:p>União das freguesias de Barbacena e Vila Fernan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ELVAS FOR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0715" table:style-name="ce9">
            <text:p>120715</text:p>
          </table:table-cell>
          <table:table-cell office:value-type="string" table:style-name="ce1">
            <text:p>Elvas</text:p>
          </table:table-cell>
          <table:table-cell office:value-type="string" table:style-name="ce8">
            <text:p>União das freguesias de Terrugem e Vila Bo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ELVAS FORTE]</text:p>
          </table:table-cell>
          <table:table-cell table:style-name="ce1"/>
          <table:table-cell office:value-type="string" table:style-name="ce8">
            <text:p>[MAIS - Movimento Alternativo Independente Soci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100" table:style-name="ce9">
            <text:p>121100</text:p>
          </table:table-cell>
          <table:table-cell office:value-type="string" table:style-name="ce1">
            <text:p>Monforte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ONFORTE PRECISA DE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100" table:style-name="ce9">
            <text:p>121100</text:p>
          </table:table-cell>
          <table:table-cell office:value-type="string" table:style-name="ce1">
            <text:p>Monforte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ONFORTE PRECISA DE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101" table:style-name="ce9">
            <text:p>121101</text:p>
          </table:table-cell>
          <table:table-cell office:value-type="string" table:style-name="ce1">
            <text:p>Monforte</text:p>
          </table:table-cell>
          <table:table-cell office:value-type="string" table:style-name="ce8">
            <text:p>Assum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ONFORTE PRECISA DE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102" table:style-name="ce9">
            <text:p>121102</text:p>
          </table:table-cell>
          <table:table-cell office:value-type="string" table:style-name="ce1">
            <text:p>Monforte</text:p>
          </table:table-cell>
          <table:table-cell office:value-type="string" table:style-name="ce8">
            <text:p>Monfor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ONFORTE PRECISA DE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103" table:style-name="ce9">
            <text:p>121103</text:p>
          </table:table-cell>
          <table:table-cell office:value-type="string" table:style-name="ce1">
            <text:p>Monforte</text:p>
          </table:table-cell>
          <table:table-cell office:value-type="string" table:style-name="ce8">
            <text:p>Santo Aleix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ONFORTE PRECISA DE TODOS]</text:p>
          </table:table-cell>
          <table:table-cell table:style-name="ce1"/>
          <table:table-cell office:value-type="string" table:style-name="ce8">
            <text:p>[UPSA - UNIDOS POR SANTO ALEIX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104" table:style-name="ce9">
            <text:p>121104</text:p>
          </table:table-cell>
          <table:table-cell office:value-type="string" table:style-name="ce1">
            <text:p>Monforte</text:p>
          </table:table-cell>
          <table:table-cell office:value-type="string" table:style-name="ce8">
            <text:p>Vaiamo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ONFORTE PRECISA DE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200" table:style-name="ce9">
            <text:p>121200</text:p>
          </table:table-cell>
          <table:table-cell office:value-type="string" table:style-name="ce1">
            <text:p>Nis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NOVO DESTINO]</text:p>
          </table:table-cell>
          <table:table-cell table:style-name="ce1"/>
          <table:table-cell office:value-type="string" table:style-name="ce8">
            <text:p>[mimcn - Movimento Independente Mexer Com Nis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200" table:style-name="ce9">
            <text:p>121200</text:p>
          </table:table-cell>
          <table:table-cell office:value-type="string" table:style-name="ce1">
            <text:p>Nis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NOVO DESTINO]</text:p>
          </table:table-cell>
          <table:table-cell table:style-name="ce1"/>
          <table:table-cell office:value-type="string" table:style-name="ce8">
            <text:p>[mimcn - Movimento Independente Mexer Com Nis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201" table:style-name="ce9">
            <text:p>121201</text:p>
          </table:table-cell>
          <table:table-cell office:value-type="string" table:style-name="ce1">
            <text:p>Nisa</text:p>
          </table:table-cell>
          <table:table-cell office:value-type="string" table:style-name="ce8">
            <text:p>Alpalh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DESTIN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205" table:style-name="ce9">
            <text:p>121205</text:p>
          </table:table-cell>
          <table:table-cell office:value-type="string" table:style-name="ce1">
            <text:p>Nisa</text:p>
          </table:table-cell>
          <table:table-cell office:value-type="string" table:style-name="ce8">
            <text:p>Montalv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DESTIN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207" table:style-name="ce9">
            <text:p>121207</text:p>
          </table:table-cell>
          <table:table-cell office:value-type="string" table:style-name="ce1">
            <text:p>Nisa</text:p>
          </table:table-cell>
          <table:table-cell office:value-type="string" table:style-name="ce8">
            <text:p>Santan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DESTIN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208" table:style-name="ce9">
            <text:p>121208</text:p>
          </table:table-cell>
          <table:table-cell office:value-type="string" table:style-name="ce1">
            <text:p>Nisa</text:p>
          </table:table-cell>
          <table:table-cell office:value-type="string" table:style-name="ce8">
            <text:p>São Mati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DESTIN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210" table:style-name="ce9">
            <text:p>121210</text:p>
          </table:table-cell>
          <table:table-cell office:value-type="string" table:style-name="ce1">
            <text:p>Nisa</text:p>
          </table:table-cell>
          <table:table-cell office:value-type="string" table:style-name="ce8">
            <text:p>Tol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DESTIN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211" table:style-name="ce9">
            <text:p>121211</text:p>
          </table:table-cell>
          <table:table-cell office:value-type="string" table:style-name="ce1">
            <text:p>Nisa</text:p>
          </table:table-cell>
          <table:table-cell office:value-type="string" table:style-name="ce8">
            <text:p>União das freguesias de Arez e Amieira do Tej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DESTIN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212" table:style-name="ce9">
            <text:p>121212</text:p>
          </table:table-cell>
          <table:table-cell office:value-type="string" table:style-name="ce1">
            <text:p>Nisa</text:p>
          </table:table-cell>
          <table:table-cell office:value-type="string" table:style-name="ce8">
            <text:p>União das freguesias de Espírito Santo, Nossa Senhora da Graça e São Sim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DESTIN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400" table:style-name="ce9">
            <text:p>121400</text:p>
          </table:table-cell>
          <table:table-cell office:value-type="string" table:style-name="ce1">
            <text:p>Portalegre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ORTALEGRE COM ORGULHO]</text:p>
          </table:table-cell>
          <table:table-cell table:style-name="ce1"/>
          <table:table-cell office:value-type="string" table:style-name="ce8">
            <text:p>[CLIP - Candidatura Livre e Independente por Portaleg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400" table:style-name="ce9">
            <text:p>121400</text:p>
          </table:table-cell>
          <table:table-cell office:value-type="string" table:style-name="ce1">
            <text:p>Portalegre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ORTALEGRE COM ORGULHO]</text:p>
          </table:table-cell>
          <table:table-cell table:style-name="ce1"/>
          <table:table-cell office:value-type="string" table:style-name="ce8">
            <text:p>[CLIP - Candidatura Livre e Independente por Portaleg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401" table:style-name="ce9">
            <text:p>121401</text:p>
          </table:table-cell>
          <table:table-cell office:value-type="string" table:style-name="ce1">
            <text:p>Portalegre</text:p>
          </table:table-cell>
          <table:table-cell office:value-type="string" table:style-name="ce8">
            <text:p>Alago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TALEGRE COM ORGULHO]</text:p>
          </table:table-cell>
          <table:table-cell table:style-name="ce1"/>
          <table:table-cell office:value-type="string" table:style-name="ce8">
            <text:p>[CLIP - Candidatura Livre e Independente por Portaleg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402" table:style-name="ce9">
            <text:p>121402</text:p>
          </table:table-cell>
          <table:table-cell office:value-type="string" table:style-name="ce1">
            <text:p>Portalegre</text:p>
          </table:table-cell>
          <table:table-cell office:value-type="string" table:style-name="ce8">
            <text:p>Alegre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TALEGRE COM ORGULHO]</text:p>
          </table:table-cell>
          <table:table-cell table:style-name="ce1"/>
          <table:table-cell office:value-type="string" table:style-name="ce8">
            <text:p>[CLIP - Candidatura Livre e Independente por Portaleg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404" table:style-name="ce9">
            <text:p>121404</text:p>
          </table:table-cell>
          <table:table-cell office:value-type="string" table:style-name="ce1">
            <text:p>Portalegre</text:p>
          </table:table-cell>
          <table:table-cell office:value-type="string" table:style-name="ce8">
            <text:p>Forti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TALEGRE COM ORGULHO]</text:p>
          </table:table-cell>
          <table:table-cell table:style-name="ce1"/>
          <table:table-cell office:value-type="string" table:style-name="ce8">
            <text:p>[CLIP - Candidatura Livre e Independente por Portaleg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410" table:style-name="ce9">
            <text:p>121410</text:p>
          </table:table-cell>
          <table:table-cell office:value-type="string" table:style-name="ce1">
            <text:p>Portalegre</text:p>
          </table:table-cell>
          <table:table-cell office:value-type="string" table:style-name="ce8">
            <text:p>U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TALEGRE COM ORGULHO]</text:p>
          </table:table-cell>
          <table:table-cell table:style-name="ce1"/>
          <table:table-cell office:value-type="string" table:style-name="ce8">
            <text:p>[CLIP - Candidatura Livre e Independente por Portaleg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411" table:style-name="ce9">
            <text:p>121411</text:p>
          </table:table-cell>
          <table:table-cell office:value-type="string" table:style-name="ce1">
            <text:p>Portalegre</text:p>
          </table:table-cell>
          <table:table-cell office:value-type="string" table:style-name="ce8">
            <text:p>União das freguesias da Sé e São Lourenç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TALEGRE COM ORGULHO]</text:p>
          </table:table-cell>
          <table:table-cell table:style-name="ce1"/>
          <table:table-cell office:value-type="string" table:style-name="ce8">
            <text:p>[CLIP - Candidatura Livre e Independente por Portaleg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412" table:style-name="ce9">
            <text:p>121412</text:p>
          </table:table-cell>
          <table:table-cell office:value-type="string" table:style-name="ce1">
            <text:p>Portalegre</text:p>
          </table:table-cell>
          <table:table-cell office:value-type="string" table:style-name="ce8">
            <text:p>União das freguesias de Reguengo e São Juli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TALEGRE COM ORGULHO]</text:p>
          </table:table-cell>
          <table:table-cell table:style-name="ce1"/>
          <table:table-cell office:value-type="string" table:style-name="ce8">
            <text:p>[CLIP - Candidatura Livre e Independente por Portaleg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21413" table:style-name="ce9">
            <text:p>121413</text:p>
          </table:table-cell>
          <table:table-cell office:value-type="string" table:style-name="ce1">
            <text:p>Portalegre</text:p>
          </table:table-cell>
          <table:table-cell office:value-type="string" table:style-name="ce8">
            <text:p>União das freguesias de Ribeira de Nisa e Carreir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TALEGRE COM ORGULHO]</text:p>
          </table:table-cell>
          <table:table-cell table:style-name="ce1"/>
          <table:table-cell office:value-type="string" table:style-name="ce8">
            <text:p>[CLIP - Candidatura Livre e Independente por Portaleg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00" table:style-name="ce9">
            <text:p>130100</text:p>
          </table:table-cell>
          <table:table-cell office:value-type="string" table:style-name="ce1">
            <text:p>Amarante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00" table:style-name="ce9">
            <text:p>130100</text:p>
          </table:table-cell>
          <table:table-cell office:value-type="string" table:style-name="ce1">
            <text:p>Amarante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03" table:style-name="ce9">
            <text:p>130103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Ansi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JPA - Juntos por Ansiã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07" table:style-name="ce9">
            <text:p>130107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Candemi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12" table:style-name="ce9">
            <text:p>130112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Freg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15" table:style-name="ce9">
            <text:p>130115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Frid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17" table:style-name="ce9">
            <text:p>130117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Gond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18" table:style-name="ce9">
            <text:p>130118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Jaze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19" table:style-name="ce9">
            <text:p>130119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Lomb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20" table:style-name="ce9">
            <text:p>130120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Lour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21" table:style-name="ce9">
            <text:p>130121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Lufrei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23" table:style-name="ce9">
            <text:p>130123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Manc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26" table:style-name="ce9">
            <text:p>130126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Padron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28" table:style-name="ce9">
            <text:p>130128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Rebord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29" table:style-name="ce9">
            <text:p>130129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Salvador do Mo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34" table:style-name="ce9">
            <text:p>130134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Gouveia (São Sim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35" table:style-name="ce9">
            <text:p>130135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Tel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36" table:style-name="ce9">
            <text:p>130136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Travan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38" table:style-name="ce9">
            <text:p>130138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Vila Cai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39" table:style-name="ce9">
            <text:p>130139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Vila Chã do Mar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pvcm - Sempre Por Vila Chã do Mar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41" table:style-name="ce9">
            <text:p>130141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União das freguesias de Aboadela, Sanche e Várze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42" table:style-name="ce9">
            <text:p>130142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União das freguesias de Amarante (São Gonçalo), Madalena, Cepelos e Gat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43" table:style-name="ce9">
            <text:p>130143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União das freguesias de Bustelo, Carneiro e Carvalho de Rei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44" table:style-name="ce9">
            <text:p>130144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União das freguesias de Figueiró (Santiago e Santa Cristin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45" table:style-name="ce9">
            <text:p>130145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União das freguesias de Freixo de Cima e de Baix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46" table:style-name="ce9">
            <text:p>130146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União das freguesias de Olo e Canad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47" table:style-name="ce9">
            <text:p>130147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União das freguesias de Real, Ataíde e Oliv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148" table:style-name="ce9">
            <text:p>130148</text:p>
          </table:table-cell>
          <table:table-cell office:value-type="string" table:style-name="ce1">
            <text:p>Amarante</text:p>
          </table:table-cell>
          <table:table-cell office:value-type="string" table:style-name="ce8">
            <text:p>União das freguesias de Vila Garcia, Aboim e Chap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FIRMAR AMARANTE]</text:p>
          </table:table-cell>
          <table:table-cell table:style-name="ce1"/>
          <table:table-cell office:value-type="string" table:style-name="ce8">
            <text:p>[iast - Independentes Amarante Somos Todos 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226" table:style-name="ce9">
            <text:p>130226</text:p>
          </table:table-cell>
          <table:table-cell office:value-type="string" table:style-name="ce1">
            <text:p>Baião</text:p>
          </table:table-cell>
          <table:table-cell office:value-type="string" table:style-name="ce8">
            <text:p>União das freguesias de Teixeira e Teixeiró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T/MT - Mais Teixeira/Mais Teixeiró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00" table:style-name="ce9">
            <text:p>130300</text:p>
          </table:table-cell>
          <table:table-cell office:value-type="string" table:style-name="ce1">
            <text:p>Felgueira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00" table:style-name="ce9">
            <text:p>130300</text:p>
          </table:table-cell>
          <table:table-cell office:value-type="string" table:style-name="ce1">
            <text:p>Felgueira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01" table:style-name="ce9">
            <text:p>130301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Ai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02" table:style-name="ce9">
            <text:p>130302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Air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05" table:style-name="ce9">
            <text:p>130305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Fria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06" table:style-name="ce9">
            <text:p>130306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Id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07" table:style-name="ce9">
            <text:p>130307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Juguei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13" table:style-name="ce9">
            <text:p>130313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Penaco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14" table:style-name="ce9">
            <text:p>130314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Pinh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15" table:style-name="ce9">
            <text:p>130315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Pombeiro de Ribaviz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17" table:style-name="ce9">
            <text:p>130317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Refontou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18" table:style-name="ce9">
            <text:p>130318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Regil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19" table:style-name="ce9">
            <text:p>130319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Revinha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24" table:style-name="ce9">
            <text:p>130324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Send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34" table:style-name="ce9">
            <text:p>130334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União das freguesias de Macieira da Lixa e Caram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35" table:style-name="ce9">
            <text:p>130335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União das freguesias de Margaride (Santa Eulália), Várzea, Lagares, Varziela e Mour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36" table:style-name="ce9">
            <text:p>130336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União das freguesias de Pedreira, Rande e Serna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37" table:style-name="ce9">
            <text:p>130337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União das freguesias de Torrados e Sou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38" table:style-name="ce9">
            <text:p>130338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União das freguesias de Unhão e Lord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39" table:style-name="ce9">
            <text:p>130339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União das freguesias de Vila Cova da Lixa e Borba de God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40" table:style-name="ce9">
            <text:p>130340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União das freguesias de Vila Fria e Vizela (São Jorge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341" table:style-name="ce9">
            <text:p>130341</text:p>
          </table:table-cell>
          <table:table-cell office:value-type="string" table:style-name="ce1">
            <text:p>Felgueiras</text:p>
          </table:table-cell>
          <table:table-cell office:value-type="string" table:style-name="ce8">
            <text:p>União das freguesias de Vila Verde e Sant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MANTER A ESPERANÇA]</text:p>
          </table:table-cell>
          <table:table-cell table:style-name="ce1"/>
          <table:table-cell office:value-type="string" table:style-name="ce8">
            <text:p>[V - Somos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400" table:style-name="ce9">
            <text:p>130400</text:p>
          </table:table-cell>
          <table:table-cell office:value-type="string" table:style-name="ce1">
            <text:p>Gondomar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GONDOMAR COM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400" table:style-name="ce9">
            <text:p>130400</text:p>
          </table:table-cell>
          <table:table-cell office:value-type="string" table:style-name="ce1">
            <text:p>Gondomar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GONDOMAR COM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405" table:style-name="ce9">
            <text:p>130405</text:p>
          </table:table-cell>
          <table:table-cell office:value-type="string" table:style-name="ce1">
            <text:p>Gondomar</text:p>
          </table:table-cell>
          <table:table-cell office:value-type="string" table:style-name="ce8">
            <text:p>Lomb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NDOMAR COM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408" table:style-name="ce9">
            <text:p>130408</text:p>
          </table:table-cell>
          <table:table-cell office:value-type="string" table:style-name="ce1">
            <text:p>Gondomar</text:p>
          </table:table-cell>
          <table:table-cell office:value-type="string" table:style-name="ce8">
            <text:p>Rio Tin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NDOMAR COM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412" table:style-name="ce9">
            <text:p>130412</text:p>
          </table:table-cell>
          <table:table-cell office:value-type="string" table:style-name="ce1">
            <text:p>Gondomar</text:p>
          </table:table-cell>
          <table:table-cell office:value-type="string" table:style-name="ce8">
            <text:p>Baguim do Monte (Rio Tint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NDOMAR COM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413" table:style-name="ce9">
            <text:p>130413</text:p>
          </table:table-cell>
          <table:table-cell office:value-type="string" table:style-name="ce1">
            <text:p>Gondomar</text:p>
          </table:table-cell>
          <table:table-cell office:value-type="string" table:style-name="ce8">
            <text:p>União das freguesias de Fânzeres e São Pedro da Co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NDOMAR COM ESPERANÇA]</text:p>
          </table:table-cell>
          <table:table-cell table:style-name="ce1"/>
          <table:table-cell office:value-type="string" table:style-name="ce8">
            <text:p>[vdpfv - Vontade do Povo Fernanda Vi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414" table:style-name="ce9">
            <text:p>130414</text:p>
          </table:table-cell>
          <table:table-cell office:value-type="string" table:style-name="ce1">
            <text:p>Gondomar</text:p>
          </table:table-cell>
          <table:table-cell office:value-type="string" table:style-name="ce8">
            <text:p>União das freguesias de Foz do Sousa e Cov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NDOMAR COM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415" table:style-name="ce9">
            <text:p>130415</text:p>
          </table:table-cell>
          <table:table-cell office:value-type="string" table:style-name="ce1">
            <text:p>Gondomar</text:p>
          </table:table-cell>
          <table:table-cell office:value-type="string" table:style-name="ce8">
            <text:p>União das freguesias de Gondomar (São Cosme), Valbom e Jov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NDOMAR COM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416" table:style-name="ce9">
            <text:p>130416</text:p>
          </table:table-cell>
          <table:table-cell office:value-type="string" table:style-name="ce1">
            <text:p>Gondomar</text:p>
          </table:table-cell>
          <table:table-cell office:value-type="string" table:style-name="ce8">
            <text:p>União das freguesias de Melres e Med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NDOMAR COM ESPER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00" table:style-name="ce9">
            <text:p>130500</text:p>
          </table:table-cell>
          <table:table-cell office:value-type="string" table:style-name="ce1">
            <text:p>Lousad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00" table:style-name="ce9">
            <text:p>130500</text:p>
          </table:table-cell>
          <table:table-cell office:value-type="string" table:style-name="ce1">
            <text:p>Lousad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02" table:style-name="ce9">
            <text:p>130502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Aveled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04" table:style-name="ce9">
            <text:p>130504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Caíde de Rei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10" table:style-name="ce9">
            <text:p>130510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Loda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12" table:style-name="ce9">
            <text:p>130512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Maci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13" table:style-name="ce9">
            <text:p>130513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Mein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15" table:style-name="ce9">
            <text:p>130515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Nevogil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24" table:style-name="ce9">
            <text:p>130524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Sous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25" table:style-name="ce9">
            <text:p>130525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Torn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26" table:style-name="ce9">
            <text:p>130526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Vilar do Torno e Alentém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VTA - Unidos Por Vilar do Torno e Alentém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27" table:style-name="ce9">
            <text:p>130527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União das freguesias de Cernadelo e Lousada (São Miguel e Santa Margarid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28" table:style-name="ce9">
            <text:p>130528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União das freguesias de Cristelos, Boim e Orde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29" table:style-name="ce9">
            <text:p>130529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União das freguesias de Figueiras e Cov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30" table:style-name="ce9">
            <text:p>130530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União das freguesias de Lustosa e Barrosas (Santo Estêv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31" table:style-name="ce9">
            <text:p>130531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União das freguesias de Nespereira e Cas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532" table:style-name="ce9">
            <text:p>130532</text:p>
          </table:table-cell>
          <table:table-cell office:value-type="string" table:style-name="ce1">
            <text:p>Lousada</text:p>
          </table:table-cell>
          <table:table-cell office:value-type="string" table:style-name="ce8">
            <text:p>União das freguesias de Silvares, Pias, Nogueira e Alvareng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LOUSADA VIV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600" table:style-name="ce9">
            <text:p>130600</text:p>
          </table:table-cell>
          <table:table-cell office:value-type="string" table:style-name="ce1">
            <text:p>Mai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600" table:style-name="ce9">
            <text:p>130600</text:p>
          </table:table-cell>
          <table:table-cell office:value-type="string" table:style-name="ce1">
            <text:p>Mai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601" table:style-name="ce9">
            <text:p>130601</text:p>
          </table:table-cell>
          <table:table-cell office:value-type="string" table:style-name="ce1">
            <text:p>Maia</text:p>
          </table:table-cell>
          <table:table-cell office:value-type="string" table:style-name="ce8">
            <text:p>Águas Sant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603" table:style-name="ce9">
            <text:p>130603</text:p>
          </table:table-cell>
          <table:table-cell office:value-type="string" table:style-name="ce1">
            <text:p>Maia</text:p>
          </table:table-cell>
          <table:table-cell office:value-type="string" table:style-name="ce8">
            <text:p>Folg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608" table:style-name="ce9">
            <text:p>130608</text:p>
          </table:table-cell>
          <table:table-cell office:value-type="string" table:style-name="ce1">
            <text:p>Maia</text:p>
          </table:table-cell>
          <table:table-cell office:value-type="string" table:style-name="ce8">
            <text:p>Milheiró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609" table:style-name="ce9">
            <text:p>130609</text:p>
          </table:table-cell>
          <table:table-cell office:value-type="string" table:style-name="ce1">
            <text:p>Maia</text:p>
          </table:table-cell>
          <table:table-cell office:value-type="string" table:style-name="ce8">
            <text:p>Mor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office:value-type="string" table:style-name="ce8">
            <text:p>[MIM - Movimento Independente Por Moreira]</text:p>
          </table:table-cell>
          <table:table-cell office:value-type="string" table:style-name="ce1">
            <text:p>[mivdm - Movimento Independente, Vila de Moreir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613" table:style-name="ce9">
            <text:p>130613</text:p>
          </table:table-cell>
          <table:table-cell office:value-type="string" table:style-name="ce1">
            <text:p>Maia</text:p>
          </table:table-cell>
          <table:table-cell office:value-type="string" table:style-name="ce8">
            <text:p>São Pedro Fin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616" table:style-name="ce9">
            <text:p>130616</text:p>
          </table:table-cell>
          <table:table-cell office:value-type="string" table:style-name="ce1">
            <text:p>Maia</text:p>
          </table:table-cell>
          <table:table-cell office:value-type="string" table:style-name="ce8">
            <text:p>Vila Nova da Tel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office:value-type="string" table:style-name="ce8">
            <text:p>[ IVNT - Independentes Por Vila Nova da Telha]</text:p>
          </table:table-cell>
          <table:table-cell office:value-type="string" table:style-name="ce1">
            <text:p>[MIV - Movimento Independente Por Vila Nov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617" table:style-name="ce9">
            <text:p>130617</text:p>
          </table:table-cell>
          <table:table-cell office:value-type="string" table:style-name="ce1">
            <text:p>Maia</text:p>
          </table:table-cell>
          <table:table-cell office:value-type="string" table:style-name="ce8">
            <text:p>Pedrouç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618" table:style-name="ce9">
            <text:p>130618</text:p>
          </table:table-cell>
          <table:table-cell office:value-type="string" table:style-name="ce1">
            <text:p>Maia</text:p>
          </table:table-cell>
          <table:table-cell office:value-type="string" table:style-name="ce8">
            <text:p>Castêlo da Ma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office:value-type="string" table:style-name="ce8">
            <text:p>[5pc - 5 pelo Câstelo]</text:p>
          </table:table-cell>
          <table:table-cell office:value-type="string" table:style-name="ce1">
            <text:p>[ICM - Independentes Por Câstelo da Maia]</text:p>
          </table:table-cell>
          <table:table-cell office:value-type="string" table:style-name="ce8">
            <text:p>[jpc - Juntos pelo Câstelo]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30619" table:style-name="ce9">
            <text:p>130619</text:p>
          </table:table-cell>
          <table:table-cell office:value-type="string" table:style-name="ce1">
            <text:p>Maia</text:p>
          </table:table-cell>
          <table:table-cell office:value-type="string" table:style-name="ce8">
            <text:p>Cidade da Ma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office:value-type="string" table:style-name="ce8">
            <text:p>[MMM - Movimento Mais Ma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620" table:style-name="ce9">
            <text:p>130620</text:p>
          </table:table-cell>
          <table:table-cell office:value-type="string" table:style-name="ce1">
            <text:p>Maia</text:p>
          </table:table-cell>
          <table:table-cell office:value-type="string" table:style-name="ce8">
            <text:p>Nogueira e Silva Escu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SEMPRE PELA MA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00" table:style-name="ce9">
            <text:p>130700</text:p>
          </table:table-cell>
          <table:table-cell office:value-type="string" table:style-name="ce1">
            <text:p>Marco de Canaveses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ccft - Marco Confiante com Ferreira Torres]</text:p>
          </table:table-cell>
          <table:table-cell office:value-type="string" table:style-name="ce1">
            <text:p>[mp - Marco Positiv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00" table:style-name="ce9">
            <text:p>130700</text:p>
          </table:table-cell>
          <table:table-cell office:value-type="string" table:style-name="ce1">
            <text:p>Marco de Canaveses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ccft - Marco Confiante com Ferreira Torres]</text:p>
          </table:table-cell>
          <table:table-cell office:value-type="string" table:style-name="ce1">
            <text:p>[mp - Marco Positiv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04" table:style-name="ce9">
            <text:p>130704</text:p>
          </table:table-cell>
          <table:table-cell office:value-type="string" table:style-name="ce1">
            <text:p>Marco de Canaveses</text:p>
          </table:table-cell>
          <table:table-cell office:value-type="string" table:style-name="ce8">
            <text:p>Banho e Carvalhos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cft - Marco Confiante com Ferreira Tor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23" table:style-name="ce9">
            <text:p>130723</text:p>
          </table:table-cell>
          <table:table-cell office:value-type="string" table:style-name="ce1">
            <text:p>Marco de Canaveses</text:p>
          </table:table-cell>
          <table:table-cell office:value-type="string" table:style-name="ce8">
            <text:p>Sobretâmeg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cft - Marco Confiante com Ferreira Tor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32" table:style-name="ce9">
            <text:p>130732</text:p>
          </table:table-cell>
          <table:table-cell office:value-type="string" table:style-name="ce1">
            <text:p>Marco de Canaveses</text:p>
          </table:table-cell>
          <table:table-cell office:value-type="string" table:style-name="ce8">
            <text:p>Alpendorada, Várzea e Torr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p - Marco Positiv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34" table:style-name="ce9">
            <text:p>130734</text:p>
          </table:table-cell>
          <table:table-cell office:value-type="string" table:style-name="ce1">
            <text:p>Marco de Canaveses</text:p>
          </table:table-cell>
          <table:table-cell office:value-type="string" table:style-name="ce8">
            <text:p>Bem Viver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bvp - Bem Viver Positiv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35" table:style-name="ce9">
            <text:p>130735</text:p>
          </table:table-cell>
          <table:table-cell office:value-type="string" table:style-name="ce1">
            <text:p>Marco de Canaveses</text:p>
          </table:table-cell>
          <table:table-cell office:value-type="string" table:style-name="ce8">
            <text:p>Livraç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m - Juntos P'ra Melhor]</text:p>
          </table:table-cell>
          <table:table-cell office:value-type="string" table:style-name="ce1">
            <text:p>[mccft - Marco Confiante com Ferreira Torr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36" table:style-name="ce9">
            <text:p>130736</text:p>
          </table:table-cell>
          <table:table-cell office:value-type="string" table:style-name="ce1">
            <text:p>Marco de Canaveses</text:p>
          </table:table-cell>
          <table:table-cell office:value-type="string" table:style-name="ce8">
            <text:p>Marc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mp - Marco Positivo]</text:p>
          </table:table-cell>
          <table:table-cell office:value-type="string" table:style-name="ce8">
            <text:p>[mccft - Marco Confiante com Ferreira Torr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37" table:style-name="ce9">
            <text:p>130737</text:p>
          </table:table-cell>
          <table:table-cell office:value-type="string" table:style-name="ce1">
            <text:p>Marco de Canaveses</text:p>
          </table:table-cell>
          <table:table-cell office:value-type="string" table:style-name="ce8">
            <text:p>Paredes de Viadores e Manhuncel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VM - Unidos Paredes Viadores Manhuc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38" table:style-name="ce9">
            <text:p>130738</text:p>
          </table:table-cell>
          <table:table-cell office:value-type="string" table:style-name="ce1">
            <text:p>Marco de Canaveses</text:p>
          </table:table-cell>
          <table:table-cell office:value-type="string" table:style-name="ce8">
            <text:p>Penhalonga e Paços de Gaio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pepp - Penhalonga e Paços Positivo]</text:p>
          </table:table-cell>
          <table:table-cell office:value-type="string" table:style-name="ce8">
            <text:p>[mccft - Marco Confiante com Ferreira Torr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40" table:style-name="ce9">
            <text:p>130740</text:p>
          </table:table-cell>
          <table:table-cell office:value-type="string" table:style-name="ce1">
            <text:p>Marco de Canaveses</text:p>
          </table:table-cell>
          <table:table-cell office:value-type="string" table:style-name="ce8">
            <text:p>Várzea, Aliviada e Folha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cft - Marco Confiante com Ferreira Tor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741" table:style-name="ce9">
            <text:p>130741</text:p>
          </table:table-cell>
          <table:table-cell office:value-type="string" table:style-name="ce1">
            <text:p>Marco de Canaveses</text:p>
          </table:table-cell>
          <table:table-cell office:value-type="string" table:style-name="ce8">
            <text:p>Vila Boa de Quires e Maurel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vcas - Movimento Vamos Confiar Adelino Soa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800" table:style-name="ce9">
            <text:p>130800</text:p>
          </table:table-cell>
          <table:table-cell office:value-type="string" table:style-name="ce1">
            <text:p>Matosinhos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gppm - Guilherme Pinto Por Matosinh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800" table:style-name="ce9">
            <text:p>130800</text:p>
          </table:table-cell>
          <table:table-cell office:value-type="string" table:style-name="ce1">
            <text:p>Matosinhos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gppm - Guilherme Pinto Por Matosinh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811" table:style-name="ce9">
            <text:p>130811</text:p>
          </table:table-cell>
          <table:table-cell office:value-type="string" table:style-name="ce1">
            <text:p>Matosinhos</text:p>
          </table:table-cell>
          <table:table-cell office:value-type="string" table:style-name="ce8">
            <text:p>União das freguesias de Custóias, Leça do Balio e Guif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ppm - Guilherme Pinto Por Matosinh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812" table:style-name="ce9">
            <text:p>130812</text:p>
          </table:table-cell>
          <table:table-cell office:value-type="string" table:style-name="ce1">
            <text:p>Matosinhos</text:p>
          </table:table-cell>
          <table:table-cell office:value-type="string" table:style-name="ce8">
            <text:p>União das freguesias de Matosinhos e Leça da Palm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ppm - Guilherme Pinto Por Matosinh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813" table:style-name="ce9">
            <text:p>130813</text:p>
          </table:table-cell>
          <table:table-cell office:value-type="string" table:style-name="ce1">
            <text:p>Matosinhos</text:p>
          </table:table-cell>
          <table:table-cell office:value-type="string" table:style-name="ce8">
            <text:p>União das freguesias de Perafita, Lavra e Santa Cruz do Bisp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ppm - Guilherme Pinto Por Matosinh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0814" table:style-name="ce9">
            <text:p>130814</text:p>
          </table:table-cell>
          <table:table-cell office:value-type="string" table:style-name="ce1">
            <text:p>Matosinhos</text:p>
          </table:table-cell>
          <table:table-cell office:value-type="string" table:style-name="ce8">
            <text:p>União das freguesias de São Mamede de Infesta e Senhora da Ho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ppm - Guilherme Pinto Por Matosinh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013" table:style-name="ce9">
            <text:p>131013</text:p>
          </table:table-cell>
          <table:table-cell office:value-type="string" table:style-name="ce1">
            <text:p>Paredes</text:p>
          </table:table-cell>
          <table:table-cell office:value-type="string" table:style-name="ce8">
            <text:p>Lord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L - MOVIMENTO INDEPENDENTE DE LORDEL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025" table:style-name="ce9">
            <text:p>131025</text:p>
          </table:table-cell>
          <table:table-cell office:value-type="string" table:style-name="ce1">
            <text:p>Paredes</text:p>
          </table:table-cell>
          <table:table-cell office:value-type="string" table:style-name="ce8">
            <text:p>Pared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P - MOVIMENTO DE CIDADÃOS POR PARED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00" table:style-name="ce9">
            <text:p>131100</text:p>
          </table:table-cell>
          <table:table-cell office:value-type="string" table:style-name="ce1">
            <text:p>Penafiel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00" table:style-name="ce9">
            <text:p>131100</text:p>
          </table:table-cell>
          <table:table-cell office:value-type="string" table:style-name="ce1">
            <text:p>Penafiel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01" table:style-name="ce9">
            <text:p>131101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Abrag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02" table:style-name="ce9">
            <text:p>131102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Boelh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03" table:style-name="ce9">
            <text:p>131103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Bust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04" table:style-name="ce9">
            <text:p>131104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Cabeça San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05" table:style-name="ce9">
            <text:p>131105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Can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office:value-type="string" table:style-name="ce8">
            <text:p>[MPCS - MOVIMENTO POR CANELAS SEMP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06" table:style-name="ce9">
            <text:p>131106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Cap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07" table:style-name="ce9">
            <text:p>131107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Castel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08" table:style-name="ce9">
            <text:p>131108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Croc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c - UNIDOS POR CROC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09" table:style-name="ce9">
            <text:p>131109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Duas Igrej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di - JUNTOS POR DUAS IGREJ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10" table:style-name="ce9">
            <text:p>131110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Ej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office:value-type="string" table:style-name="ce8">
            <text:p>[MIME - MOVIMENTO INDEPENDENTE MAIS EJ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12" table:style-name="ce9">
            <text:p>131112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Fonte Arcad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office:value-type="string" table:style-name="ce8">
            <text:p>[misfa - MOVIMENTO INDEPENDENTE SERVIR FONTE ARCA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13" table:style-name="ce9">
            <text:p>131113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Galeg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15" table:style-name="ce9">
            <text:p>131115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Iriv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21" table:style-name="ce9">
            <text:p>131121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Oldr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22" table:style-name="ce9">
            <text:p>131122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Paço de Sou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office:value-type="string" table:style-name="ce8">
            <text:p>[mnc - A MUDANÇA É O NOSSO CAMINH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25" table:style-name="ce9">
            <text:p>131125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Peroz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28" table:style-name="ce9">
            <text:p>131128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Ran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rmci - UNIDOS POR RANS - Movimento de Cidadãos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29" table:style-name="ce9">
            <text:p>131129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Rio de Moinh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32" table:style-name="ce9">
            <text:p>131132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Recezinhos (São Mamede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RI - MOVIMENTO RENOVADOR INDEPENDENTE]</text:p>
          </table:table-cell>
          <table:table-cell office:value-type="string" table:style-name="ce1">
            <text:p>[upsmmci - UNIDOS POR SÃO MAMEDE - Movimento de Cidadãos Independent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33" table:style-name="ce9">
            <text:p>131133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Recezinhos (São Martinh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MS - SÃO MARTINHO SEMPRE]</text:p>
          </table:table-cell>
          <table:table-cell office:value-type="string" table:style-name="ce1">
            <text:p>[upsm - UNIDOS POR SÃO MARTINH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34" table:style-name="ce9">
            <text:p>131134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Seboli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scc - POR SEBOLIDO COM CONFI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36" table:style-name="ce9">
            <text:p>131136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Valpedr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38" table:style-name="ce9">
            <text:p>131138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Rio Mau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39" table:style-name="ce9">
            <text:p>131139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Penafie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40" table:style-name="ce9">
            <text:p>131140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Luzim e Vila Co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41" table:style-name="ce9">
            <text:p>131141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Guilhufe e Urrô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dmg - DAR AS MÃOS POR GUILHUFE-URRÔ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42" table:style-name="ce9">
            <text:p>131142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Lagares e Figu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143" table:style-name="ce9">
            <text:p>131143</text:p>
          </table:table-cell>
          <table:table-cell office:value-type="string" table:style-name="ce1">
            <text:p>Penafiel</text:p>
          </table:table-cell>
          <table:table-cell office:value-type="string" table:style-name="ce8">
            <text:p>Termas de São Vice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FIEL QUE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200" table:style-name="ce9">
            <text:p>131200</text:p>
          </table:table-cell>
          <table:table-cell office:value-type="string" table:style-name="ce1">
            <text:p>Port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PPM.MPT - PORTO FORTE]</text:p>
          </table:table-cell>
          <table:table-cell table:style-name="ce1"/>
          <table:table-cell office:value-type="string" table:style-name="ce10">
            <text:p>[RM - Rui Moreira: Porto, Nosso Partido]</text:p>
          </table:table-cell>
          <table:table-cell office:value-type="string" table:style-name="ce8">
            <text:p>[ncpdf - Nuno Cardoso, Porto de Futur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200" table:style-name="ce9">
            <text:p>131200</text:p>
          </table:table-cell>
          <table:table-cell office:value-type="string" table:style-name="ce1">
            <text:p>Port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PPM.MPT - PORTO FORTE]</text:p>
          </table:table-cell>
          <table:table-cell table:style-name="ce1"/>
          <table:table-cell office:value-type="string" table:style-name="ce10">
            <text:p>[RM - Rui Moreira: Porto, Nosso Partido]</text:p>
          </table:table-cell>
          <table:table-cell office:value-type="string" table:style-name="ce8">
            <text:p>[ncpdf - Nuno Cardoso, Porto de Futur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202" table:style-name="ce9">
            <text:p>131202</text:p>
          </table:table-cell>
          <table:table-cell office:value-type="string" table:style-name="ce1">
            <text:p>Porto</text:p>
          </table:table-cell>
          <table:table-cell office:value-type="string" table:style-name="ce8">
            <text:p>Bonf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TO FORTE]</text:p>
          </table:table-cell>
          <table:table-cell table:style-name="ce1"/>
          <table:table-cell office:value-type="string" table:style-name="ce8">
            <text:p>[RM - Rui Moreira: Porto, Nosso Parti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203" table:style-name="ce9">
            <text:p>131203</text:p>
          </table:table-cell>
          <table:table-cell office:value-type="string" table:style-name="ce1">
            <text:p>Porto</text:p>
          </table:table-cell>
          <table:table-cell office:value-type="string" table:style-name="ce8">
            <text:p>Campanhã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TO FORTE]</text:p>
          </table:table-cell>
          <table:table-cell table:style-name="ce1"/>
          <table:table-cell office:value-type="string" table:style-name="ce8">
            <text:p>[RM - Rui Moreira: Porto, Nosso Parti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210" table:style-name="ce9">
            <text:p>131210</text:p>
          </table:table-cell>
          <table:table-cell office:value-type="string" table:style-name="ce1">
            <text:p>Porto</text:p>
          </table:table-cell>
          <table:table-cell office:value-type="string" table:style-name="ce8">
            <text:p>Paranh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TO FORTE]</text:p>
          </table:table-cell>
          <table:table-cell table:style-name="ce1"/>
          <table:table-cell office:value-type="string" table:style-name="ce8">
            <text:p>[RM - Rui Moreira: Porto, Nosso Parti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211" table:style-name="ce9">
            <text:p>131211</text:p>
          </table:table-cell>
          <table:table-cell office:value-type="string" table:style-name="ce1">
            <text:p>Porto</text:p>
          </table:table-cell>
          <table:table-cell office:value-type="string" table:style-name="ce8">
            <text:p>Ramal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TO FORTE]</text:p>
          </table:table-cell>
          <table:table-cell table:style-name="ce1"/>
          <table:table-cell office:value-type="string" table:style-name="ce8">
            <text:p>[RM - Rui Moreira: Porto, Nosso Parti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216" table:style-name="ce9">
            <text:p>131216</text:p>
          </table:table-cell>
          <table:table-cell office:value-type="string" table:style-name="ce1">
            <text:p>Porto</text:p>
          </table:table-cell>
          <table:table-cell office:value-type="string" table:style-name="ce8">
            <text:p>União das freguesias de Aldoar, Foz do Douro e Nevogil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TO FORTE]</text:p>
          </table:table-cell>
          <table:table-cell table:style-name="ce1"/>
          <table:table-cell office:value-type="string" table:style-name="ce8">
            <text:p>[RM - Rui Moreira: Porto, Nosso Parti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217" table:style-name="ce9">
            <text:p>131217</text:p>
          </table:table-cell>
          <table:table-cell office:value-type="string" table:style-name="ce1">
            <text:p>Porto</text:p>
          </table:table-cell>
          <table:table-cell office:value-type="string" table:style-name="ce8">
            <text:p>União das freguesias de Cedofeita, Santo Ildefonso, Sé, Miragaia, São Nicolau e Vitór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TO FORTE]</text:p>
          </table:table-cell>
          <table:table-cell table:style-name="ce1"/>
          <table:table-cell office:value-type="string" table:style-name="ce8">
            <text:p>[RM - Rui Moreira: Porto, Nosso Parti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218" table:style-name="ce9">
            <text:p>131218</text:p>
          </table:table-cell>
          <table:table-cell office:value-type="string" table:style-name="ce1">
            <text:p>Porto</text:p>
          </table:table-cell>
          <table:table-cell office:value-type="string" table:style-name="ce8">
            <text:p>União das freguesias de Lordelo do Ouro e Massar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.MPT - PORTO FORTE]</text:p>
          </table:table-cell>
          <table:table-cell table:style-name="ce1"/>
          <table:table-cell office:value-type="string" table:style-name="ce8">
            <text:p>[RM - Rui Moreira: Porto, Nosso Parti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307" table:style-name="ce9">
            <text:p>131307</text:p>
          </table:table-cell>
          <table:table-cell office:value-type="string" table:style-name="ce1">
            <text:p>Póvoa de Varzim</text:p>
          </table:table-cell>
          <table:table-cell office:value-type="string" table:style-name="ce8">
            <text:p>Est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EI - Lista Estela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308" table:style-name="ce9">
            <text:p>131308</text:p>
          </table:table-cell>
          <table:table-cell office:value-type="string" table:style-name="ce1">
            <text:p>Póvoa de Varzim</text:p>
          </table:table-cell>
          <table:table-cell office:value-type="string" table:style-name="ce8">
            <text:p>Laund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UL - Lista Unidos por Laún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311" table:style-name="ce9">
            <text:p>131311</text:p>
          </table:table-cell>
          <table:table-cell office:value-type="string" table:style-name="ce1">
            <text:p>Póvoa de Varzim</text:p>
          </table:table-cell>
          <table:table-cell office:value-type="string" table:style-name="ce8">
            <text:p>Rat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RA - Lista Rates Acredit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313" table:style-name="ce9">
            <text:p>131313</text:p>
          </table:table-cell>
          <table:table-cell office:value-type="string" table:style-name="ce1">
            <text:p>Póvoa de Varzim</text:p>
          </table:table-cell>
          <table:table-cell office:value-type="string" table:style-name="ce8">
            <text:p>União das freguesias de Aver-o-Mar, Amorim e Terros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AAT - Força da Uni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00" table:style-name="ce9">
            <text:p>131400</text:p>
          </table:table-cell>
          <table:table-cell office:value-type="string" table:style-name="ce1">
            <text:p>Santo Tirs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office:value-type="string" table:style-name="ce8">
            <text:p>[PFST - Lista Independente Pr Á Frente Santo Tirs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00" table:style-name="ce9">
            <text:p>131400</text:p>
          </table:table-cell>
          <table:table-cell office:value-type="string" table:style-name="ce1">
            <text:p>Santo Tirs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office:value-type="string" table:style-name="ce8">
            <text:p>[PFST - Lista Independente Pr Á Frente Santo Tirs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01" table:style-name="ce9">
            <text:p>131401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Agr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02" table:style-name="ce9">
            <text:p>131402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Água Long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office:value-type="string" table:style-name="ce8">
            <text:p>[ALEDT - Água Longa É de To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13" table:style-name="ce9">
            <text:p>131413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Monte Córdo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16" table:style-name="ce9">
            <text:p>131416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Rebord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18" table:style-name="ce9">
            <text:p>131418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Regueng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19" table:style-name="ce9">
            <text:p>131419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Rori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office:value-type="string" table:style-name="ce8">
            <text:p>[LIR - Lista Independente de Rori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30" table:style-name="ce9">
            <text:p>131430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Negrelos (São Tomé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office:value-type="string" table:style-name="ce8">
            <text:p>[TPN - Lista de Independentes Todos por Negr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32" table:style-name="ce9">
            <text:p>131432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Vilar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33" table:style-name="ce9">
            <text:p>131433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União das freguesias de Areias, Sequeiró, Lama e Palm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office:value-type="string" table:style-name="ce8">
            <text:p>[MCA - Movimento de Cidadãos do Além Ri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34" table:style-name="ce9">
            <text:p>131434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União das freguesias de Campo (São Martinho), São Salvador do Campo e Negrelos (São Mamede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35" table:style-name="ce9">
            <text:p>131435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União das freguesias de Carreira e Refojos de Riba de Av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office:value-type="string" table:style-name="ce8">
            <text:p>[CRI - Carreira Refojos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36" table:style-name="ce9">
            <text:p>131436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União das freguesias de Lamelas e Guimarei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437" table:style-name="ce9">
            <text:p>131437</text:p>
          </table:table-cell>
          <table:table-cell office:value-type="string" table:style-name="ce1">
            <text:p>Santo Tirso</text:p>
          </table:table-cell>
          <table:table-cell office:value-type="string" table:style-name="ce8">
            <text:p>União das freguesias de Santo Tirso, Couto (Santa Cristina e São Miguel) e Burg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TODOS POR SANTO TIRS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500" table:style-name="ce9">
            <text:p>131500</text:p>
          </table:table-cell>
          <table:table-cell office:value-type="string" table:style-name="ce1">
            <text:p>Valong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PPM - A VITÓRIA DE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500" table:style-name="ce9">
            <text:p>131500</text:p>
          </table:table-cell>
          <table:table-cell office:value-type="string" table:style-name="ce1">
            <text:p>Valong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PPM - A VITÓRIA DE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501" table:style-name="ce9">
            <text:p>131501</text:p>
          </table:table-cell>
          <table:table-cell office:value-type="string" table:style-name="ce1">
            <text:p>Valongo</text:p>
          </table:table-cell>
          <table:table-cell office:value-type="string" table:style-name="ce8">
            <text:p>Alfen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 VITÓRIA DE TODOS]</text:p>
          </table:table-cell>
          <table:table-cell table:style-name="ce1"/>
          <table:table-cell office:value-type="string" table:style-name="ce8">
            <text:p>[UA - Unidos por Alfe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503" table:style-name="ce9">
            <text:p>131503</text:p>
          </table:table-cell>
          <table:table-cell office:value-type="string" table:style-name="ce1">
            <text:p>Valongo</text:p>
          </table:table-cell>
          <table:table-cell office:value-type="string" table:style-name="ce8">
            <text:p>Ermesi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 VITÓRIA DE TODO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505" table:style-name="ce9">
            <text:p>131505</text:p>
          </table:table-cell>
          <table:table-cell office:value-type="string" table:style-name="ce1">
            <text:p>Valongo</text:p>
          </table:table-cell>
          <table:table-cell office:value-type="string" table:style-name="ce8">
            <text:p>Valong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 VITÓRIA DE TODOS]</text:p>
          </table:table-cell>
          <table:table-cell table:style-name="ce1"/>
          <table:table-cell office:value-type="string" table:style-name="ce8">
            <text:p>[upv - Unidos por Valong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506" table:style-name="ce9">
            <text:p>131506</text:p>
          </table:table-cell>
          <table:table-cell office:value-type="string" table:style-name="ce1">
            <text:p>Valongo</text:p>
          </table:table-cell>
          <table:table-cell office:value-type="string" table:style-name="ce8">
            <text:p>União das freguesias de Campo e Sobra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 VITÓRIA DE TODOS]</text:p>
          </table:table-cell>
          <table:table-cell table:style-name="ce1"/>
          <table:table-cell office:value-type="string" table:style-name="ce8">
            <text:p>[upcs - Unidos por Campo e Sobra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00" table:style-name="ce9">
            <text:p>131600</text:p>
          </table:table-cell>
          <table:table-cell office:value-type="string" table:style-name="ce1">
            <text:p>Vila do Conde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00" table:style-name="ce9">
            <text:p>131600</text:p>
          </table:table-cell>
          <table:table-cell office:value-type="string" table:style-name="ce1">
            <text:p>Vila do Conde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02" table:style-name="ce9">
            <text:p>131602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Árvor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03" table:style-name="ce9">
            <text:p>131603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Aveled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04" table:style-name="ce9">
            <text:p>131604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Azura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07" table:style-name="ce9">
            <text:p>131607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Fajoz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10" table:style-name="ce9">
            <text:p>131610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Gi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11" table:style-name="ce9">
            <text:p>131611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Guilhabreu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office:value-type="string" table:style-name="ce8">
            <text:p>[GU - Guilhabreu Unido]</text:p>
          </table:table-cell>
          <table:table-cell office:value-type="string" table:style-name="ce1">
            <text:p>[MCG - Movimento do Cidadão Por Guilhabreu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12" table:style-name="ce9">
            <text:p>131612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Junqu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13" table:style-name="ce9">
            <text:p>131613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Labrug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14" table:style-name="ce9">
            <text:p>131614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Macieira da Ma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16" table:style-name="ce9">
            <text:p>131616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Mind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17" table:style-name="ce9">
            <text:p>131617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Modiv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27" table:style-name="ce9">
            <text:p>131627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Vila Chã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28" table:style-name="ce9">
            <text:p>131628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Vila do Co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30" table:style-name="ce9">
            <text:p>131630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Vilar de Pinh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31" table:style-name="ce9">
            <text:p>131631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União das freguesias de Bagunte, Ferreiró, Outeiro Maior e Parad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32" table:style-name="ce9">
            <text:p>131632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União das freguesias de Fornelo e Vair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FV - Lista Independente de Fornelo e Vair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33" table:style-name="ce9">
            <text:p>131633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União das freguesias de Malta e Canid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34" table:style-name="ce9">
            <text:p>131634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União das freguesias de Retorta e Tougu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RT - Movimento Independente Retorta Toug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35" table:style-name="ce9">
            <text:p>131635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União das freguesias de Rio Mau e Arc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36" table:style-name="ce9">
            <text:p>131636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União das freguesias de Touguinha e Touguinhó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EM VILA DO CONDE]</text:p>
          </table:table-cell>
          <table:table-cell table:style-name="ce1"/>
          <table:table-cell office:value-type="string" table:style-name="ce8">
            <text:p>[UTT - UNIÃO POR TOUGUINHA E TOUGUINHÓ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637" table:style-name="ce9">
            <text:p>131637</text:p>
          </table:table-cell>
          <table:table-cell office:value-type="string" table:style-name="ce1">
            <text:p>Vila do Conde</text:p>
          </table:table-cell>
          <table:table-cell office:value-type="string" table:style-name="ce8">
            <text:p>União das freguesias de Vilar e Mosteiró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VIMOS - União das Freguesias de Vilar e Mosteiró]</text:p>
          </table:table-cell>
          <table:table-cell office:value-type="string" table:style-name="ce8">
            <text:p>[LIVA-M - Lista Independente Unidos Por Vilar e Mosteiró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00" table:style-name="ce9">
            <text:p>131700</text:p>
          </table:table-cell>
          <table:table-cell office:value-type="string" table:style-name="ce1">
            <text:p>Vila Nova de Gai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office:value-type="string" table:style-name="ce8">
            <text:p>[GAIA - GUILHERME AGUIAR - JUNTOS POR GAIA]</text:p>
          </table:table-cell>
          <table:table-cell office:value-type="string" table:style-name="ce1">
            <text:p>[MCPORGAIA - MOVIMENTO DE CIDADÃOS POR GA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00" table:style-name="ce9">
            <text:p>131700</text:p>
          </table:table-cell>
          <table:table-cell office:value-type="string" table:style-name="ce1">
            <text:p>Vila Nova de Gai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office:value-type="string" table:style-name="ce8">
            <text:p>[GAIA - GUILHERME AGUIAR - JUNTOS POR GAIA]</text:p>
          </table:table-cell>
          <table:table-cell office:value-type="string" table:style-name="ce1">
            <text:p>[MCPORGAIA - MOVIMENTO DE CIDADÃOS POR GA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01" table:style-name="ce9">
            <text:p>131701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Arcoz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02" table:style-name="ce9">
            <text:p>131702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Avint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03" table:style-name="ce9">
            <text:p>131703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Can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04" table:style-name="ce9">
            <text:p>131704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Canid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09" table:style-name="ce9">
            <text:p>131709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Madalen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12" table:style-name="ce9">
            <text:p>131712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Oliveira do Dou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17" table:style-name="ce9">
            <text:p>131717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São Félix da Marin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23" table:style-name="ce9">
            <text:p>131723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Vilar de Andor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office:value-type="string" table:style-name="ce8">
            <text:p>[VAI - VILAR DE ANDORINH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25" table:style-name="ce9">
            <text:p>131725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União das freguesias de Grijó e Sermo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office:value-type="string" table:style-name="ce8">
            <text:p>[GRIJOS - Grupo Renovador Independente por Grijó/Sermond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26" table:style-name="ce9">
            <text:p>131726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União das freguesias de Gulpilhares e Valadar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GV - MOVIMENTO INDEPENDENTE POR GULPILHARES E VALADA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27" table:style-name="ce9">
            <text:p>131727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União das freguesias de Mafamude e Vilar do Paraís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office:value-type="string" table:style-name="ce8">
            <text:p>[MICM - MOVIMENTO INDEPENDENTE DE CIDADÃOS POR MAFAMUDE-VILAR DO PARAÍS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28" table:style-name="ce9">
            <text:p>131728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União das freguesias de Pedroso e Seixez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29" table:style-name="ce9">
            <text:p>131729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União das freguesias de Sandim, Olival, Lever e Crestum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30" table:style-name="ce9">
            <text:p>131730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União das freguesias de Santa Marinha e São Pedro da Afurad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731" table:style-name="ce9">
            <text:p>131731</text:p>
          </table:table-cell>
          <table:table-cell office:value-type="string" table:style-name="ce1">
            <text:p>Vila Nova de Gaia</text:p>
          </table:table-cell>
          <table:table-cell office:value-type="string" table:style-name="ce8">
            <text:p>União das freguesias de Serzedo e Peros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AIA NA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800" table:style-name="ce9">
            <text:p>131800</text:p>
          </table:table-cell>
          <table:table-cell office:value-type="string" table:style-name="ce1">
            <text:p>Trof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UNIDOS PELA TROFA]</text:p>
          </table:table-cell>
          <table:table-cell table:style-name="ce1"/>
          <table:table-cell office:value-type="string" table:style-name="ce8">
            <text:p>[MIT - Movimento Independente pela Trof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800" table:style-name="ce9">
            <text:p>131800</text:p>
          </table:table-cell>
          <table:table-cell office:value-type="string" table:style-name="ce1">
            <text:p>Trof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UNIDOS PELA TROF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806" table:style-name="ce9">
            <text:p>131806</text:p>
          </table:table-cell>
          <table:table-cell office:value-type="string" table:style-name="ce1">
            <text:p>Trofa</text:p>
          </table:table-cell>
          <table:table-cell office:value-type="string" table:style-name="ce8">
            <text:p>Cov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A TROF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808" table:style-name="ce9">
            <text:p>131808</text:p>
          </table:table-cell>
          <table:table-cell office:value-type="string" table:style-name="ce1">
            <text:p>Trofa</text:p>
          </table:table-cell>
          <table:table-cell office:value-type="string" table:style-name="ce8">
            <text:p>Mu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A TROFA]</text:p>
          </table:table-cell>
          <table:table-cell table:style-name="ce1"/>
          <table:table-cell office:value-type="string" table:style-name="ce8">
            <text:p>[IPM - Independentes Pelo M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809" table:style-name="ce9">
            <text:p>131809</text:p>
          </table:table-cell>
          <table:table-cell office:value-type="string" table:style-name="ce1">
            <text:p>Trofa</text:p>
          </table:table-cell>
          <table:table-cell office:value-type="string" table:style-name="ce8">
            <text:p>União das freguesias de Alvarelhos e Guid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A TROF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810" table:style-name="ce9">
            <text:p>131810</text:p>
          </table:table-cell>
          <table:table-cell office:value-type="string" table:style-name="ce1">
            <text:p>Trofa</text:p>
          </table:table-cell>
          <table:table-cell office:value-type="string" table:style-name="ce8">
            <text:p>União das freguesias de Bougado (São Martinho e Santiag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A TROF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31811" table:style-name="ce9">
            <text:p>131811</text:p>
          </table:table-cell>
          <table:table-cell office:value-type="string" table:style-name="ce1">
            <text:p>Trofa</text:p>
          </table:table-cell>
          <table:table-cell office:value-type="string" table:style-name="ce8">
            <text:p>União das freguesias de Coronado (São Romão e São Mamede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A TROF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104" table:style-name="ce9">
            <text:p>140104</text:p>
          </table:table-cell>
          <table:table-cell office:value-type="string" table:style-name="ce1">
            <text:p>Abrantes</text:p>
          </table:table-cell>
          <table:table-cell office:value-type="string" table:style-name="ce8">
            <text:p>Bempos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b - Independentes por Bempost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106" table:style-name="ce9">
            <text:p>140106</text:p>
          </table:table-cell>
          <table:table-cell office:value-type="string" table:style-name="ce1">
            <text:p>Abrantes</text:p>
          </table:table-cell>
          <table:table-cell office:value-type="string" table:style-name="ce8">
            <text:p>Mourisc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GIMOS - Agrupamento de Independentes por Mourisc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200" table:style-name="ce9">
            <text:p>140200</text:p>
          </table:table-cell>
          <table:table-cell office:value-type="string" table:style-name="ce1">
            <text:p>Alcanen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NOVO RUMO]</text:p>
          </table:table-cell>
          <table:table-cell table:style-name="ce1"/>
          <table:table-cell office:value-type="string" table:style-name="ce8">
            <text:p>[I.C.A. - Independentes pelo Concelho de Alcane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200" table:style-name="ce9">
            <text:p>140200</text:p>
          </table:table-cell>
          <table:table-cell office:value-type="string" table:style-name="ce1">
            <text:p>Alcanen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NOVO RUMO]</text:p>
          </table:table-cell>
          <table:table-cell table:style-name="ce1"/>
          <table:table-cell office:value-type="string" table:style-name="ce8">
            <text:p>[I.C.A. - Independentes pelo Concelho de Alcanena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140202" table:style-name="ce9">
            <text:p>140202</text:p>
          </table:table-cell>
          <table:table-cell office:value-type="string" table:style-name="ce1">
            <text:p>Alcanena</text:p>
          </table:table-cell>
          <table:table-cell office:value-type="string" table:style-name="ce8">
            <text:p>Bugalh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.C.A. - Independentes pelo Concelho de Alcane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206" table:style-name="ce9">
            <text:p>140206</text:p>
          </table:table-cell>
          <table:table-cell office:value-type="string" table:style-name="ce1">
            <text:p>Alcanena</text:p>
          </table:table-cell>
          <table:table-cell office:value-type="string" table:style-name="ce8">
            <text:p>Mi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RUMO]</text:p>
          </table:table-cell>
          <table:table-cell table:style-name="ce1"/>
          <table:table-cell office:value-type="string" table:style-name="ce10">
            <text:p>[J.F.M. - Juntos Pela Freguesia de Minde]</text:p>
          </table:table-cell>
          <table:table-cell office:value-type="string" table:style-name="ce8">
            <text:p>[I.C.A. - Independentes pelo Concelho de Alcanen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207" table:style-name="ce9">
            <text:p>140207</text:p>
          </table:table-cell>
          <table:table-cell office:value-type="string" table:style-name="ce1">
            <text:p>Alcanena</text:p>
          </table:table-cell>
          <table:table-cell office:value-type="string" table:style-name="ce8">
            <text:p>Moitas Vend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RUMO]</text:p>
          </table:table-cell>
          <table:table-cell table:style-name="ce1"/>
          <table:table-cell office:value-type="string" table:style-name="ce8">
            <text:p>[I.C.A. - Independentes pelo Concelho de Alcane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208" table:style-name="ce9">
            <text:p>140208</text:p>
          </table:table-cell>
          <table:table-cell office:value-type="string" table:style-name="ce1">
            <text:p>Alcanena</text:p>
          </table:table-cell>
          <table:table-cell office:value-type="string" table:style-name="ce8">
            <text:p>Monsan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IFM - Independentes da Freguesia de Monsanto]</text:p>
          </table:table-cell>
          <table:table-cell office:value-type="string" table:style-name="ce8">
            <text:p>[I.C.A. - Independentes pelo Concelho de Alcanen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209" table:style-name="ce9">
            <text:p>140209</text:p>
          </table:table-cell>
          <table:table-cell office:value-type="string" table:style-name="ce1">
            <text:p>Alcanena</text:p>
          </table:table-cell>
          <table:table-cell office:value-type="string" table:style-name="ce8">
            <text:p>Serra de Santo Antóni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RUMO]</text:p>
          </table:table-cell>
          <table:table-cell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/>
          <table:table-cell office:value-type="float" office:value="140211" table:style-name="ce9">
            <text:p>140211</text:p>
          </table:table-cell>
          <table:table-cell office:value-type="string" table:style-name="ce1">
            <text:p>Alcanena</text:p>
          </table:table-cell>
          <table:table-cell office:value-type="string" table:style-name="ce8">
            <text:p>União das freguesias de Alcanena e Vila Mor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RUMO]</text:p>
          </table:table-cell>
          <table:table-cell table:style-name="ce1"/>
          <table:table-cell office:value-type="string" table:style-name="ce8">
            <text:p>[I.C.A. - Independentes pelo Concelho de Alcane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212" table:style-name="ce9">
            <text:p>140212</text:p>
          </table:table-cell>
          <table:table-cell office:value-type="string" table:style-name="ce1">
            <text:p>Alcanena</text:p>
          </table:table-cell>
          <table:table-cell office:value-type="string" table:style-name="ce8">
            <text:p>União das freguesias de Malhou, Louriceira e Espinh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NOVO RUMO]</text:p>
          </table:table-cell>
          <table:table-cell table:style-name="ce1"/>
          <table:table-cell office:value-type="string" table:style-name="ce8">
            <text:p>[I.C.A. - Independentes pelo Concelho de Alcane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300" table:style-name="ce9">
            <text:p>140300</text:p>
          </table:table-cell>
          <table:table-cell office:value-type="string" table:style-name="ce1">
            <text:p>Almeirim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MPT - AMAR A TERRA]</text:p>
          </table:table-cell>
          <table:table-cell table:style-name="ce1"/>
          <table:table-cell office:value-type="string" table:style-name="ce8">
            <text:p>[MICA2013 - MICA2013 - Movimento Independente Concelho Almeirim]</text:p>
          </table:table-cell>
          <table:table-cell office:value-type="string" table:style-name="ce1">
            <text:p>[mzg - Movimento Zé Gom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300" table:style-name="ce9">
            <text:p>140300</text:p>
          </table:table-cell>
          <table:table-cell office:value-type="string" table:style-name="ce1">
            <text:p>Almeirim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MPT - AMAR A TERRA]</text:p>
          </table:table-cell>
          <table:table-cell table:style-name="ce1"/>
          <table:table-cell office:value-type="string" table:style-name="ce8">
            <text:p>[MICA2013 - MICA2013 - Movimento Independente Concelho Almeirim]</text:p>
          </table:table-cell>
          <table:table-cell office:value-type="string" table:style-name="ce1">
            <text:p>[mzg - Movimento Zé Gom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301" table:style-name="ce9">
            <text:p>140301</text:p>
          </table:table-cell>
          <table:table-cell office:value-type="string" table:style-name="ce1">
            <text:p>Almeirim</text:p>
          </table:table-cell>
          <table:table-cell office:value-type="string" table:style-name="ce8">
            <text:p>Almeir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AMAR A TERRA]</text:p>
          </table:table-cell>
          <table:table-cell table:style-name="ce1"/>
          <table:table-cell office:value-type="string" table:style-name="ce8">
            <text:p>[MICA2013 - MICA2013 - Movimento Independente Concelho Almeirim]</text:p>
          </table:table-cell>
          <table:table-cell office:value-type="string" table:style-name="ce1">
            <text:p>[mzg - Movimento Zé Gom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302" table:style-name="ce9">
            <text:p>140302</text:p>
          </table:table-cell>
          <table:table-cell office:value-type="string" table:style-name="ce1">
            <text:p>Almeirim</text:p>
          </table:table-cell>
          <table:table-cell office:value-type="string" table:style-name="ce8">
            <text:p>Benfica do Ribatej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AMAR A TERRA]</text:p>
          </table:table-cell>
          <table:table-cell table:style-name="ce1"/>
          <table:table-cell office:value-type="string" table:style-name="ce8">
            <text:p>[MICA2013 - MICA2013 - Movimento Independente Concelho Almeirim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303" table:style-name="ce9">
            <text:p>140303</text:p>
          </table:table-cell>
          <table:table-cell office:value-type="string" table:style-name="ce1">
            <text:p>Almeirim</text:p>
          </table:table-cell>
          <table:table-cell office:value-type="string" table:style-name="ce8">
            <text:p>Fazendas de Almeir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AMAR A TERRA]</text:p>
          </table:table-cell>
          <table:table-cell table:style-name="ce1"/>
          <table:table-cell office:value-type="string" table:style-name="ce8">
            <text:p>[MICA2013 - MICA2013 - Movimento Independente Concelho Almeirim]</text:p>
          </table:table-cell>
          <table:table-cell office:value-type="string" table:style-name="ce1">
            <text:p>[mzg - Movimento Zé Gom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304" table:style-name="ce9">
            <text:p>140304</text:p>
          </table:table-cell>
          <table:table-cell office:value-type="string" table:style-name="ce1">
            <text:p>Almeirim</text:p>
          </table:table-cell>
          <table:table-cell office:value-type="string" table:style-name="ce8">
            <text:p>Rap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MPT - AMAR A TERRA]</text:p>
          </table:table-cell>
          <table:table-cell table:style-name="ce1"/>
          <table:table-cell office:value-type="string" table:style-name="ce8">
            <text:p>[MICA2013 - MICA2013 - Movimento Independente Concelho Almeirim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400" table:style-name="ce9">
            <text:p>140400</text:p>
          </table:table-cell>
          <table:table-cell office:value-type="string" table:style-name="ce1">
            <text:p>Alpiarç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MPT - TODOS POR ALPIAR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400" table:style-name="ce9">
            <text:p>140400</text:p>
          </table:table-cell>
          <table:table-cell office:value-type="string" table:style-name="ce1">
            <text:p>Alpiarç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MPT - TODOS POR ALPIAR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401" table:style-name="ce9">
            <text:p>140401</text:p>
          </table:table-cell>
          <table:table-cell office:value-type="string" table:style-name="ce1">
            <text:p>Alpiarça</text:p>
          </table:table-cell>
          <table:table-cell office:value-type="string" table:style-name="ce8">
            <text:p>Alpiar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MPT - TODOS POR ALPIAR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600" table:style-name="ce9">
            <text:p>140600</text:p>
          </table:table-cell>
          <table:table-cell office:value-type="string" table:style-name="ce1">
            <text:p>Cartaxo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PV-MPC - Paulo Varanda - Movimento pelo Cartax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600" table:style-name="ce9">
            <text:p>140600</text:p>
          </table:table-cell>
          <table:table-cell office:value-type="string" table:style-name="ce1">
            <text:p>Cartaxo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PV-MPC - Paulo Varanda - Movimento pelo Cartax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604" table:style-name="ce9">
            <text:p>140604</text:p>
          </table:table-cell>
          <table:table-cell office:value-type="string" table:style-name="ce1">
            <text:p>Cartaxo</text:p>
          </table:table-cell>
          <table:table-cell office:value-type="string" table:style-name="ce8">
            <text:p>Pontéve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V-MPC - Paulo Varanda - Movimento pelo Cartax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605" table:style-name="ce9">
            <text:p>140605</text:p>
          </table:table-cell>
          <table:table-cell office:value-type="string" table:style-name="ce1">
            <text:p>Cartaxo</text:p>
          </table:table-cell>
          <table:table-cell office:value-type="string" table:style-name="ce8">
            <text:p>Vala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V-MPC - Paulo Varanda - Movimento pelo Cartax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607" table:style-name="ce9">
            <text:p>140607</text:p>
          </table:table-cell>
          <table:table-cell office:value-type="string" table:style-name="ce1">
            <text:p>Cartaxo</text:p>
          </table:table-cell>
          <table:table-cell office:value-type="string" table:style-name="ce8">
            <text:p>Vila Chã de Ouriqu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V-MPC - Paulo Varanda - Movimento pelo Cartax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608" table:style-name="ce9">
            <text:p>140608</text:p>
          </table:table-cell>
          <table:table-cell office:value-type="string" table:style-name="ce1">
            <text:p>Cartaxo</text:p>
          </table:table-cell>
          <table:table-cell office:value-type="string" table:style-name="ce8">
            <text:p>Vale da Ped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V-MPC - Paulo Varanda - Movimento pelo Cartax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609" table:style-name="ce9">
            <text:p>140609</text:p>
          </table:table-cell>
          <table:table-cell office:value-type="string" table:style-name="ce1">
            <text:p>Cartaxo</text:p>
          </table:table-cell>
          <table:table-cell office:value-type="string" table:style-name="ce8">
            <text:p>União das freguesias de Cartaxo e Vale da Pin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V-MPC - Paulo Varanda - Movimento pelo Cartax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610" table:style-name="ce9">
            <text:p>140610</text:p>
          </table:table-cell>
          <table:table-cell office:value-type="string" table:style-name="ce1">
            <text:p>Cartaxo</text:p>
          </table:table-cell>
          <table:table-cell office:value-type="string" table:style-name="ce8">
            <text:p>União das freguesias de Ereira e Lap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V-MPC - Paulo Varanda - Movimento pelo Cartax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700" table:style-name="ce9">
            <text:p>140700</text:p>
          </table:table-cell>
          <table:table-cell office:value-type="string" table:style-name="ce1">
            <text:p>Chamusc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AIS E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700" table:style-name="ce9">
            <text:p>140700</text:p>
          </table:table-cell>
          <table:table-cell office:value-type="string" table:style-name="ce1">
            <text:p>Chamusc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AIS E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704" table:style-name="ce9">
            <text:p>140704</text:p>
          </table:table-cell>
          <table:table-cell office:value-type="string" table:style-name="ce1">
            <text:p>Chamusca</text:p>
          </table:table-cell>
          <table:table-cell office:value-type="string" table:style-name="ce8">
            <text:p>Ulm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E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705" table:style-name="ce9">
            <text:p>140705</text:p>
          </table:table-cell>
          <table:table-cell office:value-type="string" table:style-name="ce1">
            <text:p>Chamusca</text:p>
          </table:table-cell>
          <table:table-cell office:value-type="string" table:style-name="ce8">
            <text:p>Vale de Cava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E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707" table:style-name="ce9">
            <text:p>140707</text:p>
          </table:table-cell>
          <table:table-cell office:value-type="string" table:style-name="ce1">
            <text:p>Chamusca</text:p>
          </table:table-cell>
          <table:table-cell office:value-type="string" table:style-name="ce8">
            <text:p>Carregu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E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708" table:style-name="ce9">
            <text:p>140708</text:p>
          </table:table-cell>
          <table:table-cell office:value-type="string" table:style-name="ce1">
            <text:p>Chamusca</text:p>
          </table:table-cell>
          <table:table-cell office:value-type="string" table:style-name="ce8">
            <text:p>União das freguesias da Chamusca e Pinheiro Gra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E MELHOR]</text:p>
          </table:table-cell>
          <table:table-cell table:style-name="ce1"/>
          <table:table-cell office:value-type="string" table:style-name="ce8">
            <text:p>[ppf - Ponte para o Fut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709" table:style-name="ce9">
            <text:p>140709</text:p>
          </table:table-cell>
          <table:table-cell office:value-type="string" table:style-name="ce1">
            <text:p>Chamusca</text:p>
          </table:table-cell>
          <table:table-cell office:value-type="string" table:style-name="ce8">
            <text:p>União das freguesias de Parreira e Chou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E MELHOR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800" table:style-name="ce9">
            <text:p>140800</text:p>
          </table:table-cell>
          <table:table-cell office:value-type="string" table:style-name="ce1">
            <text:p>Constânci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MPT - POR CONSTÂNC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800" table:style-name="ce9">
            <text:p>140800</text:p>
          </table:table-cell>
          <table:table-cell office:value-type="string" table:style-name="ce1">
            <text:p>Constânci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MPT - POR CONSTÂNC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801" table:style-name="ce9">
            <text:p>140801</text:p>
          </table:table-cell>
          <table:table-cell office:value-type="string" table:style-name="ce1">
            <text:p>Constância</text:p>
          </table:table-cell>
          <table:table-cell office:value-type="string" table:style-name="ce8">
            <text:p>Constânc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 - POR CONSTÂNC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0803" table:style-name="ce9">
            <text:p>140803</text:p>
          </table:table-cell>
          <table:table-cell office:value-type="string" table:style-name="ce1">
            <text:p>Constância</text:p>
          </table:table-cell>
          <table:table-cell office:value-type="string" table:style-name="ce8">
            <text:p>Santa Margarida da Coutad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 - POR CONSTÂNCI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200" table:style-name="ce9">
            <text:p>141200</text:p>
          </table:table-cell>
          <table:table-cell office:value-type="string" table:style-name="ce1">
            <text:p>Golegã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GOLEGÃ, CONCELHO COM FUTURO]</text:p>
          </table:table-cell>
          <table:table-cell table:style-name="ce1"/>
          <table:table-cell office:value-type="string" table:style-name="ce8">
            <text:p>[fipgap - Força Independente pela Golegã, Azinhaga e Pombalinh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200" table:style-name="ce9">
            <text:p>141200</text:p>
          </table:table-cell>
          <table:table-cell office:value-type="string" table:style-name="ce1">
            <text:p>Golegã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GOLEGÃ, CONCELHO COM FUTURO]</text:p>
          </table:table-cell>
          <table:table-cell table:style-name="ce1"/>
          <table:table-cell office:value-type="string" table:style-name="ce8">
            <text:p>[fipgap - Força Independente pela Golegã, Azinhaga e Pombalinh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201" table:style-name="ce9">
            <text:p>141201</text:p>
          </table:table-cell>
          <table:table-cell office:value-type="string" table:style-name="ce1">
            <text:p>Golegã</text:p>
          </table:table-cell>
          <table:table-cell office:value-type="string" table:style-name="ce8">
            <text:p>Azinhag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iva - Grupo Independente Viver Azinhag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202" table:style-name="ce9">
            <text:p>141202</text:p>
          </table:table-cell>
          <table:table-cell office:value-type="string" table:style-name="ce1">
            <text:p>Golegã</text:p>
          </table:table-cell>
          <table:table-cell office:value-type="string" table:style-name="ce8">
            <text:p>Golegã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GOLEGÃ, CONCELHO COM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203" table:style-name="ce9">
            <text:p>141203</text:p>
          </table:table-cell>
          <table:table-cell office:value-type="string" table:style-name="ce1">
            <text:p>Golegã</text:p>
          </table:table-cell>
          <table:table-cell office:value-type="string" table:style-name="ce8">
            <text:p>Pombalinh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vp - Movimento Viva Pombalinh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309" table:style-name="ce9">
            <text:p>141309</text:p>
          </table:table-cell>
          <table:table-cell office:value-type="string" table:style-name="ce1">
            <text:p>Mação</text:p>
          </table:table-cell>
          <table:table-cell office:value-type="string" table:style-name="ce8">
            <text:p>União das freguesias de Mação, Penhascoso e Abobor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U - Juntos Pela Uni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00" table:style-name="ce9">
            <text:p>141400</text:p>
          </table:table-cell>
          <table:table-cell office:value-type="string" table:style-name="ce1">
            <text:p>Rio Maior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office:value-type="string" table:style-name="ce8">
            <text:p>[MIC-RM - Movimento Independente do Concelho de Rio Mai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00" table:style-name="ce9">
            <text:p>141400</text:p>
          </table:table-cell>
          <table:table-cell office:value-type="string" table:style-name="ce1">
            <text:p>Rio Maior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office:value-type="string" table:style-name="ce8">
            <text:p>[MIC-RM - Movimento Independente do Concelho de Rio Mai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01" table:style-name="ce9">
            <text:p>141401</text:p>
          </table:table-cell>
          <table:table-cell office:value-type="string" table:style-name="ce1">
            <text:p>Rio Maior</text:p>
          </table:table-cell>
          <table:table-cell office:value-type="string" table:style-name="ce8">
            <text:p>Alcobert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02" table:style-name="ce9">
            <text:p>141402</text:p>
          </table:table-cell>
          <table:table-cell office:value-type="string" table:style-name="ce1">
            <text:p>Rio Maior</text:p>
          </table:table-cell>
          <table:table-cell office:value-type="string" table:style-name="ce8">
            <text:p>Arrouqu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05" table:style-name="ce9">
            <text:p>141405</text:p>
          </table:table-cell>
          <table:table-cell office:value-type="string" table:style-name="ce1">
            <text:p>Rio Maior</text:p>
          </table:table-cell>
          <table:table-cell office:value-type="string" table:style-name="ce8">
            <text:p>Frágu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08" table:style-name="ce9">
            <text:p>141408</text:p>
          </table:table-cell>
          <table:table-cell office:value-type="string" table:style-name="ce1">
            <text:p>Rio Maior</text:p>
          </table:table-cell>
          <table:table-cell office:value-type="string" table:style-name="ce8">
            <text:p>Rio Maio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office:value-type="string" table:style-name="ce8">
            <text:p>[MIC-RM - Movimento Independente do Concelho de Rio Mai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10" table:style-name="ce9">
            <text:p>141410</text:p>
          </table:table-cell>
          <table:table-cell office:value-type="string" table:style-name="ce1">
            <text:p>Rio Maior</text:p>
          </table:table-cell>
          <table:table-cell office:value-type="string" table:style-name="ce8">
            <text:p>Asseic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office:value-type="string" table:style-name="ce8">
            <text:p>[MIC-RM - Movimento Independente do Concelho de Rio Mai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11" table:style-name="ce9">
            <text:p>141411</text:p>
          </table:table-cell>
          <table:table-cell office:value-type="string" table:style-name="ce1">
            <text:p>Rio Maior</text:p>
          </table:table-cell>
          <table:table-cell office:value-type="string" table:style-name="ce8">
            <text:p>São Sebasti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15" table:style-name="ce9">
            <text:p>141415</text:p>
          </table:table-cell>
          <table:table-cell office:value-type="string" table:style-name="ce1">
            <text:p>Rio Maior</text:p>
          </table:table-cell>
          <table:table-cell office:value-type="string" table:style-name="ce8">
            <text:p>União das freguesias de Azambujeira e Malaqueij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office:value-type="string" table:style-name="ce8">
            <text:p>[MIC-RM - Movimento Independente do Concelho de Rio Mai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16" table:style-name="ce9">
            <text:p>141416</text:p>
          </table:table-cell>
          <table:table-cell office:value-type="string" table:style-name="ce1">
            <text:p>Rio Maior</text:p>
          </table:table-cell>
          <table:table-cell office:value-type="string" table:style-name="ce8">
            <text:p>União das freguesias de Marmeleira e Assenti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office:value-type="string" table:style-name="ce8">
            <text:p>[UMA - União de Marmeleira e Assenti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17" table:style-name="ce9">
            <text:p>141417</text:p>
          </table:table-cell>
          <table:table-cell office:value-type="string" table:style-name="ce1">
            <text:p>Rio Maior</text:p>
          </table:table-cell>
          <table:table-cell office:value-type="string" table:style-name="ce8">
            <text:p>União das freguesias de Outeiro da Cortiçada e Arruda dos Pis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office:value-type="string" table:style-name="ce8">
            <text:p>[MIC-RM - Movimento Independente do Concelho de Rio Mai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418" table:style-name="ce9">
            <text:p>141418</text:p>
          </table:table-cell>
          <table:table-cell office:value-type="string" table:style-name="ce1">
            <text:p>Rio Maior</text:p>
          </table:table-cell>
          <table:table-cell office:value-type="string" table:style-name="ce8">
            <text:p>União das freguesias de São João da Ribeira e Ribeira de São Jo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ELO FUTURO]</text:p>
          </table:table-cell>
          <table:table-cell table:style-name="ce1"/>
          <table:table-cell office:value-type="string" table:style-name="ce8">
            <text:p>[MIC-RM - Movimento Independente do Concelho de Rio Mai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500" table:style-name="ce9">
            <text:p>141500</text:p>
          </table:table-cell>
          <table:table-cell office:value-type="string" table:style-name="ce1">
            <text:p>Salvaterra de Mago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AIS POR VÓS]</text:p>
          </table:table-cell>
          <table:table-cell table:style-name="ce1"/>
          <table:table-cell office:value-type="string" table:style-name="ce8">
            <text:p>[MCI - Movimento Cidadãos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500" table:style-name="ce9">
            <text:p>141500</text:p>
          </table:table-cell>
          <table:table-cell office:value-type="string" table:style-name="ce1">
            <text:p>Salvaterra de Mago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AIS POR VÓS]</text:p>
          </table:table-cell>
          <table:table-cell table:style-name="ce1"/>
          <table:table-cell office:value-type="string" table:style-name="ce8">
            <text:p>[MCI - Movimento Cidadãos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502" table:style-name="ce9">
            <text:p>141502</text:p>
          </table:table-cell>
          <table:table-cell office:value-type="string" table:style-name="ce1">
            <text:p>Salvaterra de Magos</text:p>
          </table:table-cell>
          <table:table-cell office:value-type="string" table:style-name="ce8">
            <text:p>Marinh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VÓS]</text:p>
          </table:table-cell>
          <table:table-cell table:style-name="ce1"/>
          <table:table-cell office:value-type="string" table:style-name="ce8">
            <text:p>[CIM - Cidadãos Independentes por Marinh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503" table:style-name="ce9">
            <text:p>141503</text:p>
          </table:table-cell>
          <table:table-cell office:value-type="string" table:style-name="ce1">
            <text:p>Salvaterra de Magos</text:p>
          </table:table-cell>
          <table:table-cell office:value-type="string" table:style-name="ce8">
            <text:p>Mug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VÓ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507" table:style-name="ce9">
            <text:p>141507</text:p>
          </table:table-cell>
          <table:table-cell office:value-type="string" table:style-name="ce1">
            <text:p>Salvaterra de Magos</text:p>
          </table:table-cell>
          <table:table-cell office:value-type="string" table:style-name="ce8">
            <text:p>União das freguesias de Glória do Ribatejo e Gra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VÓ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508" table:style-name="ce9">
            <text:p>141508</text:p>
          </table:table-cell>
          <table:table-cell office:value-type="string" table:style-name="ce1">
            <text:p>Salvaterra de Magos</text:p>
          </table:table-cell>
          <table:table-cell office:value-type="string" table:style-name="ce8">
            <text:p>União das freguesias de Salvaterra de Magos e Foros de Salvate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IS POR VÓS]</text:p>
          </table:table-cell>
          <table:table-cell table:style-name="ce1"/>
          <table:table-cell office:value-type="string" table:style-name="ce8">
            <text:p>[MCI - Movimento Cidadãos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600" table:style-name="ce9">
            <text:p>141600</text:p>
          </table:table-cell>
          <table:table-cell office:value-type="string" table:style-name="ce1">
            <text:p>Santarém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s - Mais Santarém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600" table:style-name="ce9">
            <text:p>141600</text:p>
          </table:table-cell>
          <table:table-cell office:value-type="string" table:style-name="ce1">
            <text:p>Santarém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s - Mais Santarém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613" table:style-name="ce9">
            <text:p>141613</text:p>
          </table:table-cell>
          <table:table-cell office:value-type="string" table:style-name="ce1">
            <text:p>Santarém</text:p>
          </table:table-cell>
          <table:table-cell office:value-type="string" table:style-name="ce8">
            <text:p>Moçarr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MO - Movimento Independente Freguesia da Moçarr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630" table:style-name="ce9">
            <text:p>141630</text:p>
          </table:table-cell>
          <table:table-cell office:value-type="string" table:style-name="ce1">
            <text:p>Santarém</text:p>
          </table:table-cell>
          <table:table-cell office:value-type="string" table:style-name="ce8">
            <text:p>União das freguesias de Azoia de Cima e Tremê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TA - Lista Independente Tremez Azo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631" table:style-name="ce9">
            <text:p>141631</text:p>
          </table:table-cell>
          <table:table-cell office:value-type="string" table:style-name="ce1">
            <text:p>Santarém</text:p>
          </table:table-cell>
          <table:table-cell office:value-type="string" table:style-name="ce8">
            <text:p>União das freguesias de Casével e Vaquei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VU - Movimento Independente Vaqueiros Uni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633" table:style-name="ce9">
            <text:p>141633</text:p>
          </table:table-cell>
          <table:table-cell office:value-type="string" table:style-name="ce1">
            <text:p>Santarém</text:p>
          </table:table-cell>
          <table:table-cell office:value-type="string" table:style-name="ce8">
            <text:p>União das freguesias de Santarém (Marvila), Santa Iria da Ribeira de Santarém, Santarém (São Salvador) e Santarém (São Nicolau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 - Mais Santarém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634" table:style-name="ce9">
            <text:p>141634</text:p>
          </table:table-cell>
          <table:table-cell office:value-type="string" table:style-name="ce1">
            <text:p>Santarém</text:p>
          </table:table-cell>
          <table:table-cell office:value-type="string" table:style-name="ce8">
            <text:p>União das freguesias de São Vicente do Paul e Vale de Figu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FU - Movimento Independente das Freguesias Unidas de S. Vicente do Paúl e de Vale de Figu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700" table:style-name="ce9">
            <text:p>141700</text:p>
          </table:table-cell>
          <table:table-cell office:value-type="string" table:style-name="ce1">
            <text:p>Sardoal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GIS - Grupo de Independentes de Sard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700" table:style-name="ce9">
            <text:p>141700</text:p>
          </table:table-cell>
          <table:table-cell office:value-type="string" table:style-name="ce1">
            <text:p>Sardoal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GIS - Grupo de Independentes de Sard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701" table:style-name="ce9">
            <text:p>141701</text:p>
          </table:table-cell>
          <table:table-cell office:value-type="string" table:style-name="ce1">
            <text:p>Sardoal</text:p>
          </table:table-cell>
          <table:table-cell office:value-type="string" table:style-name="ce8">
            <text:p>Alcarav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IS - Grupo de Independentes de Sard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702" table:style-name="ce9">
            <text:p>141702</text:p>
          </table:table-cell>
          <table:table-cell office:value-type="string" table:style-name="ce1">
            <text:p>Sardoal</text:p>
          </table:table-cell>
          <table:table-cell office:value-type="string" table:style-name="ce8">
            <text:p>Santiago de Montalegr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IS - Grupo de Independentes de Sard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703" table:style-name="ce9">
            <text:p>141703</text:p>
          </table:table-cell>
          <table:table-cell office:value-type="string" table:style-name="ce1">
            <text:p>Sardoal</text:p>
          </table:table-cell>
          <table:table-cell office:value-type="string" table:style-name="ce8">
            <text:p>Sardo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IS - Grupo de Independentes de Sard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704" table:style-name="ce9">
            <text:p>141704</text:p>
          </table:table-cell>
          <table:table-cell office:value-type="string" table:style-name="ce1">
            <text:p>Sardoal</text:p>
          </table:table-cell>
          <table:table-cell office:value-type="string" table:style-name="ce8">
            <text:p>Valhasc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IS - Grupo de Independentes de Sardo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800" table:style-name="ce9">
            <text:p>141800</text:p>
          </table:table-cell>
          <table:table-cell office:value-type="string" table:style-name="ce1">
            <text:p>Tomar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ipt - Independentes por Tom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800" table:style-name="ce9">
            <text:p>141800</text:p>
          </table:table-cell>
          <table:table-cell office:value-type="string" table:style-name="ce1">
            <text:p>Tomar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ipt - Independentes por Tom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802" table:style-name="ce9">
            <text:p>141802</text:p>
          </table:table-cell>
          <table:table-cell office:value-type="string" table:style-name="ce1">
            <text:p>Tomar</text:p>
          </table:table-cell>
          <table:table-cell office:value-type="string" table:style-name="ce8">
            <text:p>Asseic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t - Independentes por Tom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804" table:style-name="ce9">
            <text:p>141804</text:p>
          </table:table-cell>
          <table:table-cell office:value-type="string" table:style-name="ce1">
            <text:p>Tomar</text:p>
          </table:table-cell>
          <table:table-cell office:value-type="string" table:style-name="ce8">
            <text:p>Carreguei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t - Independentes por Tom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809" table:style-name="ce9">
            <text:p>141809</text:p>
          </table:table-cell>
          <table:table-cell office:value-type="string" table:style-name="ce1">
            <text:p>Tomar</text:p>
          </table:table-cell>
          <table:table-cell office:value-type="string" table:style-name="ce8">
            <text:p>Paialv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t - Independentes por Tom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813" table:style-name="ce9">
            <text:p>141813</text:p>
          </table:table-cell>
          <table:table-cell office:value-type="string" table:style-name="ce1">
            <text:p>Tomar</text:p>
          </table:table-cell>
          <table:table-cell office:value-type="string" table:style-name="ce8">
            <text:p>São Pedro de Tomar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t - Independentes por Tom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817" table:style-name="ce9">
            <text:p>141817</text:p>
          </table:table-cell>
          <table:table-cell office:value-type="string" table:style-name="ce1">
            <text:p>Tomar</text:p>
          </table:table-cell>
          <table:table-cell office:value-type="string" table:style-name="ce8">
            <text:p>União das freguesias de Além da Ribeira e Pedr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 - Movimento Ímp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818" table:style-name="ce9">
            <text:p>141818</text:p>
          </table:table-cell>
          <table:table-cell office:value-type="string" table:style-name="ce1">
            <text:p>Tomar</text:p>
          </table:table-cell>
          <table:table-cell office:value-type="string" table:style-name="ce8">
            <text:p>União das freguesias de Casais e Alviob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t - Independentes por Tom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819" table:style-name="ce9">
            <text:p>141819</text:p>
          </table:table-cell>
          <table:table-cell office:value-type="string" table:style-name="ce1">
            <text:p>Tomar</text:p>
          </table:table-cell>
          <table:table-cell office:value-type="string" table:style-name="ce8">
            <text:p>União das freguesias de Madalena e Beselg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t - Independentes por Tom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820" table:style-name="ce9">
            <text:p>141820</text:p>
          </table:table-cell>
          <table:table-cell office:value-type="string" table:style-name="ce1">
            <text:p>Tomar</text:p>
          </table:table-cell>
          <table:table-cell office:value-type="string" table:style-name="ce8">
            <text:p>União das freguesias de Serra e Junc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t - Independentes por Tom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821" table:style-name="ce9">
            <text:p>141821</text:p>
          </table:table-cell>
          <table:table-cell office:value-type="string" table:style-name="ce1">
            <text:p>Tomar</text:p>
          </table:table-cell>
          <table:table-cell office:value-type="string" table:style-name="ce8">
            <text:p>União das freguesias de Tomar (São João Baptista) e Santa Maria dos Olivai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t - Independentes por Tom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902" table:style-name="ce9">
            <text:p>141902</text:p>
          </table:table-cell>
          <table:table-cell office:value-type="string" table:style-name="ce1">
            <text:p>Torres Novas</text:p>
          </table:table-cell>
          <table:table-cell office:value-type="string" table:style-name="ce8">
            <text:p>Assentiz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.I.F.A. - Grupo de Independentes Freguesia de Assenti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910" table:style-name="ce9">
            <text:p>141910</text:p>
          </table:table-cell>
          <table:table-cell office:value-type="string" table:style-name="ce1">
            <text:p>Torres Novas</text:p>
          </table:table-cell>
          <table:table-cell office:value-type="string" table:style-name="ce8">
            <text:p>Riach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RUPPO - Grupo Riachenses Unidos pelo Pov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917" table:style-name="ce9">
            <text:p>141917</text:p>
          </table:table-cell>
          <table:table-cell office:value-type="string" table:style-name="ce1">
            <text:p>Torres Novas</text:p>
          </table:table-cell>
          <table:table-cell office:value-type="string" table:style-name="ce8">
            <text:p>Meia V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V.C. - Meia Via no Cor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1921" table:style-name="ce9">
            <text:p>141921</text:p>
          </table:table-cell>
          <table:table-cell office:value-type="string" table:style-name="ce1">
            <text:p>Torres Novas</text:p>
          </table:table-cell>
          <table:table-cell office:value-type="string" table:style-name="ce8">
            <text:p>União das freguesias de Torres Novas (São Pedro), Lapas e Ribeira Branc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A.S.P.L.R.B. - Margens do Almonda São Pedro, Lapas e Ribeira Branc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00" table:style-name="ce9">
            <text:p>142100</text:p>
          </table:table-cell>
          <table:table-cell office:value-type="string" table:style-name="ce1">
            <text:p>Ourém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MOVE - Movimento Ourém Vivo e Empreended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00" table:style-name="ce9">
            <text:p>142100</text:p>
          </table:table-cell>
          <table:table-cell office:value-type="string" table:style-name="ce1">
            <text:p>Ourém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MOVE - Movimento Ourém Vivo e Empreended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01" table:style-name="ce9">
            <text:p>142101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Alburite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02" table:style-name="ce9">
            <text:p>142102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Atougu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ceipa - Cidadãos Eleitores Independentes Pela Atougu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04" table:style-name="ce9">
            <text:p>142104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Caxari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MOVE - Movimento Ourém Vivo e Empreended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05" table:style-name="ce9">
            <text:p>142105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Espi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06" table:style-name="ce9">
            <text:p>142106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Fátim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misf - Movimento Independente SOMOS FÁTIM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11" table:style-name="ce9">
            <text:p>142111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Nossa Senhora das Misericórdi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MOVE - Movimento Ourém Vivo e Empreended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13" table:style-name="ce9">
            <text:p>142113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Sei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MOVE - Movimento Ourém Vivo e Empreended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14" table:style-name="ce9">
            <text:p>142114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Urqu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MOVE - Movimento Ourém Vivo e Empreended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15" table:style-name="ce9">
            <text:p>142115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Nossa Senhora da Pieda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MOVE - Movimento Ourém Vivo e Empreended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19" table:style-name="ce9">
            <text:p>142119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União das freguesias de Freixianda, Ribeira do Fárrio e Formig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20" table:style-name="ce9">
            <text:p>142120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União das freguesias de Gondemaria e Oliv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MOVE - Movimento Ourém Vivo e Empreended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21" table:style-name="ce9">
            <text:p>142121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União das freguesias de Matas e Cerc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Mumec - Movimento Unido Matas e Cerc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42122" table:style-name="ce9">
            <text:p>142122</text:p>
          </table:table-cell>
          <table:table-cell office:value-type="string" table:style-name="ce1">
            <text:p>Ourém</text:p>
          </table:table-cell>
          <table:table-cell office:value-type="string" table:style-name="ce8">
            <text:p>União das freguesias de Rio de Couros e Casal dos Bernard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OURÉM SEMPRE]</text:p>
          </table:table-cell>
          <table:table-cell table:style-name="ce1"/>
          <table:table-cell office:value-type="string" table:style-name="ce8">
            <text:p>[MOVE - Movimento Ourém Vivo e Empreendedo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303" table:style-name="ce9">
            <text:p>150303</text:p>
          </table:table-cell>
          <table:table-cell office:value-type="string" table:style-name="ce1">
            <text:p>Almada</text:p>
          </table:table-cell>
          <table:table-cell office:value-type="string" table:style-name="ce8">
            <text:p>Costa da Caparic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dcpc - Movimento de Cidadania pela Cost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411" table:style-name="ce9">
            <text:p>150411</text:p>
          </table:table-cell>
          <table:table-cell office:value-type="string" table:style-name="ce1">
            <text:p>Barreiro</text:p>
          </table:table-cell>
          <table:table-cell office:value-type="string" table:style-name="ce8">
            <text:p>União das freguesias de Palhais e Coin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I - MOVIMENTO CIDADÃOS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500" table:style-name="ce9">
            <text:p>150500</text:p>
          </table:table-cell>
          <table:table-cell office:value-type="string" table:style-name="ce1">
            <text:p>Grândol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GM - Grândola Melhor]</text:p>
          </table:table-cell>
          <table:table-cell office:value-type="string" table:style-name="ce1">
            <text:p>[MIG - Movimento Independente de Grândol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500" table:style-name="ce9">
            <text:p>150500</text:p>
          </table:table-cell>
          <table:table-cell office:value-type="string" table:style-name="ce1">
            <text:p>Grândol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GM - Grândola Melhor]</text:p>
          </table:table-cell>
          <table:table-cell office:value-type="string" table:style-name="ce1">
            <text:p>[MIG - Movimento Independente de Grândol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503" table:style-name="ce9">
            <text:p>150503</text:p>
          </table:table-cell>
          <table:table-cell office:value-type="string" table:style-name="ce1">
            <text:p>Grândola</text:p>
          </table:table-cell>
          <table:table-cell office:value-type="string" table:style-name="ce8">
            <text:p>Melid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M - Grândola Melhor]</text:p>
          </table:table-cell>
          <table:table-cell office:value-type="string" table:style-name="ce1">
            <text:p>[MIG - Movimento Independente de Grândol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505" table:style-name="ce9">
            <text:p>150505</text:p>
          </table:table-cell>
          <table:table-cell office:value-type="string" table:style-name="ce1">
            <text:p>Grândola</text:p>
          </table:table-cell>
          <table:table-cell office:value-type="string" table:style-name="ce8">
            <text:p>Carvalh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G - Movimento Independente de Grândo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506" table:style-name="ce9">
            <text:p>150506</text:p>
          </table:table-cell>
          <table:table-cell office:value-type="string" table:style-name="ce1">
            <text:p>Grândola</text:p>
          </table:table-cell>
          <table:table-cell office:value-type="string" table:style-name="ce8">
            <text:p>União das freguesias de Grândola e Santa Margarida da Ser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MIG - Movimento Independente de Grândola]</text:p>
          </table:table-cell>
          <table:table-cell office:value-type="string" table:style-name="ce8">
            <text:p>[GM - Grândola Melhor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608" table:style-name="ce9">
            <text:p>150608</text:p>
          </table:table-cell>
          <table:table-cell office:value-type="string" table:style-name="ce1">
            <text:p>Moita</text:p>
          </table:table-cell>
          <table:table-cell office:value-type="string" table:style-name="ce8">
            <text:p>União das freguesias de Gaio-Rosário e Sarilhos Pequen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R - União Ribeirinha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150800" table:style-name="ce9">
            <text:p>150800</text:p>
          </table:table-cell>
          <table:table-cell office:value-type="string" table:style-name="ce1">
            <text:p>Palmel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ALMEL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800" table:style-name="ce9">
            <text:p>150800</text:p>
          </table:table-cell>
          <table:table-cell office:value-type="string" table:style-name="ce1">
            <text:p>Palmel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ALMEL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802" table:style-name="ce9">
            <text:p>150802</text:p>
          </table:table-cell>
          <table:table-cell office:value-type="string" table:style-name="ce1">
            <text:p>Palmela</text:p>
          </table:table-cell>
          <table:table-cell office:value-type="string" table:style-name="ce8">
            <text:p>Palm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ALMEL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803" table:style-name="ce9">
            <text:p>150803</text:p>
          </table:table-cell>
          <table:table-cell office:value-type="string" table:style-name="ce1">
            <text:p>Palmela</text:p>
          </table:table-cell>
          <table:table-cell office:value-type="string" table:style-name="ce8">
            <text:p>Pinhal Nov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ALMEL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804" table:style-name="ce9">
            <text:p>150804</text:p>
          </table:table-cell>
          <table:table-cell office:value-type="string" table:style-name="ce1">
            <text:p>Palmela</text:p>
          </table:table-cell>
          <table:table-cell office:value-type="string" table:style-name="ce8">
            <text:p>Quinta do Anj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ALMEL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806" table:style-name="ce9">
            <text:p>150806</text:p>
          </table:table-cell>
          <table:table-cell office:value-type="string" table:style-name="ce1">
            <text:p>Palmela</text:p>
          </table:table-cell>
          <table:table-cell office:value-type="string" table:style-name="ce8">
            <text:p>União das freguesias de Poceirão e Marate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ALMELA MAI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0902" table:style-name="ce9">
            <text:p>150902</text:p>
          </table:table-cell>
          <table:table-cell office:value-type="string" table:style-name="ce1">
            <text:p>Santiago do Cacém</text:p>
          </table:table-cell>
          <table:table-cell office:value-type="string" table:style-name="ce8">
            <text:p>Alvala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A - Cidadãos por Alvalad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100" table:style-name="ce9">
            <text:p>151100</text:p>
          </table:table-cell>
          <table:table-cell office:value-type="string" table:style-name="ce1">
            <text:p>Sesimb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ABRAÇAR SESIMBRA]</text:p>
          </table:table-cell>
          <table:table-cell table:style-name="ce1"/>
          <table:table-cell office:value-type="string" table:style-name="ce8">
            <text:p>[MSU - Movimento Sesimbra Uni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100" table:style-name="ce9">
            <text:p>151100</text:p>
          </table:table-cell>
          <table:table-cell office:value-type="string" table:style-name="ce1">
            <text:p>Sesimb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ABRAÇAR SESIMBRA]</text:p>
          </table:table-cell>
          <table:table-cell table:style-name="ce1"/>
          <table:table-cell office:value-type="string" table:style-name="ce8">
            <text:p>[MSU - Movimento Sesimbra Uni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101" table:style-name="ce9">
            <text:p>151101</text:p>
          </table:table-cell>
          <table:table-cell office:value-type="string" table:style-name="ce1">
            <text:p>Sesimbra</text:p>
          </table:table-cell>
          <table:table-cell office:value-type="string" table:style-name="ce8">
            <text:p>Sesimbra (Castel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BRAÇAR SESIMBRA]</text:p>
          </table:table-cell>
          <table:table-cell table:style-name="ce1"/>
          <table:table-cell office:value-type="string" table:style-name="ce8">
            <text:p>[MSU - Movimento Sesimbra Uni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102" table:style-name="ce9">
            <text:p>151102</text:p>
          </table:table-cell>
          <table:table-cell office:value-type="string" table:style-name="ce1">
            <text:p>Sesimbra</text:p>
          </table:table-cell>
          <table:table-cell office:value-type="string" table:style-name="ce8">
            <text:p>Sesimbra (Santiag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BRAÇAR SESIMBRA]</text:p>
          </table:table-cell>
          <table:table-cell table:style-name="ce1"/>
          <table:table-cell office:value-type="string" table:style-name="ce8">
            <text:p>[MSU - Movimento Sesimbra Uni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103" table:style-name="ce9">
            <text:p>151103</text:p>
          </table:table-cell>
          <table:table-cell office:value-type="string" table:style-name="ce1">
            <text:p>Sesimbra</text:p>
          </table:table-cell>
          <table:table-cell office:value-type="string" table:style-name="ce8">
            <text:p>Quinta do Co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ABRAÇAR SESIMBRA]</text:p>
          </table:table-cell>
          <table:table-cell table:style-name="ce1"/>
          <table:table-cell office:value-type="string" table:style-name="ce8">
            <text:p>[MSU - Movimento Sesimbra Uni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200" table:style-name="ce9">
            <text:p>151200</text:p>
          </table:table-cell>
          <table:table-cell office:value-type="string" table:style-name="ce1">
            <text:p>Setúbal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OR SETÚBAL, POR SI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200" table:style-name="ce9">
            <text:p>151200</text:p>
          </table:table-cell>
          <table:table-cell office:value-type="string" table:style-name="ce1">
            <text:p>Setúbal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OR SETÚBAL, POR SI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205" table:style-name="ce9">
            <text:p>151205</text:p>
          </table:table-cell>
          <table:table-cell office:value-type="string" table:style-name="ce1">
            <text:p>Setúbal</text:p>
          </table:table-cell>
          <table:table-cell office:value-type="string" table:style-name="ce8">
            <text:p>Setúbal (São Sebasti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SETÚBAL, POR SI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207" table:style-name="ce9">
            <text:p>151207</text:p>
          </table:table-cell>
          <table:table-cell office:value-type="string" table:style-name="ce1">
            <text:p>Setúbal</text:p>
          </table:table-cell>
          <table:table-cell office:value-type="string" table:style-name="ce8">
            <text:p>Gâmbia-Pontes-Alto da Gue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SETÚBAL, POR SI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208" table:style-name="ce9">
            <text:p>151208</text:p>
          </table:table-cell>
          <table:table-cell office:value-type="string" table:style-name="ce1">
            <text:p>Setúbal</text:p>
          </table:table-cell>
          <table:table-cell office:value-type="string" table:style-name="ce8">
            <text:p>Sa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SETÚBAL, POR SI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209" table:style-name="ce9">
            <text:p>151209</text:p>
          </table:table-cell>
          <table:table-cell office:value-type="string" table:style-name="ce1">
            <text:p>Setúbal</text:p>
          </table:table-cell>
          <table:table-cell office:value-type="string" table:style-name="ce8">
            <text:p>União das freguesias de Azeitão (São Lourenço e São Sim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SETÚBAL, POR SI]</text:p>
          </table:table-cell>
          <table:table-cell table:style-name="ce1"/>
          <table:table-cell office:value-type="string" table:style-name="ce8">
            <text:p>[anc - Azeitão no Cor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210" table:style-name="ce9">
            <text:p>151210</text:p>
          </table:table-cell>
          <table:table-cell office:value-type="string" table:style-name="ce1">
            <text:p>Setúbal</text:p>
          </table:table-cell>
          <table:table-cell office:value-type="string" table:style-name="ce8">
            <text:p>União das freguesias de Setúbal (São Julião, Nossa Senhora da Anunciada e Santa Maria da Graç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SETÚBAL, POR SI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300" table:style-name="ce9">
            <text:p>151300</text:p>
          </table:table-cell>
          <table:table-cell office:value-type="string" table:style-name="ce1">
            <text:p>Sines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SIM - SIM - Sines Interessa M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300" table:style-name="ce9">
            <text:p>151300</text:p>
          </table:table-cell>
          <table:table-cell office:value-type="string" table:style-name="ce1">
            <text:p>Sines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SIM - SIM - Sines Interessa M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301" table:style-name="ce9">
            <text:p>151301</text:p>
          </table:table-cell>
          <table:table-cell office:value-type="string" table:style-name="ce1">
            <text:p>Sines</text:p>
          </table:table-cell>
          <table:table-cell office:value-type="string" table:style-name="ce8">
            <text:p>Sin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IM - SIM - Sines Interessa M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51302" table:style-name="ce9">
            <text:p>151302</text:p>
          </table:table-cell>
          <table:table-cell office:value-type="string" table:style-name="ce1">
            <text:p>Sines</text:p>
          </table:table-cell>
          <table:table-cell office:value-type="string" table:style-name="ce8">
            <text:p>Porto Cov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IM - SIM - Sines Interessa M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106" table:style-name="ce9">
            <text:p>160106</text:p>
          </table:table-cell>
          <table:table-cell office:value-type="string" table:style-name="ce1">
            <text:p>Arcos de Valdevez</text:p>
          </table:table-cell>
          <table:table-cell office:value-type="string" table:style-name="ce8">
            <text:p>Cabrei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cf - Cabreiro Com Fut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121" table:style-name="ce9">
            <text:p>160121</text:p>
          </table:table-cell>
          <table:table-cell office:value-type="string" table:style-name="ce1">
            <text:p>Arcos de Valdevez</text:p>
          </table:table-cell>
          <table:table-cell office:value-type="string" table:style-name="ce8">
            <text:p>Miran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m - Unidos Pela Miran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130" table:style-name="ce9">
            <text:p>160130</text:p>
          </table:table-cell>
          <table:table-cell office:value-type="string" table:style-name="ce1">
            <text:p>Arcos de Valdevez</text:p>
          </table:table-cell>
          <table:table-cell office:value-type="string" table:style-name="ce8">
            <text:p>Rio Fri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R - Movimento Independente Por Rio Fri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146" table:style-name="ce9">
            <text:p>160146</text:p>
          </table:table-cell>
          <table:table-cell office:value-type="string" table:style-name="ce1">
            <text:p>Arcos de Valdevez</text:p>
          </table:table-cell>
          <table:table-cell office:value-type="string" table:style-name="ce8">
            <text:p>Soaj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SI - Movimento Soajeir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153" table:style-name="ce9">
            <text:p>160153</text:p>
          </table:table-cell>
          <table:table-cell office:value-type="string" table:style-name="ce1">
            <text:p>Arcos de Valdevez</text:p>
          </table:table-cell>
          <table:table-cell office:value-type="string" table:style-name="ce8">
            <text:p>União das freguesias de Arcos de Valdevez (São Paio) e Gi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GAS - Movimento Independente de Giela e Arcos de Valdeve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154" table:style-name="ce9">
            <text:p>160154</text:p>
          </table:table-cell>
          <table:table-cell office:value-type="string" table:style-name="ce1">
            <text:p>Arcos de Valdevez</text:p>
          </table:table-cell>
          <table:table-cell office:value-type="string" table:style-name="ce8">
            <text:p>União das freguesias de Arcos de Valdevez (Salvador), Vila Fonche e Para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AV - Movimento Independente Arcos de Valdeve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158" table:style-name="ce9">
            <text:p>160158</text:p>
          </table:table-cell>
          <table:table-cell office:value-type="string" table:style-name="ce1">
            <text:p>Arcos de Valdevez</text:p>
          </table:table-cell>
          <table:table-cell office:value-type="string" table:style-name="ce8">
            <text:p>União das freguesias de Jolda (Madalena) e Rio Cabr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JRC - Unidos Por Jolda Rio Cabr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161" table:style-name="ce9">
            <text:p>160161</text:p>
          </table:table-cell>
          <table:table-cell office:value-type="string" table:style-name="ce1">
            <text:p>Arcos de Valdevez</text:p>
          </table:table-cell>
          <table:table-cell office:value-type="string" table:style-name="ce8">
            <text:p>União das freguesias de São Jorge e Erm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sjee - Unidos Por São Jorge e Ermel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211" table:style-name="ce9">
            <text:p>160211</text:p>
          </table:table-cell>
          <table:table-cell office:value-type="string" table:style-name="ce1">
            <text:p>Caminha</text:p>
          </table:table-cell>
          <table:table-cell office:value-type="string" table:style-name="ce8">
            <text:p>Lanhel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LC - Movimento Lanhelas no Cor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214" table:style-name="ce9">
            <text:p>160214</text:p>
          </table:table-cell>
          <table:table-cell office:value-type="string" table:style-name="ce1">
            <text:p>Caminha</text:p>
          </table:table-cell>
          <table:table-cell office:value-type="string" table:style-name="ce8">
            <text:p>Riba de Ânco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RA - Juntos Por Riba de Ânco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215" table:style-name="ce9">
            <text:p>160215</text:p>
          </table:table-cell>
          <table:table-cell office:value-type="string" table:style-name="ce1">
            <text:p>Caminha</text:p>
          </table:table-cell>
          <table:table-cell office:value-type="string" table:style-name="ce8">
            <text:p>Seix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VES - Movimento Independente Voto Em Seix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218" table:style-name="ce9">
            <text:p>160218</text:p>
          </table:table-cell>
          <table:table-cell office:value-type="string" table:style-name="ce1">
            <text:p>Caminha</text:p>
          </table:table-cell>
          <table:table-cell office:value-type="string" table:style-name="ce8">
            <text:p>Vilar de Mou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V - Movimento Independente Vilarmourens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223" table:style-name="ce9">
            <text:p>160223</text:p>
          </table:table-cell>
          <table:table-cell office:value-type="string" table:style-name="ce1">
            <text:p>Caminha</text:p>
          </table:table-cell>
          <table:table-cell office:value-type="string" table:style-name="ce8">
            <text:p>União das freguesias de Gondar e Orbacém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GO - Movimento Independente de Gondar e Orbacém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160320" table:style-name="ce9">
            <text:p>160320</text:p>
          </table:table-cell>
          <table:table-cell office:value-type="string" table:style-name="ce1">
            <text:p>Melgaço</text:p>
          </table:table-cell>
          <table:table-cell office:value-type="string" table:style-name="ce8">
            <text:p>União das freguesias de Chaviães e Paç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idcep - Cidadãos Independentes de Chaviães e Paç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404" table:style-name="ce9">
            <text:p>160404</text:p>
          </table:table-cell>
          <table:table-cell office:value-type="string" table:style-name="ce1">
            <text:p>Monção</text:p>
          </table:table-cell>
          <table:table-cell office:value-type="string" table:style-name="ce8">
            <text:p>Barbei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IPB - Independentes por Barbeita]</text:p>
          </table:table-cell>
          <table:table-cell office:value-type="string" table:style-name="ce8">
            <text:p>[GIEB - Grupo Independente de Eleitores de Barbeit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405" table:style-name="ce9">
            <text:p>160405</text:p>
          </table:table-cell>
          <table:table-cell office:value-type="string" table:style-name="ce1">
            <text:p>Monção</text:p>
          </table:table-cell>
          <table:table-cell office:value-type="string" table:style-name="ce8">
            <text:p>Barroças e Tai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IBT - Cidadãos Independentes de Barroças e Taias]</text:p>
          </table:table-cell>
          <table:table-cell office:value-type="string" table:style-name="ce1">
            <text:p>[MJTB - Movimento Juventude de Barroças e Taia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406" table:style-name="ce9">
            <text:p>160406</text:p>
          </table:table-cell>
          <table:table-cell office:value-type="string" table:style-name="ce1">
            <text:p>Monção</text:p>
          </table:table-cell>
          <table:table-cell office:value-type="string" table:style-name="ce8">
            <text:p>B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EIB - Grupo de Eleitores Independentes da Be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415" table:style-name="ce9">
            <text:p>160415</text:p>
          </table:table-cell>
          <table:table-cell office:value-type="string" table:style-name="ce1">
            <text:p>Monção</text:p>
          </table:table-cell>
          <table:table-cell office:value-type="string" table:style-name="ce8">
            <text:p>Meruf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M - Movimento Independente por Meru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418" table:style-name="ce9">
            <text:p>160418</text:p>
          </table:table-cell>
          <table:table-cell office:value-type="string" table:style-name="ce1">
            <text:p>Monção</text:p>
          </table:table-cell>
          <table:table-cell office:value-type="string" table:style-name="ce8">
            <text:p>Mor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CIM - Cidadãos Independentes de Moreira]</text:p>
          </table:table-cell>
          <table:table-cell office:value-type="string" table:style-name="ce8">
            <text:p>[ANT - A Nossa Terr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420" table:style-name="ce9">
            <text:p>160420</text:p>
          </table:table-cell>
          <table:table-cell office:value-type="string" table:style-name="ce1">
            <text:p>Monção</text:p>
          </table:table-cell>
          <table:table-cell office:value-type="string" table:style-name="ce8">
            <text:p>Pi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NTP - Unidos Pela Nossa Terra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160421" table:style-name="ce9">
            <text:p>160421</text:p>
          </table:table-cell>
          <table:table-cell office:value-type="string" table:style-name="ce1">
            <text:p>Monção</text:p>
          </table:table-cell>
          <table:table-cell office:value-type="string" table:style-name="ce8">
            <text:p>Pinhei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IP - Cidadãos Independentes de Pinh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428" table:style-name="ce9">
            <text:p>160428</text:p>
          </table:table-cell>
          <table:table-cell office:value-type="string" table:style-name="ce1">
            <text:p>Monção</text:p>
          </table:table-cell>
          <table:table-cell office:value-type="string" table:style-name="ce8">
            <text:p>Tangi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DT - Juventude de Tangi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435" table:style-name="ce9">
            <text:p>160435</text:p>
          </table:table-cell>
          <table:table-cell office:value-type="string" table:style-name="ce1">
            <text:p>Monção</text:p>
          </table:table-cell>
          <table:table-cell office:value-type="string" table:style-name="ce8">
            <text:p>União das freguesias de Ceivães e Badim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EIBA - Grupo Independente de Eleitores de Ceivães-Badim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437" table:style-name="ce9">
            <text:p>160437</text:p>
          </table:table-cell>
          <table:table-cell office:value-type="string" table:style-name="ce1">
            <text:p>Monção</text:p>
          </table:table-cell>
          <table:table-cell office:value-type="string" table:style-name="ce8">
            <text:p>União das freguesias de Messegães, Valadares e Sá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P - Unidos pelo Progress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600" table:style-name="ce9">
            <text:p>160600</text:p>
          </table:table-cell>
          <table:table-cell office:value-type="string" table:style-name="ce1">
            <text:p>Ponte da Barc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UDAR - Movimento de Cidadãos Barquens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600" table:style-name="ce9">
            <text:p>160600</text:p>
          </table:table-cell>
          <table:table-cell office:value-type="string" table:style-name="ce1">
            <text:p>Ponte da Barc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UDAR - Movimento de Cidadãos Barquens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602" table:style-name="ce9">
            <text:p>160602</text:p>
          </table:table-cell>
          <table:table-cell office:value-type="string" table:style-name="ce1">
            <text:p>Ponte da Barca</text:p>
          </table:table-cell>
          <table:table-cell office:value-type="string" table:style-name="ce8">
            <text:p>Boiv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tpb - Movimento Independente Todos Por Boivã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604" table:style-name="ce9">
            <text:p>160604</text:p>
          </table:table-cell>
          <table:table-cell office:value-type="string" table:style-name="ce1">
            <text:p>Ponte da Barca</text:p>
          </table:table-cell>
          <table:table-cell office:value-type="string" table:style-name="ce8">
            <text:p>Brit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UDAR - Movimento de Cidadãos Barquens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606" table:style-name="ce9">
            <text:p>160606</text:p>
          </table:table-cell>
          <table:table-cell office:value-type="string" table:style-name="ce1">
            <text:p>Ponte da Barca</text:p>
          </table:table-cell>
          <table:table-cell office:value-type="string" table:style-name="ce8">
            <text:p>Cuide de Vila Ver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c - Unidos Por Cuid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612" table:style-name="ce9">
            <text:p>160612</text:p>
          </table:table-cell>
          <table:table-cell office:value-type="string" table:style-name="ce1">
            <text:p>Ponte da Barca</text:p>
          </table:table-cell>
          <table:table-cell office:value-type="string" table:style-name="ce8">
            <text:p>Lindos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UDAR - Movimento de Cidadãos Barquens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614" table:style-name="ce9">
            <text:p>160614</text:p>
          </table:table-cell>
          <table:table-cell office:value-type="string" table:style-name="ce1">
            <text:p>Ponte da Barca</text:p>
          </table:table-cell>
          <table:table-cell office:value-type="string" table:style-name="ce8">
            <text:p>Olei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fo - Força Ol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628" table:style-name="ce9">
            <text:p>160628</text:p>
          </table:table-cell>
          <table:table-cell office:value-type="string" table:style-name="ce1">
            <text:p>Ponte da Barca</text:p>
          </table:table-cell>
          <table:table-cell office:value-type="string" table:style-name="ce8">
            <text:p>União das freguesias de Ponte da Barca, Vila Nova de Muía e Paço Vedro de Magalh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UDAR - Movimento de Cidadãos Barquens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630" table:style-name="ce9">
            <text:p>160630</text:p>
          </table:table-cell>
          <table:table-cell office:value-type="string" table:style-name="ce1">
            <text:p>Ponte da Barca</text:p>
          </table:table-cell>
          <table:table-cell office:value-type="string" table:style-name="ce8">
            <text:p>União das freguesias de Vila Chã (São João Baptista e Santiag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UDAR - Movimento de Cidadãos Barquens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00" table:style-name="ce9">
            <text:p>160700</text:p>
          </table:table-cell>
          <table:table-cell office:value-type="string" table:style-name="ce1">
            <text:p>Ponte de Lim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51 - MOVIMENTO 51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00" table:style-name="ce9">
            <text:p>160700</text:p>
          </table:table-cell>
          <table:table-cell office:value-type="string" table:style-name="ce1">
            <text:p>Ponte de Lim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51 - MOVIMENTO 51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01" table:style-name="ce9">
            <text:p>160701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Anai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51 - MOVIMENTO 51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03" table:style-name="ce9">
            <text:p>160703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São Pedro d'Arc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spda - UNIDOS POR SÃO PEDRO DE ARC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04" table:style-name="ce9">
            <text:p>160704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Arcoz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pr - PEDRA RICA]</text:p>
          </table:table-cell>
          <table:table-cell office:value-type="string" table:style-name="ce8">
            <text:p>[m51 - MOVIMENTO 51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07" table:style-name="ce9">
            <text:p>160707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Beiral do Lim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T - NOSSA TERRA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160708" table:style-name="ce9">
            <text:p>160708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Bertiand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b - JUNTOS POR BERTIAN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13" table:style-name="ce9">
            <text:p>160713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Calhei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T -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16" table:style-name="ce9">
            <text:p>160716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Correlhã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NT - NOSSA TERRA]</text:p>
          </table:table-cell>
          <table:table-cell office:value-type="string" table:style-name="ce8">
            <text:p>[m51 - MOVIMENTO 51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17" table:style-name="ce9">
            <text:p>160717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Estorã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e - POR ESTORÃ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18" table:style-name="ce9">
            <text:p>160718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Fac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NT - NOSSA TERRA]</text:p>
          </table:table-cell>
          <table:table-cell office:value-type="string" table:style-name="ce8">
            <text:p>[m51 - MOVIMENTO 51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19" table:style-name="ce9">
            <text:p>160719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Feitos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51 - MOVIMENTO 51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21" table:style-name="ce9">
            <text:p>160721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Font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fnc - FONTÃO NO COR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24" table:style-name="ce9">
            <text:p>160724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Friastel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NT - NOSSA TERRA]</text:p>
          </table:table-cell>
          <table:table-cell office:value-type="string" table:style-name="ce8">
            <text:p>[m51 - MOVIMENTO 51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26" table:style-name="ce9">
            <text:p>160726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Gand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NT - NOSSA TERRA]</text:p>
          </table:table-cell>
          <table:table-cell office:value-type="string" table:style-name="ce8">
            <text:p>[m51 - MOVIMENTO 51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27" table:style-name="ce9">
            <text:p>160727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Gemi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NT - NOSSA TERRA]</text:p>
          </table:table-cell>
          <table:table-cell office:value-type="string" table:style-name="ce8">
            <text:p>[m51 - MOVIMENTO 51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28" table:style-name="ce9">
            <text:p>160728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Gonduf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g - MUDAR GONDU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29" table:style-name="ce9">
            <text:p>160729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Labruj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51 - MOVIMENTO 51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34" table:style-name="ce9">
            <text:p>160734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Poiar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51 - MOVIMENTO 51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39" table:style-name="ce9">
            <text:p>160739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Rib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rof - RIBEIRA OUTRO FUT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40" table:style-name="ce9">
            <text:p>160740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Sá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51 - MOVIMENTO 51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42" table:style-name="ce9">
            <text:p>160742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Santa Comb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51 - MOVIMENTO 51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43" table:style-name="ce9">
            <text:p>160743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Santa Cruz do Lim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NT - NOSSA TERRA]</text:p>
          </table:table-cell>
          <table:table-cell office:value-type="string" table:style-name="ce8">
            <text:p>[m51 - MOVIMENTO 51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44" table:style-name="ce9">
            <text:p>160744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Rebordões (Santa Maria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uprsm - UNIDOS POR REBORDÕES SANTA MARIA]</text:p>
          </table:table-cell>
          <table:table-cell office:value-type="string" table:style-name="ce8">
            <text:p>[m51 - MOVIMENTO 51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45" table:style-name="ce9">
            <text:p>160745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Sea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T -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46" table:style-name="ce9">
            <text:p>160746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Serded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pp - SERDEDELO PELO POV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47" table:style-name="ce9">
            <text:p>160747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Rebordões (Souto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51 - MOVIMENTO 51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50" table:style-name="ce9">
            <text:p>160750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Vitorino das Don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NT - NOSSA TERRA]</text:p>
          </table:table-cell>
          <table:table-cell office:value-type="string" table:style-name="ce8">
            <text:p>[m51 - MOVIMENTO 51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52" table:style-name="ce9">
            <text:p>160752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Arca e Ponte de Lim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F - JUNTOS PELO FUTURO]</text:p>
          </table:table-cell>
          <table:table-cell office:value-type="string" table:style-name="ce1">
            <text:p>[m51 - MOVIMENTO 51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53" table:style-name="ce9">
            <text:p>160753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Ardegão, Freixo e Ma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51 - MOVIMENTO 51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54" table:style-name="ce9">
            <text:p>160754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Associação de freguesias do Vale do Neiv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51 - MOVIMENTO 51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55" table:style-name="ce9">
            <text:p>160755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Bárrio e Cep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bec - INDEPENDENTES POR BÁRRIO E CEPÕ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56" table:style-name="ce9">
            <text:p>160756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Cabaços e Fojo Lob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cfel - UNIDOS POR CABAÇOS, FOJO E LOB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57" table:style-name="ce9">
            <text:p>160757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Cabração e Moreira do Lim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NT - NOSSA TERRA]</text:p>
          </table:table-cell>
          <table:table-cell office:value-type="string" table:style-name="ce8">
            <text:p>[MCU - MOREIRA O LIMA E CABRAÇÃO UNIDO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58" table:style-name="ce9">
            <text:p>160758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Fornelos e Queija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T -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59" table:style-name="ce9">
            <text:p>160759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Labrujó, Rendufe e Vilar do Mont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T -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760" table:style-name="ce9">
            <text:p>160760</text:p>
          </table:table-cell>
          <table:table-cell office:value-type="string" table:style-name="ce1">
            <text:p>Ponte de Lima</text:p>
          </table:table-cell>
          <table:table-cell office:value-type="string" table:style-name="ce8">
            <text:p>Navió e Vitorino dos Pi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NT - NOSSA TERRA]</text:p>
          </table:table-cell>
          <table:table-cell office:value-type="string" table:style-name="ce8">
            <text:p>[m51 - MOVIMENTO 51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803" table:style-name="ce9">
            <text:p>160803</text:p>
          </table:table-cell>
          <table:table-cell office:value-type="string" table:style-name="ce1">
            <text:p>Valença</text:p>
          </table:table-cell>
          <table:table-cell office:value-type="string" table:style-name="ce8">
            <text:p>Cerda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c - Juntos Por Cerd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806" table:style-name="ce9">
            <text:p>160806</text:p>
          </table:table-cell>
          <table:table-cell office:value-type="string" table:style-name="ce1">
            <text:p>Valença</text:p>
          </table:table-cell>
          <table:table-cell office:value-type="string" table:style-name="ce8">
            <text:p>Friest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ccf - Um Compromisso Com Friest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812" table:style-name="ce9">
            <text:p>160812</text:p>
          </table:table-cell>
          <table:table-cell office:value-type="string" table:style-name="ce1">
            <text:p>Valença</text:p>
          </table:table-cell>
          <table:table-cell office:value-type="string" table:style-name="ce8">
            <text:p>São Pedro da Torr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sp - Unidos Por São Ped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817" table:style-name="ce9">
            <text:p>160817</text:p>
          </table:table-cell>
          <table:table-cell office:value-type="string" table:style-name="ce1">
            <text:p>Valença</text:p>
          </table:table-cell>
          <table:table-cell office:value-type="string" table:style-name="ce8">
            <text:p>União das freguesias de Gandra e Tai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gtu - Gandra Taião Uni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00" table:style-name="ce9">
            <text:p>160900</text:p>
          </table:table-cell>
          <table:table-cell office:value-type="string" table:style-name="ce1">
            <text:p>Viana do Castel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MPT - ACORDA, VIANA!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00" table:style-name="ce9">
            <text:p>160900</text:p>
          </table:table-cell>
          <table:table-cell office:value-type="string" table:style-name="ce1">
            <text:p>Viana do Castel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MPT - ACORDA, VIANA!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01" table:style-name="ce9">
            <text:p>160901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Afif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A - Lista Independente de Afif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08" table:style-name="ce9">
            <text:p>160908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Carreç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.I.C. - Lista Independente por Carreç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10" table:style-name="ce9">
            <text:p>160910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Castelo do Neiv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tpc - Todos pelo Castel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14" table:style-name="ce9">
            <text:p>160914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Freixieiro de Sout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100%fds - 100% Freixieiro de Soutel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22" table:style-name="ce9">
            <text:p>160922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Muj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MDF - Independentes de Mujães Desenvolvimento com Futuro]</text:p>
          </table:table-cell>
          <table:table-cell office:value-type="string" table:style-name="ce1">
            <text:p>[JPM - Juntos Por Mujã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23" table:style-name="ce9">
            <text:p>160923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São Romão de Neiv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ANE - Amigos de Neiv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25" table:style-name="ce9">
            <text:p>160925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Outei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fdo - Independentes pelo Futuro de Outeiro]</text:p>
          </table:table-cell>
          <table:table-cell office:value-type="string" table:style-name="ce1">
            <text:p>[jpolio - Juntos por Outeiro - Lista Independente Outeir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26" table:style-name="ce9">
            <text:p>160926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Perr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 - ACORDA, VIANA!]</text:p>
          </table:table-cell>
          <table:table-cell table:style-name="ce1"/>
          <table:table-cell office:value-type="string" table:style-name="ce8">
            <text:p>[gdp - Gostar de Per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35" table:style-name="ce9">
            <text:p>160935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Vila Franc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VF - Juntos Por Vila Franc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40" table:style-name="ce9">
            <text:p>160940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Chafé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c - Unidos por Chafé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42" table:style-name="ce9">
            <text:p>160942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União das freguesias de Cardielos e Serrelei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ces - Independentes por Cardielos e Serreleis "A Força da União"]</text:p>
          </table:table-cell>
          <table:table-cell office:value-type="string" table:style-name="ce1">
            <text:p>[ciupp - Cidadãos Independentes Unidos Pelo Pov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43" table:style-name="ce9">
            <text:p>160943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União das freguesias de Geraz do Lima (Santa Maria, Santa Leocádia e Moreira) e De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ep - União e Progresso]</text:p>
          </table:table-cell>
          <table:table-cell office:value-type="string" table:style-name="ce1">
            <text:p>[ufpp - União Forte pela Populaçã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44" table:style-name="ce9">
            <text:p>160944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União das freguesias de Mazarefes e Vila Fr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 - ACORDA, VIANA!]</text:p>
          </table:table-cell>
          <table:table-cell table:style-name="ce1"/>
          <table:table-cell office:value-type="string" table:style-name="ce8">
            <text:p>[MJM - Movimento Jovem Pela Mud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45" table:style-name="ce9">
            <text:p>160945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União das freguesias de Nogueira, Meixedo e Vilar de Murte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ufnmvm - Lista Independente União de Freguesias de Nogueira,Meixedo e Vilar Murted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46" table:style-name="ce9">
            <text:p>160946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União das freguesias de Subportela, Deocriste e Portela Susã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P - Unidos pelo Progress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0948" table:style-name="ce9">
            <text:p>160948</text:p>
          </table:table-cell>
          <table:table-cell office:value-type="string" table:style-name="ce1">
            <text:p>Viana do Castelo</text:p>
          </table:table-cell>
          <table:table-cell office:value-type="string" table:style-name="ce8">
            <text:p>União das freguesias de Viana do Castelo (Santa Maria Maior e Monserrate) e Mead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MPT - ACORDA, VIANA!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1000" table:style-name="ce9">
            <text:p>161000</text:p>
          </table:table-cell>
          <table:table-cell office:value-type="string" table:style-name="ce1">
            <text:p>Vila Nova de Cerveir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PenCe - Movimento Independente Pensar Cerv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1000" table:style-name="ce9">
            <text:p>161000</text:p>
          </table:table-cell>
          <table:table-cell office:value-type="string" table:style-name="ce1">
            <text:p>Vila Nova de Cerveir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PenCe - Movimento Independente Pensar Cerv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1006" table:style-name="ce9">
            <text:p>161006</text:p>
          </table:table-cell>
          <table:table-cell office:value-type="string" table:style-name="ce1">
            <text:p>Vila Nova de Cerveira</text:p>
          </table:table-cell>
          <table:table-cell office:value-type="string" table:style-name="ce8">
            <text:p>Gondarém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G - Independentes por Gondarém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1007" table:style-name="ce9">
            <text:p>161007</text:p>
          </table:table-cell>
          <table:table-cell office:value-type="string" table:style-name="ce1">
            <text:p>Vila Nova de Cerveira</text:p>
          </table:table-cell>
          <table:table-cell office:value-type="string" table:style-name="ce8">
            <text:p>Loiv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L - Movimento Independente por Loiv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1009" table:style-name="ce9">
            <text:p>161009</text:p>
          </table:table-cell>
          <table:table-cell office:value-type="string" table:style-name="ce1">
            <text:p>Vila Nova de Cerveira</text:p>
          </table:table-cell>
          <table:table-cell office:value-type="string" table:style-name="ce8">
            <text:p>Mentresti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M - Independentes por Mentrestid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1012" table:style-name="ce9">
            <text:p>161012</text:p>
          </table:table-cell>
          <table:table-cell office:value-type="string" table:style-name="ce1">
            <text:p>Vila Nova de Cerveira</text:p>
          </table:table-cell>
          <table:table-cell office:value-type="string" table:style-name="ce8">
            <text:p>Sapard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S - Independentes por Sapard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1013" table:style-name="ce9">
            <text:p>161013</text:p>
          </table:table-cell>
          <table:table-cell office:value-type="string" table:style-name="ce1">
            <text:p>Vila Nova de Cerveira</text:p>
          </table:table-cell>
          <table:table-cell office:value-type="string" table:style-name="ce8">
            <text:p>Sop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ITS I - Movimento Independente Todos por Sop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1016" table:style-name="ce9">
            <text:p>161016</text:p>
          </table:table-cell>
          <table:table-cell office:value-type="string" table:style-name="ce1">
            <text:p>Vila Nova de Cerveira</text:p>
          </table:table-cell>
          <table:table-cell office:value-type="string" table:style-name="ce8">
            <text:p>União das freguesias de Campos e Vila Meã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CVM - Independentes por Campos e Vila Meã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1017" table:style-name="ce9">
            <text:p>161017</text:p>
          </table:table-cell>
          <table:table-cell office:value-type="string" table:style-name="ce1">
            <text:p>Vila Nova de Cerveira</text:p>
          </table:table-cell>
          <table:table-cell office:value-type="string" table:style-name="ce8">
            <text:p>União das freguesias de Candemil e Gondar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CG - Independentes por Candemil e Gond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1018" table:style-name="ce9">
            <text:p>161018</text:p>
          </table:table-cell>
          <table:table-cell office:value-type="string" table:style-name="ce1">
            <text:p>Vila Nova de Cerveira</text:p>
          </table:table-cell>
          <table:table-cell office:value-type="string" table:style-name="ce8">
            <text:p>União das freguesias de Reboreda e Nogu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ReN - Independentes por Reboreda e Nogu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61019" table:style-name="ce9">
            <text:p>161019</text:p>
          </table:table-cell>
          <table:table-cell office:value-type="string" table:style-name="ce1">
            <text:p>Vila Nova de Cerveira</text:p>
          </table:table-cell>
          <table:table-cell office:value-type="string" table:style-name="ce8">
            <text:p>União das freguesias de Vila Nova de Cerveira e Lovelh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pCeL - Independentes por Cerveira e Lovelh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00" table:style-name="ce9">
            <text:p>170100</text:p>
          </table:table-cell>
          <table:table-cell office:value-type="string" table:style-name="ce1">
            <text:p>Alijó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00" table:style-name="ce9">
            <text:p>170100</text:p>
          </table:table-cell>
          <table:table-cell office:value-type="string" table:style-name="ce1">
            <text:p>Alijó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01" table:style-name="ce9">
            <text:p>170101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Alijó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07" table:style-name="ce9">
            <text:p>170107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Favai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08" table:style-name="ce9">
            <text:p>170108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Pegarinh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09" table:style-name="ce9">
            <text:p>170109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Pinh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12" table:style-name="ce9">
            <text:p>170112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Sanfins do Dou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13" table:style-name="ce9">
            <text:p>170113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Santa Eugén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14" table:style-name="ce9">
            <text:p>170114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São Mamede de Ribatu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16" table:style-name="ce9">
            <text:p>170116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Vila Chã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17" table:style-name="ce9">
            <text:p>170117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Vila Ver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18" table:style-name="ce9">
            <text:p>170118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Vilar de Maça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20" table:style-name="ce9">
            <text:p>170120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União das freguesias de Carlão e Amiei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21" table:style-name="ce9">
            <text:p>170121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União das freguesias de Castedo e Cot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22" table:style-name="ce9">
            <text:p>170122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União das freguesias de Pópulo e Ribalong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123" table:style-name="ce9">
            <text:p>170123</text:p>
          </table:table-cell>
          <table:table-cell office:value-type="string" table:style-name="ce1">
            <text:p>Alijó</text:p>
          </table:table-cell>
          <table:table-cell office:value-type="string" table:style-name="ce8">
            <text:p>União das freguesias de Vale de Mendiz, Casal de Loivos e Vilarinho de Cot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S - Movimento Alijó Inovação com Segu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210" table:style-name="ce9">
            <text:p>170210</text:p>
          </table:table-cell>
          <table:table-cell office:value-type="string" table:style-name="ce1">
            <text:p>Boticas</text:p>
          </table:table-cell>
          <table:table-cell office:value-type="string" table:style-name="ce8">
            <text:p>Dornel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DI - Couto Dornelas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215" table:style-name="ce9">
            <text:p>170215</text:p>
          </table:table-cell>
          <table:table-cell office:value-type="string" table:style-name="ce1">
            <text:p>Boticas</text:p>
          </table:table-cell>
          <table:table-cell office:value-type="string" table:style-name="ce8">
            <text:p>Sapiã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SS - Juntos por Sapiãos e Sapel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218" table:style-name="ce9">
            <text:p>170218</text:p>
          </table:table-cell>
          <table:table-cell office:value-type="string" table:style-name="ce1">
            <text:p>Boticas</text:p>
          </table:table-cell>
          <table:table-cell office:value-type="string" table:style-name="ce8">
            <text:p>Ardãos e Bobad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T - União do Terv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219" table:style-name="ce9">
            <text:p>170219</text:p>
          </table:table-cell>
          <table:table-cell office:value-type="string" table:style-name="ce1">
            <text:p>Boticas</text:p>
          </table:table-cell>
          <table:table-cell office:value-type="string" table:style-name="ce8">
            <text:p>Boticas e Granj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VBG - Viva Boticas e Granj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00" table:style-name="ce9">
            <text:p>170300</text:p>
          </table:table-cell>
          <table:table-cell office:value-type="string" table:style-name="ce1">
            <text:p>Chaves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00" table:style-name="ce9">
            <text:p>170300</text:p>
          </table:table-cell>
          <table:table-cell office:value-type="string" table:style-name="ce1">
            <text:p>Chaves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01" table:style-name="ce9">
            <text:p>170301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Águas Fri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02" table:style-name="ce9">
            <text:p>170302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Anelh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05" table:style-name="ce9">
            <text:p>170305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Bust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09" table:style-name="ce9">
            <text:p>170309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Cimo de Vila da Castanh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10" table:style-name="ce9">
            <text:p>170310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Cural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12" table:style-name="ce9">
            <text:p>170312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Ervede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13" table:style-name="ce9">
            <text:p>170313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Fai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14" table:style-name="ce9">
            <text:p>170314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Lama de Arc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16" table:style-name="ce9">
            <text:p>170316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Mai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17" table:style-name="ce9">
            <text:p>170317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Moreir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18" table:style-name="ce9">
            <text:p>170318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Nogueira da Montan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20" table:style-name="ce9">
            <text:p>170320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Ou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21" table:style-name="ce9">
            <text:p>170321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Outeiro Sec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22" table:style-name="ce9">
            <text:p>170322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Parad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24" table:style-name="ce9">
            <text:p>170324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Redondel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27" table:style-name="ce9">
            <text:p>170327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Sanfin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29" table:style-name="ce9">
            <text:p>170329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Santa Leocád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30" table:style-name="ce9">
            <text:p>170330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Santo António de Monfort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31" table:style-name="ce9">
            <text:p>170331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Santo Estêv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33" table:style-name="ce9">
            <text:p>170333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São Pedro de Agostém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34" table:style-name="ce9">
            <text:p>170334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São Vicent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40" table:style-name="ce9">
            <text:p>170340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Tronc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41" table:style-name="ce9">
            <text:p>170341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Vale de Ant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43" table:style-name="ce9">
            <text:p>170343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Vila Verde da Ra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44" table:style-name="ce9">
            <text:p>170344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Vilar de Nant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45" table:style-name="ce9">
            <text:p>170345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Vilarelho da Ra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47" table:style-name="ce9">
            <text:p>170347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Vilas Bo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48" table:style-name="ce9">
            <text:p>170348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Vilela Sec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49" table:style-name="ce9">
            <text:p>170349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Vilela do Tâmeg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50" table:style-name="ce9">
            <text:p>170350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Santa Maria Maior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53" table:style-name="ce9">
            <text:p>170353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Planalto de Monforte (União das freguesias de Oucidres e Bobadela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54" table:style-name="ce9">
            <text:p>170354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União das freguesias da Madalena e Samai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55" table:style-name="ce9">
            <text:p>170355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União das freguesias das Eiras, São Julião de Montenegro e Ce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56" table:style-name="ce9">
            <text:p>170356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União das freguesias de Calvão e Soutelinho da Ra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57" table:style-name="ce9">
            <text:p>170357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União das freguesias de Loivos e Póvoa de Agraç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ILP - Cidadãos Independentes por Loivos e Póvoa de Agrações]</text:p>
          </table:table-cell>
          <table:table-cell office:value-type="string" table:style-name="ce1">
            <text:p>[MAI - Movimento Autárquico Independente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58" table:style-name="ce9">
            <text:p>170358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União das freguesias de Santa Cruz/Trindade e Sanjurg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59" table:style-name="ce9">
            <text:p>170359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União das freguesias de Soutelo e Seara Vel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60" table:style-name="ce9">
            <text:p>170360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União das freguesias de Travancas e Roriz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361" table:style-name="ce9">
            <text:p>170361</text:p>
          </table:table-cell>
          <table:table-cell office:value-type="string" table:style-name="ce1">
            <text:p>Chaves</text:p>
          </table:table-cell>
          <table:table-cell office:value-type="string" table:style-name="ce8">
            <text:p>Vidago (União das freguesias de Vidago, Arcossó, Selhariz e Vilarinho das Paranheiras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AI - Movimento Autárquico Independ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500" table:style-name="ce9">
            <text:p>170500</text:p>
          </table:table-cell>
          <table:table-cell office:value-type="string" table:style-name="ce1">
            <text:p>Mondim de Bast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CDS-PP.PPD/PSD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500" table:style-name="ce9">
            <text:p>170500</text:p>
          </table:table-cell>
          <table:table-cell office:value-type="string" table:style-name="ce1">
            <text:p>Mondim de Bast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CDS-PP.PPD/PSD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501" table:style-name="ce9">
            <text:p>170501</text:p>
          </table:table-cell>
          <table:table-cell office:value-type="string" table:style-name="ce1">
            <text:p>Mondim de Basto</text:p>
          </table:table-cell>
          <table:table-cell office:value-type="string" table:style-name="ce8">
            <text:p>Atei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502" table:style-name="ce9">
            <text:p>170502</text:p>
          </table:table-cell>
          <table:table-cell office:value-type="string" table:style-name="ce1">
            <text:p>Mondim de Basto</text:p>
          </table:table-cell>
          <table:table-cell office:value-type="string" table:style-name="ce8">
            <text:p>Bilhó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505" table:style-name="ce9">
            <text:p>170505</text:p>
          </table:table-cell>
          <table:table-cell office:value-type="string" table:style-name="ce1">
            <text:p>Mondim de Basto</text:p>
          </table:table-cell>
          <table:table-cell office:value-type="string" table:style-name="ce8">
            <text:p>Mondim de Bas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508" table:style-name="ce9">
            <text:p>170508</text:p>
          </table:table-cell>
          <table:table-cell office:value-type="string" table:style-name="ce1">
            <text:p>Mondim de Basto</text:p>
          </table:table-cell>
          <table:table-cell office:value-type="string" table:style-name="ce8">
            <text:p>Vilar de Ferrei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509" table:style-name="ce9">
            <text:p>170509</text:p>
          </table:table-cell>
          <table:table-cell office:value-type="string" table:style-name="ce1">
            <text:p>Mondim de Basto</text:p>
          </table:table-cell>
          <table:table-cell office:value-type="string" table:style-name="ce8">
            <text:p>União das freguesias de Campanhó e Paradan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JUNTOS PELA NOSSA TERRA]</text:p>
          </table:table-cell>
          <table:table-cell table:style-name="ce1"/>
          <table:table-cell office:value-type="string" table:style-name="ce8">
            <text:p>[ICP - INDEPENDENTES POR CAMPANHÓ E PARAD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510" table:style-name="ce9">
            <text:p>170510</text:p>
          </table:table-cell>
          <table:table-cell office:value-type="string" table:style-name="ce1">
            <text:p>Mondim de Basto</text:p>
          </table:table-cell>
          <table:table-cell office:value-type="string" table:style-name="ce8">
            <text:p>União das freguesias de Ermelo e Pardelh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CDS-PP.PPD/PSD - JUNTOS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00" table:style-name="ce9">
            <text:p>170600</text:p>
          </table:table-cell>
          <table:table-cell office:value-type="string" table:style-name="ce1">
            <text:p>Montalegre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00" table:style-name="ce9">
            <text:p>170600</text:p>
          </table:table-cell>
          <table:table-cell office:value-type="string" table:style-name="ce1">
            <text:p>Montalegre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01" table:style-name="ce9">
            <text:p>170601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Cabri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C - Juntos Por Cabri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03" table:style-name="ce9">
            <text:p>170603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Cerv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04" table:style-name="ce9">
            <text:p>170604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Chã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07" table:style-name="ce9">
            <text:p>170607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Covelo do Gerê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09" table:style-name="ce9">
            <text:p>170609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Ferr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12" table:style-name="ce9">
            <text:p>170612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Gralh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19" table:style-name="ce9">
            <text:p>170619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Out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office:value-type="string" table:style-name="ce8">
            <text:p>[LIO - Lista de Independentes de Out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25" table:style-name="ce9">
            <text:p>170625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Reigos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27" table:style-name="ce9">
            <text:p>170627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Santo André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32" table:style-name="ce9">
            <text:p>170632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Touré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35" table:style-name="ce9">
            <text:p>170635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Vila da Po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36" table:style-name="ce9">
            <text:p>170636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União das freguesias de Cambeses do Rio, Donões e Mourilh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CAMODO - Unidos Por Cambeses do Rio, Donões e Mourilh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37" table:style-name="ce9">
            <text:p>170637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União das freguesias de Meixedo e Padorn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38" table:style-name="ce9">
            <text:p>170638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União das freguesias de Montalegre e Padros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39" table:style-name="ce9">
            <text:p>170639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União das freguesias de Paradela, Contim e Fi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40" table:style-name="ce9">
            <text:p>170640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União das freguesias de Sezelhe e Covel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URIO - Lista União Ri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41" table:style-name="ce9">
            <text:p>170641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União das freguesias de Venda Nova e Pondr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VENOP - Unidos Por Venda Nova e Pondr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42" table:style-name="ce9">
            <text:p>170642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União das freguesias de Viade de Baixo e Fervidel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VF - Independentes Viade e Fervidel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643" table:style-name="ce9">
            <text:p>170643</text:p>
          </table:table-cell>
          <table:table-cell office:value-type="string" table:style-name="ce1">
            <text:p>Montalegre</text:p>
          </table:table-cell>
          <table:table-cell office:value-type="string" table:style-name="ce8">
            <text:p>União das freguesias de Vilar de Perdizes e Meixi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OR MONTALEGR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805" table:style-name="ce9">
            <text:p>170805</text:p>
          </table:table-cell>
          <table:table-cell office:value-type="string" table:style-name="ce1">
            <text:p>Peso da Régua</text:p>
          </table:table-cell>
          <table:table-cell office:value-type="string" table:style-name="ce8">
            <text:p>Lourei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l - UNIDOS POR LOUR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816" table:style-name="ce9">
            <text:p>170816</text:p>
          </table:table-cell>
          <table:table-cell office:value-type="string" table:style-name="ce1">
            <text:p>Peso da Régua</text:p>
          </table:table-cell>
          <table:table-cell office:value-type="string" table:style-name="ce8">
            <text:p>União das freguesias de Poiares e Canel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nf - JUNTOS PELA NOVA FREGUES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900" table:style-name="ce9">
            <text:p>170900</text:p>
          </table:table-cell>
          <table:table-cell office:value-type="string" table:style-name="ce1">
            <text:p>Ribeira de Pen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uprp - Unidos Por Ribeira de Pe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900" table:style-name="ce9">
            <text:p>170900</text:p>
          </table:table-cell>
          <table:table-cell office:value-type="string" table:style-name="ce1">
            <text:p>Ribeira de Pen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uprp - Unidos Por Ribeira de Pe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901" table:style-name="ce9">
            <text:p>170901</text:p>
          </table:table-cell>
          <table:table-cell office:value-type="string" table:style-name="ce1">
            <text:p>Ribeira de Pena</text:p>
          </table:table-cell>
          <table:table-cell office:value-type="string" table:style-name="ce8">
            <text:p>Alvad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rp - Unidos Por Ribeira de Pe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908" table:style-name="ce9">
            <text:p>170908</text:p>
          </table:table-cell>
          <table:table-cell office:value-type="string" table:style-name="ce1">
            <text:p>Ribeira de Pena</text:p>
          </table:table-cell>
          <table:table-cell office:value-type="string" table:style-name="ce8">
            <text:p>União das freguesias de Cerva e Lim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rp - Unidos Por Ribeira de Pe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0909" table:style-name="ce9">
            <text:p>170909</text:p>
          </table:table-cell>
          <table:table-cell office:value-type="string" table:style-name="ce1">
            <text:p>Ribeira de Pena</text:p>
          </table:table-cell>
          <table:table-cell office:value-type="string" table:style-name="ce8">
            <text:p>União das freguesias de Ribeira de Pena (Salvador) e Santo Aleixo de Além-Tâmeg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rp - Unidos Por Ribeira de Pen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1002" table:style-name="ce9">
            <text:p>171002</text:p>
          </table:table-cell>
          <table:table-cell office:value-type="string" table:style-name="ce1">
            <text:p>Sabrosa</text:p>
          </table:table-cell>
          <table:table-cell office:value-type="string" table:style-name="ce8">
            <text:p>Covas do Dou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10">
            <text:p>[pcd - Por Covas do Douro]</text:p>
          </table:table-cell>
          <table:table-cell office:value-type="string" table:style-name="ce8">
            <text:p>[mf - Mais Freguesi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1015" table:style-name="ce9">
            <text:p>171015</text:p>
          </table:table-cell>
          <table:table-cell office:value-type="string" table:style-name="ce1">
            <text:p>Sabrosa</text:p>
          </table:table-cell>
          <table:table-cell office:value-type="string" table:style-name="ce8">
            <text:p>Vilarinho de São Rom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vsr - Por Vilarinho de São Romão]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/>
          <table:table-cell office:value-type="float" office:value="171017" table:style-name="ce9">
            <text:p>171017</text:p>
          </table:table-cell>
          <table:table-cell office:value-type="string" table:style-name="ce1">
            <text:p>Sabrosa</text:p>
          </table:table-cell>
          <table:table-cell office:value-type="string" table:style-name="ce8">
            <text:p>União das freguesias de São Martinho de Antas e Paradela de Guiã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mp - São Martinho e Parade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1102" table:style-name="ce9">
            <text:p>171102</text:p>
          </table:table-cell>
          <table:table-cell office:value-type="string" table:style-name="ce1">
            <text:p>Santa Marta de Penaguião</text:p>
          </table:table-cell>
          <table:table-cell office:value-type="string" table:style-name="ce8">
            <text:p>Cumi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T - Fazer Mais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1106" table:style-name="ce9">
            <text:p>171106</text:p>
          </table:table-cell>
          <table:table-cell office:value-type="string" table:style-name="ce1">
            <text:p>Santa Marta de Penaguião</text:p>
          </table:table-cell>
          <table:table-cell office:value-type="string" table:style-name="ce8">
            <text:p>Medr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MS - Por Medrões Semp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1203" table:style-name="ce9">
            <text:p>171203</text:p>
          </table:table-cell>
          <table:table-cell office:value-type="string" table:style-name="ce1">
            <text:p>Valpaços</text:p>
          </table:table-cell>
          <table:table-cell office:value-type="string" table:style-name="ce8">
            <text:p>Algeriz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FA - UNIDOS PELA FREGUESIA DE ARGERI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1209" table:style-name="ce9">
            <text:p>171209</text:p>
          </table:table-cell>
          <table:table-cell office:value-type="string" table:style-name="ce1">
            <text:p>Valpaços</text:p>
          </table:table-cell>
          <table:table-cell office:value-type="string" table:style-name="ce8">
            <text:p>Erv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RPM - RENOVAR PARA MUDAR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1212" table:style-name="ce9">
            <text:p>171212</text:p>
          </table:table-cell>
          <table:table-cell office:value-type="string" table:style-name="ce1">
            <text:p>Valpaços</text:p>
          </table:table-cell>
          <table:table-cell office:value-type="string" table:style-name="ce8">
            <text:p>Fri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 - LISTA DE INDEPENDENT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1234" table:style-name="ce9">
            <text:p>171234</text:p>
          </table:table-cell>
          <table:table-cell office:value-type="string" table:style-name="ce1">
            <text:p>Valpaços</text:p>
          </table:table-cell>
          <table:table-cell office:value-type="string" table:style-name="ce8">
            <text:p>Sonim e Barrei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P - UNIDOS PELO POV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71437" table:style-name="ce9">
            <text:p>171437</text:p>
          </table:table-cell>
          <table:table-cell office:value-type="string" table:style-name="ce1">
            <text:p>Vila Real</text:p>
          </table:table-cell>
          <table:table-cell office:value-type="string" table:style-name="ce8">
            <text:p>União das freguesias de São Tomé do Castelo e Just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p - Amigos do Pov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106" table:style-name="ce9">
            <text:p>180106</text:p>
          </table:table-cell>
          <table:table-cell office:value-type="string" table:style-name="ce1">
            <text:p>Armamar</text:p>
          </table:table-cell>
          <table:table-cell office:value-type="string" table:style-name="ce8">
            <text:p>Folgos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.I.M. - SIM Folgosa Interessa M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111" table:style-name="ce9">
            <text:p>180111</text:p>
          </table:table-cell>
          <table:table-cell office:value-type="string" table:style-name="ce1">
            <text:p>Armamar</text:p>
          </table:table-cell>
          <table:table-cell office:value-type="string" table:style-name="ce8">
            <text:p>Santa Cruz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R.U.M.O - Recomeçar Unidos Mudar Objectiv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00" table:style-name="ce9">
            <text:p>180400</text:p>
          </table:table-cell>
          <table:table-cell office:value-type="string" table:style-name="ce1">
            <text:p>Cinfãe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00" table:style-name="ce9">
            <text:p>180400</text:p>
          </table:table-cell>
          <table:table-cell office:value-type="string" table:style-name="ce1">
            <text:p>Cinfãe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03" table:style-name="ce9">
            <text:p>180403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Cinf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office:value-type="string" table:style-name="ce8">
            <text:p>[cep - Cinfães em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04" table:style-name="ce9">
            <text:p>180404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Espadan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office:value-type="string" table:style-name="ce8">
            <text:p>[mipep - Movimento Independentes por Espadanedo Primei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05" table:style-name="ce9">
            <text:p>180405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Ferreiros de Tend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office:value-type="string" table:style-name="ce8">
            <text:p>[cpfdt - Cidadãos por Ferreiros de Tendai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06" table:style-name="ce9">
            <text:p>180406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Forn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08" table:style-name="ce9">
            <text:p>180408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Moimen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09" table:style-name="ce9">
            <text:p>180409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Nesper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10" table:style-name="ce9">
            <text:p>180410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Oliveira do Dou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12" table:style-name="ce9">
            <text:p>180412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Santiago de Pi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13" table:style-name="ce9">
            <text:p>180413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São Cristóvão de Nogu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14" table:style-name="ce9">
            <text:p>180414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Sous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15" table:style-name="ce9">
            <text:p>180415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Tarouqu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16" table:style-name="ce9">
            <text:p>180416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Tend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17" table:style-name="ce9">
            <text:p>180417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Travan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418" table:style-name="ce9">
            <text:p>180418</text:p>
          </table:table-cell>
          <table:table-cell office:value-type="string" table:style-name="ce1">
            <text:p>Cinfães</text:p>
          </table:table-cell>
          <table:table-cell office:value-type="string" table:style-name="ce8">
            <text:p>União das freguesias de Alhões, Bustelo, Gralheira e Rami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JUNTOS POR CINFÃES]</text:p>
          </table:table-cell>
          <table:table-cell table:style-name="ce1"/>
          <table:table-cell office:value-type="string" table:style-name="ce8">
            <text:p>[ABGRI - Alhões Bustelo Gralheira e Ramir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00" table:style-name="ce9">
            <text:p>180500</text:p>
          </table:table-cell>
          <table:table-cell office:value-type="string" table:style-name="ce1">
            <text:p>Lameg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00" table:style-name="ce9">
            <text:p>180500</text:p>
          </table:table-cell>
          <table:table-cell office:value-type="string" table:style-name="ce1">
            <text:p>Lameg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02" table:style-name="ce9">
            <text:p>180502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Av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ida - Independentes de Avõ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04" table:style-name="ce9">
            <text:p>180504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Britia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office:value-type="string" table:style-name="ce8">
            <text:p>[mipb - Movimento Independente Por Britiand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05" table:style-name="ce9">
            <text:p>180505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Camb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07" table:style-name="ce9">
            <text:p>180507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Ferreir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08" table:style-name="ce9">
            <text:p>180508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Ferreiros de Av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office:value-type="string" table:style-name="ce8">
            <text:p>[mdidf - Movimento de Independentes de Ferr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09" table:style-name="ce9">
            <text:p>180509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Figu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office:value-type="string" table:style-name="ce8">
            <text:p>[mipf - Movimento Independente Por Figu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10" table:style-name="ce9">
            <text:p>180510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Lal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11" table:style-name="ce9">
            <text:p>180511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Lazar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16" table:style-name="ce9">
            <text:p>180516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Penajó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office:value-type="string" table:style-name="ce8">
            <text:p>[tjpp - Todos Juntos Por Penajó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17" table:style-name="ce9">
            <text:p>180517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Penu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19" table:style-name="ce9">
            <text:p>180519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Samod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20" table:style-name="ce9">
            <text:p>180520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Sa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23" table:style-name="ce9">
            <text:p>180523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Várzea de Abrunhai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24" table:style-name="ce9">
            <text:p>180524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Vila Nova de Souto d'El-Rei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25" table:style-name="ce9">
            <text:p>180525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Lamego (Almacave e Sé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office:value-type="string" table:style-name="ce10">
            <text:p>[ui - União Independente]</text:p>
          </table:table-cell>
          <table:table-cell office:value-type="string" table:style-name="ce8">
            <text:p>[mdcl - Movimento Dois Corações Lamecenses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26" table:style-name="ce9">
            <text:p>180526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União das freguesias de Bigorne, Magueija e Pretarou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/>
          <table:table-cell office:value-type="float" office:value="180527" table:style-name="ce9">
            <text:p>180527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União das freguesias de Cepões, Meijinhos e Melc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528" table:style-name="ce9">
            <text:p>180528</text:p>
          </table:table-cell>
          <table:table-cell office:value-type="string" table:style-name="ce1">
            <text:p>Lamego</text:p>
          </table:table-cell>
          <table:table-cell office:value-type="string" table:style-name="ce8">
            <text:p>União das freguesias de Parada do Bispo e Valdige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OR LAMEG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00" table:style-name="ce9">
            <text:p>180600</text:p>
          </table:table-cell>
          <table:table-cell office:value-type="string" table:style-name="ce1">
            <text:p>Mangualde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MANGUALDE COM PALAV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00" table:style-name="ce9">
            <text:p>180600</text:p>
          </table:table-cell>
          <table:table-cell office:value-type="string" table:style-name="ce1">
            <text:p>Mangualde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MANGUALDE COM PALAV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02" table:style-name="ce9">
            <text:p>180602</text:p>
          </table:table-cell>
          <table:table-cell office:value-type="string" table:style-name="ce1">
            <text:p>Mangualde</text:p>
          </table:table-cell>
          <table:table-cell office:value-type="string" table:style-name="ce8">
            <text:p>Alcafach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NGUALDE COM PALAV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05" table:style-name="ce9">
            <text:p>180605</text:p>
          </table:table-cell>
          <table:table-cell office:value-type="string" table:style-name="ce1">
            <text:p>Mangualde</text:p>
          </table:table-cell>
          <table:table-cell office:value-type="string" table:style-name="ce8">
            <text:p>Cunha Baix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NGUALDE COM PALAV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06" table:style-name="ce9">
            <text:p>180606</text:p>
          </table:table-cell>
          <table:table-cell office:value-type="string" table:style-name="ce1">
            <text:p>Mangualde</text:p>
          </table:table-cell>
          <table:table-cell office:value-type="string" table:style-name="ce8">
            <text:p>Esp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NGUALDE COM PALAVRA]</text:p>
          </table:table-cell>
          <table:table-cell table:style-name="ce1"/>
          <table:table-cell office:value-type="string" table:style-name="ce8">
            <text:p>[M.P.N.T. - O Melhor para 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07" table:style-name="ce9">
            <text:p>180607</text:p>
          </table:table-cell>
          <table:table-cell office:value-type="string" table:style-name="ce1">
            <text:p>Mangualde</text:p>
          </table:table-cell>
          <table:table-cell office:value-type="string" table:style-name="ce8">
            <text:p>Fornos de Maceira D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NGUALDE COM PALAV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08" table:style-name="ce9">
            <text:p>180608</text:p>
          </table:table-cell>
          <table:table-cell office:value-type="string" table:style-name="ce1">
            <text:p>Mangualde</text:p>
          </table:table-cell>
          <table:table-cell office:value-type="string" table:style-name="ce8">
            <text:p>Freixios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FCF - Freixiosa com Fut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14" table:style-name="ce9">
            <text:p>180614</text:p>
          </table:table-cell>
          <table:table-cell office:value-type="string" table:style-name="ce1">
            <text:p>Mangualde</text:p>
          </table:table-cell>
          <table:table-cell office:value-type="string" table:style-name="ce8">
            <text:p>Quintela de Azura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Q - Unidos por Quintel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16" table:style-name="ce9">
            <text:p>180616</text:p>
          </table:table-cell>
          <table:table-cell office:value-type="string" table:style-name="ce1">
            <text:p>Mangualde</text:p>
          </table:table-cell>
          <table:table-cell office:value-type="string" table:style-name="ce8">
            <text:p>São João da Fres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NGUALDE COM PALAV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19" table:style-name="ce9">
            <text:p>180619</text:p>
          </table:table-cell>
          <table:table-cell office:value-type="string" table:style-name="ce1">
            <text:p>Mangualde</text:p>
          </table:table-cell>
          <table:table-cell office:value-type="string" table:style-name="ce8">
            <text:p>União das freguesias de Mangualde, Mesquitela e Cunha Al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NGUALDE COM PALAV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20" table:style-name="ce9">
            <text:p>180620</text:p>
          </table:table-cell>
          <table:table-cell office:value-type="string" table:style-name="ce1">
            <text:p>Mangualde</text:p>
          </table:table-cell>
          <table:table-cell office:value-type="string" table:style-name="ce8">
            <text:p>União das freguesias de Moimenta de Maceira Dão e Lobelhe do Mat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FCP - União das Freguesias com Palav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21" table:style-name="ce9">
            <text:p>180621</text:p>
          </table:table-cell>
          <table:table-cell office:value-type="string" table:style-name="ce1">
            <text:p>Mangualde</text:p>
          </table:table-cell>
          <table:table-cell office:value-type="string" table:style-name="ce8">
            <text:p>União das freguesias de Santiago de Cassurrães e Póvoa de Cerv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NGUALDE COM PALAV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622" table:style-name="ce9">
            <text:p>180622</text:p>
          </table:table-cell>
          <table:table-cell office:value-type="string" table:style-name="ce1">
            <text:p>Mangualde</text:p>
          </table:table-cell>
          <table:table-cell office:value-type="string" table:style-name="ce8">
            <text:p>União das freguesias de Tavares (Chãs, Várzea e Travanc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MANGUALDE COM PALAV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00" table:style-name="ce9">
            <text:p>180700</text:p>
          </table:table-cell>
          <table:table-cell office:value-type="string" table:style-name="ce1">
            <text:p>Moimenta da Beir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UNID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00" table:style-name="ce9">
            <text:p>180700</text:p>
          </table:table-cell>
          <table:table-cell office:value-type="string" table:style-name="ce1">
            <text:p>Moimenta da Beir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UNID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02" table:style-name="ce9">
            <text:p>180702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Alvit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tpa - Todos Por Alvi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03" table:style-name="ce9">
            <text:p>180703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Arcoz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05" table:style-name="ce9">
            <text:p>180705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Bald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ep - União e Progress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06" table:style-name="ce9">
            <text:p>180706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Cabaç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ei - Progresso e Inov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07" table:style-name="ce9">
            <text:p>180707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Cari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fdc - Juntos Pela Freguesia de Caria]</text:p>
          </table:table-cell>
          <table:table-cell office:value-type="string" table:style-name="ce1">
            <text:p>[nr - Novo Rumo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09" table:style-name="ce9">
            <text:p>180709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Leomi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10" table:style-name="ce9">
            <text:p>180710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Moimenta da B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16" table:style-name="ce9">
            <text:p>180716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Ru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rdc - Rua do Cresciment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17" table:style-name="ce9">
            <text:p>180717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Sarzed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c - Sarzedo Continu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20" table:style-name="ce9">
            <text:p>180720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Vilar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21" table:style-name="ce9">
            <text:p>180721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União das freguesias de Paradinha e Nagos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22" table:style-name="ce9">
            <text:p>180722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União das freguesias de Pêra Velha, Aldeia de Nacomba e Ariz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723" table:style-name="ce9">
            <text:p>180723</text:p>
          </table:table-cell>
          <table:table-cell office:value-type="string" table:style-name="ce1">
            <text:p>Moimenta da Beira</text:p>
          </table:table-cell>
          <table:table-cell office:value-type="string" table:style-name="ce8">
            <text:p>União das freguesias de Peva e Seg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FUTUR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900" table:style-name="ce9">
            <text:p>180900</text:p>
          </table:table-cell>
          <table:table-cell office:value-type="string" table:style-name="ce1">
            <text:p>Nela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TODOS JUNTOS PELO CONCELHO DE NEL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900" table:style-name="ce9">
            <text:p>180900</text:p>
          </table:table-cell>
          <table:table-cell office:value-type="string" table:style-name="ce1">
            <text:p>Nela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TODOS JUNTOS PELO CONCELHO DE NEL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901" table:style-name="ce9">
            <text:p>180901</text:p>
          </table:table-cell>
          <table:table-cell office:value-type="string" table:style-name="ce1">
            <text:p>Nelas</text:p>
          </table:table-cell>
          <table:table-cell office:value-type="string" table:style-name="ce8">
            <text:p>Canas de Senhorim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R.C.C.S. - Movimento de Restauração do Concelho de Canas de Senhorim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903" table:style-name="ce9">
            <text:p>180903</text:p>
          </table:table-cell>
          <table:table-cell office:value-type="string" table:style-name="ce1">
            <text:p>Nelas</text:p>
          </table:table-cell>
          <table:table-cell office:value-type="string" table:style-name="ce8">
            <text:p>N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ELO CONCELHO DE NEL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905" table:style-name="ce9">
            <text:p>180905</text:p>
          </table:table-cell>
          <table:table-cell office:value-type="string" table:style-name="ce1">
            <text:p>Nelas</text:p>
          </table:table-cell>
          <table:table-cell office:value-type="string" table:style-name="ce8">
            <text:p>Senhor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ELO CONCELHO DE NEL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906" table:style-name="ce9">
            <text:p>180906</text:p>
          </table:table-cell>
          <table:table-cell office:value-type="string" table:style-name="ce1">
            <text:p>Nelas</text:p>
          </table:table-cell>
          <table:table-cell office:value-type="string" table:style-name="ce8">
            <text:p>Vilar Sec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ELO CONCELHO DE NEL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908" table:style-name="ce9">
            <text:p>180908</text:p>
          </table:table-cell>
          <table:table-cell office:value-type="string" table:style-name="ce1">
            <text:p>Nelas</text:p>
          </table:table-cell>
          <table:table-cell office:value-type="string" table:style-name="ce8">
            <text:p>Lapa do Lob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ELO CONCELHO DE NEL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910" table:style-name="ce9">
            <text:p>180910</text:p>
          </table:table-cell>
          <table:table-cell office:value-type="string" table:style-name="ce1">
            <text:p>Nelas</text:p>
          </table:table-cell>
          <table:table-cell office:value-type="string" table:style-name="ce8">
            <text:p>União das freguesias de Carvalhal Redondo e Agui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ELO CONCELHO DE NELA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0911" table:style-name="ce9">
            <text:p>180911</text:p>
          </table:table-cell>
          <table:table-cell office:value-type="string" table:style-name="ce1">
            <text:p>Nelas</text:p>
          </table:table-cell>
          <table:table-cell office:value-type="string" table:style-name="ce8">
            <text:p>União das freguesias de Santar e Mor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TODOS JUNTOS PELO CONCELHO DE NELAS]</text:p>
          </table:table-cell>
          <table:table-cell table:style-name="ce1"/>
          <table:table-cell office:value-type="string" table:style-name="ce8">
            <text:p>[U.I.S.M. - União dos Independentes Santar Morei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000" table:style-name="ce9">
            <text:p>181000</text:p>
          </table:table-cell>
          <table:table-cell office:value-type="string" table:style-name="ce1">
            <text:p>Oliveira de Frade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OR OLIVEIRA DE FRAD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000" table:style-name="ce9">
            <text:p>181000</text:p>
          </table:table-cell>
          <table:table-cell office:value-type="string" table:style-name="ce1">
            <text:p>Oliveira de Frade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OR OLIVEIRA DE FRAD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002" table:style-name="ce9">
            <text:p>181002</text:p>
          </table:table-cell>
          <table:table-cell office:value-type="string" table:style-name="ce1">
            <text:p>Oliveira de Frades</text:p>
          </table:table-cell>
          <table:table-cell office:value-type="string" table:style-name="ce8">
            <text:p>Arcozelo das Mai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OLIVEIRA DE FRAD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005" table:style-name="ce9">
            <text:p>181005</text:p>
          </table:table-cell>
          <table:table-cell office:value-type="string" table:style-name="ce1">
            <text:p>Oliveira de Frades</text:p>
          </table:table-cell>
          <table:table-cell office:value-type="string" table:style-name="ce8">
            <text:p>Pinh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OLIVEIRA DE FRAD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007" table:style-name="ce9">
            <text:p>181007</text:p>
          </table:table-cell>
          <table:table-cell office:value-type="string" table:style-name="ce1">
            <text:p>Oliveira de Frades</text:p>
          </table:table-cell>
          <table:table-cell office:value-type="string" table:style-name="ce8">
            <text:p>Ribeiradi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OLIVEIRA DE FRAD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008" table:style-name="ce9">
            <text:p>181008</text:p>
          </table:table-cell>
          <table:table-cell office:value-type="string" table:style-name="ce1">
            <text:p>Oliveira de Frades</text:p>
          </table:table-cell>
          <table:table-cell office:value-type="string" table:style-name="ce8">
            <text:p>São João da Se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OLIVEIRA DE FRAD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009" table:style-name="ce9">
            <text:p>181009</text:p>
          </table:table-cell>
          <table:table-cell office:value-type="string" table:style-name="ce1">
            <text:p>Oliveira de Frades</text:p>
          </table:table-cell>
          <table:table-cell office:value-type="string" table:style-name="ce8">
            <text:p>São Vicente de Lafõ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OLIVEIRA DE FRAD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013" table:style-name="ce9">
            <text:p>181013</text:p>
          </table:table-cell>
          <table:table-cell office:value-type="string" table:style-name="ce1">
            <text:p>Oliveira de Frades</text:p>
          </table:table-cell>
          <table:table-cell office:value-type="string" table:style-name="ce8">
            <text:p>União das freguesias de Arca e Varziel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OLIVEIRA DE FRAD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014" table:style-name="ce9">
            <text:p>181014</text:p>
          </table:table-cell>
          <table:table-cell office:value-type="string" table:style-name="ce1">
            <text:p>Oliveira de Frades</text:p>
          </table:table-cell>
          <table:table-cell office:value-type="string" table:style-name="ce8">
            <text:p>União das freguesias de Destriz e Reigos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OLIVEIRA DE FRAD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015" table:style-name="ce9">
            <text:p>181015</text:p>
          </table:table-cell>
          <table:table-cell office:value-type="string" table:style-name="ce1">
            <text:p>Oliveira de Frades</text:p>
          </table:table-cell>
          <table:table-cell office:value-type="string" table:style-name="ce8">
            <text:p>União das freguesias de Oliveira de Frades, Souto de Lafões e Sej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OLIVEIRA DE FRADES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00" table:style-name="ce9">
            <text:p>181100</text:p>
          </table:table-cell>
          <table:table-cell office:value-type="string" table:style-name="ce1">
            <text:p>Penalva do Castel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00" table:style-name="ce9">
            <text:p>181100</text:p>
          </table:table-cell>
          <table:table-cell office:value-type="string" table:style-name="ce1">
            <text:p>Penalva do Castel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02" table:style-name="ce9">
            <text:p>181102</text:p>
          </table:table-cell>
          <table:table-cell office:value-type="string" table:style-name="ce1">
            <text:p>Penalva do Castelo</text:p>
          </table:table-cell>
          <table:table-cell office:value-type="string" table:style-name="ce8">
            <text:p>Castelo de Penalv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03" table:style-name="ce9">
            <text:p>181103</text:p>
          </table:table-cell>
          <table:table-cell office:value-type="string" table:style-name="ce1">
            <text:p>Penalva do Castelo</text:p>
          </table:table-cell>
          <table:table-cell office:value-type="string" table:style-name="ce8">
            <text:p>Esmolf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04" table:style-name="ce9">
            <text:p>181104</text:p>
          </table:table-cell>
          <table:table-cell office:value-type="string" table:style-name="ce1">
            <text:p>Penalva do Castelo</text:p>
          </table:table-cell>
          <table:table-cell office:value-type="string" table:style-name="ce8">
            <text:p>Germi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05" table:style-name="ce9">
            <text:p>181105</text:p>
          </table:table-cell>
          <table:table-cell office:value-type="string" table:style-name="ce1">
            <text:p>Penalva do Castelo</text:p>
          </table:table-cell>
          <table:table-cell office:value-type="string" table:style-name="ce8">
            <text:p>Ínsu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06" table:style-name="ce9">
            <text:p>181106</text:p>
          </table:table-cell>
          <table:table-cell office:value-type="string" table:style-name="ce1">
            <text:p>Penalva do Castelo</text:p>
          </table:table-cell>
          <table:table-cell office:value-type="string" table:style-name="ce8">
            <text:p>Lusi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09" table:style-name="ce9">
            <text:p>181109</text:p>
          </table:table-cell>
          <table:table-cell office:value-type="string" table:style-name="ce1">
            <text:p>Penalva do Castelo</text:p>
          </table:table-cell>
          <table:table-cell office:value-type="string" table:style-name="ce8">
            <text:p>Pin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10" table:style-name="ce9">
            <text:p>181110</text:p>
          </table:table-cell>
          <table:table-cell office:value-type="string" table:style-name="ce1">
            <text:p>Penalva do Castelo</text:p>
          </table:table-cell>
          <table:table-cell office:value-type="string" table:style-name="ce8">
            <text:p>Rea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11" table:style-name="ce9">
            <text:p>181111</text:p>
          </table:table-cell>
          <table:table-cell office:value-type="string" table:style-name="ce1">
            <text:p>Penalva do Castelo</text:p>
          </table:table-cell>
          <table:table-cell office:value-type="string" table:style-name="ce8">
            <text:p>Sezu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12" table:style-name="ce9">
            <text:p>181112</text:p>
          </table:table-cell>
          <table:table-cell office:value-type="string" table:style-name="ce1">
            <text:p>Penalva do Castelo</text:p>
          </table:table-cell>
          <table:table-cell office:value-type="string" table:style-name="ce8">
            <text:p>Trancozel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14" table:style-name="ce9">
            <text:p>181114</text:p>
          </table:table-cell>
          <table:table-cell office:value-type="string" table:style-name="ce1">
            <text:p>Penalva do Castelo</text:p>
          </table:table-cell>
          <table:table-cell office:value-type="string" table:style-name="ce8">
            <text:p>União das freguesias de Antas e Matel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115" table:style-name="ce9">
            <text:p>181115</text:p>
          </table:table-cell>
          <table:table-cell office:value-type="string" table:style-name="ce1">
            <text:p>Penalva do Castelo</text:p>
          </table:table-cell>
          <table:table-cell office:value-type="string" table:style-name="ce8">
            <text:p>União das freguesias de Vila Cova do Covelo/Marec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ENALVA MAIS À FRENT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00" table:style-name="ce9">
            <text:p>181300</text:p>
          </table:table-cell>
          <table:table-cell office:value-type="string" table:style-name="ce1">
            <text:p>Resende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00" table:style-name="ce9">
            <text:p>181300</text:p>
          </table:table-cell>
          <table:table-cell office:value-type="string" table:style-name="ce1">
            <text:p>Resende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02" table:style-name="ce9">
            <text:p>181302</text:p>
          </table:table-cell>
          <table:table-cell office:value-type="string" table:style-name="ce1">
            <text:p>Resende</text:p>
          </table:table-cell>
          <table:table-cell office:value-type="string" table:style-name="ce8">
            <text:p>Barrô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office:value-type="string" table:style-name="ce8">
            <text:p>[JPB - JUNTOS POR BARRÔ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03" table:style-name="ce9">
            <text:p>181303</text:p>
          </table:table-cell>
          <table:table-cell office:value-type="string" table:style-name="ce1">
            <text:p>Resende</text:p>
          </table:table-cell>
          <table:table-cell office:value-type="string" table:style-name="ce8">
            <text:p>Cárquer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10" table:style-name="ce9">
            <text:p>181310</text:p>
          </table:table-cell>
          <table:table-cell office:value-type="string" table:style-name="ce1">
            <text:p>Resende</text:p>
          </table:table-cell>
          <table:table-cell office:value-type="string" table:style-name="ce8">
            <text:p>Pau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11" table:style-name="ce9">
            <text:p>181311</text:p>
          </table:table-cell>
          <table:table-cell office:value-type="string" table:style-name="ce1">
            <text:p>Resende</text:p>
          </table:table-cell>
          <table:table-cell office:value-type="string" table:style-name="ce8">
            <text:p>Rese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12" table:style-name="ce9">
            <text:p>181312</text:p>
          </table:table-cell>
          <table:table-cell office:value-type="string" table:style-name="ce1">
            <text:p>Resende</text:p>
          </table:table-cell>
          <table:table-cell office:value-type="string" table:style-name="ce8">
            <text:p>São Ciprian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13" table:style-name="ce9">
            <text:p>181313</text:p>
          </table:table-cell>
          <table:table-cell office:value-type="string" table:style-name="ce1">
            <text:p>Resende</text:p>
          </table:table-cell>
          <table:table-cell office:value-type="string" table:style-name="ce8">
            <text:p>São João de Fontou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14" table:style-name="ce9">
            <text:p>181314</text:p>
          </table:table-cell>
          <table:table-cell office:value-type="string" table:style-name="ce1">
            <text:p>Resende</text:p>
          </table:table-cell>
          <table:table-cell office:value-type="string" table:style-name="ce8">
            <text:p>São Martinho de Mou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16" table:style-name="ce9">
            <text:p>181316</text:p>
          </table:table-cell>
          <table:table-cell office:value-type="string" table:style-name="ce1">
            <text:p>Resende</text:p>
          </table:table-cell>
          <table:table-cell office:value-type="string" table:style-name="ce8">
            <text:p>União das freguesias de Anreade e São Romão de Areg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17" table:style-name="ce9">
            <text:p>181317</text:p>
          </table:table-cell>
          <table:table-cell office:value-type="string" table:style-name="ce1">
            <text:p>Resende</text:p>
          </table:table-cell>
          <table:table-cell office:value-type="string" table:style-name="ce8">
            <text:p>União das freguesias de Felgueiras e Feir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18" table:style-name="ce9">
            <text:p>181318</text:p>
          </table:table-cell>
          <table:table-cell office:value-type="string" table:style-name="ce1">
            <text:p>Resende</text:p>
          </table:table-cell>
          <table:table-cell office:value-type="string" table:style-name="ce8">
            <text:p>União das freguesias de Freigil e Miom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319" table:style-name="ce9">
            <text:p>181319</text:p>
          </table:table-cell>
          <table:table-cell office:value-type="string" table:style-name="ce1">
            <text:p>Resende</text:p>
          </table:table-cell>
          <table:table-cell office:value-type="string" table:style-name="ce8">
            <text:p>União das freguesias de Ovadas e Pancho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SD CDS POR RESENDE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00" table:style-name="ce9">
            <text:p>181500</text:p>
          </table:table-cell>
          <table:table-cell office:value-type="string" table:style-name="ce1">
            <text:p>São João da Pesqueir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PNT -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00" table:style-name="ce9">
            <text:p>181500</text:p>
          </table:table-cell>
          <table:table-cell office:value-type="string" table:style-name="ce1">
            <text:p>São João da Pesqueira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PNT -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01" table:style-name="ce9">
            <text:p>181501</text:p>
          </table:table-cell>
          <table:table-cell office:value-type="string" table:style-name="ce1">
            <text:p>São João da Pesqueira</text:p>
          </table:table-cell>
          <table:table-cell office:value-type="string" table:style-name="ce8">
            <text:p>Castanheiro do Su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NT -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02" table:style-name="ce9">
            <text:p>181502</text:p>
          </table:table-cell>
          <table:table-cell office:value-type="string" table:style-name="ce1">
            <text:p>São João da Pesqueira</text:p>
          </table:table-cell>
          <table:table-cell office:value-type="string" table:style-name="ce8">
            <text:p>Ervedosa do Dou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ESC - UNIDOS POR ERVEDOSA, SARZEDINHO E CASAIS DO DOUR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04" table:style-name="ce9">
            <text:p>181504</text:p>
          </table:table-cell>
          <table:table-cell office:value-type="string" table:style-name="ce1">
            <text:p>São João da Pesqueira</text:p>
          </table:table-cell>
          <table:table-cell office:value-type="string" table:style-name="ce8">
            <text:p>Nagozelo do Dou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NT -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05" table:style-name="ce9">
            <text:p>181505</text:p>
          </table:table-cell>
          <table:table-cell office:value-type="string" table:style-name="ce1">
            <text:p>São João da Pesqueira</text:p>
          </table:table-cell>
          <table:table-cell office:value-type="string" table:style-name="ce8">
            <text:p>Paredes da B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NT -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09" table:style-name="ce9">
            <text:p>181509</text:p>
          </table:table-cell>
          <table:table-cell office:value-type="string" table:style-name="ce1">
            <text:p>São João da Pesqueira</text:p>
          </table:table-cell>
          <table:table-cell office:value-type="string" table:style-name="ce8">
            <text:p>Soutelo do Dour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EU - CAMINHAR EM UNIÃO]</text:p>
          </table:table-cell>
          <table:table-cell office:value-type="string" table:style-name="ce1">
            <text:p>[PNT - PELA NOSSA TERRA]</text:p>
          </table:table-cell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11" table:style-name="ce9">
            <text:p>181511</text:p>
          </table:table-cell>
          <table:table-cell office:value-type="string" table:style-name="ce1">
            <text:p>São João da Pesqueira</text:p>
          </table:table-cell>
          <table:table-cell office:value-type="string" table:style-name="ce8">
            <text:p>Vale de Figu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MT - CIDADÃOS UNIDOS PELA MINH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12" table:style-name="ce9">
            <text:p>181512</text:p>
          </table:table-cell>
          <table:table-cell office:value-type="string" table:style-name="ce1">
            <text:p>São João da Pesqueira</text:p>
          </table:table-cell>
          <table:table-cell office:value-type="string" table:style-name="ce8">
            <text:p>Valongo dos Azeit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NT -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15" table:style-name="ce9">
            <text:p>181515</text:p>
          </table:table-cell>
          <table:table-cell office:value-type="string" table:style-name="ce1">
            <text:p>São João da Pesqueira</text:p>
          </table:table-cell>
          <table:table-cell office:value-type="string" table:style-name="ce8">
            <text:p>União das freguesias de São João da Pesqueira e Várzea de Trevõ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NT -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16" table:style-name="ce9">
            <text:p>181516</text:p>
          </table:table-cell>
          <table:table-cell office:value-type="string" table:style-name="ce1">
            <text:p>São João da Pesqueira</text:p>
          </table:table-cell>
          <table:table-cell office:value-type="string" table:style-name="ce8">
            <text:p>União das freguesias de Trevões e Espinhos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TE - UNIDOS POR TREVÕES E ESPINHOS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517" table:style-name="ce9">
            <text:p>181517</text:p>
          </table:table-cell>
          <table:table-cell office:value-type="string" table:style-name="ce1">
            <text:p>São João da Pesqueira</text:p>
          </table:table-cell>
          <table:table-cell office:value-type="string" table:style-name="ce8">
            <text:p>União das freguesias de Vilarouco e Perei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PNT - PEL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600" table:style-name="ce9">
            <text:p>181600</text:p>
          </table:table-cell>
          <table:table-cell office:value-type="string" table:style-name="ce1">
            <text:p>São Pedro do Sul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ant - A NOSSA TERR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617" table:style-name="ce9">
            <text:p>181617</text:p>
          </table:table-cell>
          <table:table-cell office:value-type="string" table:style-name="ce1">
            <text:p>São Pedro do Sul</text:p>
          </table:table-cell>
          <table:table-cell office:value-type="string" table:style-name="ce8">
            <text:p>Valadar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FVS - Freguesia Valadares Sempr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00" table:style-name="ce9">
            <text:p>181900</text:p>
          </table:table-cell>
          <table:table-cell office:value-type="string" table:style-name="ce1">
            <text:p>Tabuaç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00" table:style-name="ce9">
            <text:p>181900</text:p>
          </table:table-cell>
          <table:table-cell office:value-type="string" table:style-name="ce1">
            <text:p>Tabuaç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01" table:style-name="ce9">
            <text:p>181901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Adorig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office:value-type="string" table:style-name="ce8">
            <text:p>[L.I.A. - Lista Independente de Adorig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02" table:style-name="ce9">
            <text:p>181902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Arc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04" table:style-name="ce9">
            <text:p>181904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Chavã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06" table:style-name="ce9">
            <text:p>181906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Granja do Ted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08" table:style-name="ce9">
            <text:p>181908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Long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13" table:style-name="ce9">
            <text:p>181913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Sendim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office:value-type="string" table:style-name="ce8">
            <text:p>[lidsufei - Lista Independente de Sendim - União Força e Inovaç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14" table:style-name="ce9">
            <text:p>181914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Tabuaç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17" table:style-name="ce9">
            <text:p>181917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Valença do Dou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18" table:style-name="ce9">
            <text:p>181918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União das freguesias de Barcos e Santa Leocád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19" table:style-name="ce9">
            <text:p>181919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União das freguesias de Paradela e Granjin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20" table:style-name="ce9">
            <text:p>181920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União das freguesias de Pinheiros e Vale de Figuei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lijcef - Lista Independente - "Juntos Caminhamos em Frente"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1921" table:style-name="ce9">
            <text:p>181921</text:p>
          </table:table-cell>
          <table:table-cell office:value-type="string" table:style-name="ce1">
            <text:p>Tabuaço</text:p>
          </table:table-cell>
          <table:table-cell office:value-type="string" table:style-name="ce8">
            <text:p>União das freguesias de Távora e Pereir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UNIDOS PELO PROGRESSO DE TABUAÇO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2301" table:style-name="ce9">
            <text:p>182301</text:p>
          </table:table-cell>
          <table:table-cell office:value-type="string" table:style-name="ce1">
            <text:p>Viseu</text:p>
          </table:table-cell>
          <table:table-cell office:value-type="string" table:style-name="ce8">
            <text:p>Abravese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CIPA - Movimento de Cidadãos Independentes por Abravese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182317" table:style-name="ce9">
            <text:p>182317</text:p>
          </table:table-cell>
          <table:table-cell office:value-type="string" table:style-name="ce1">
            <text:p>Viseu</text:p>
          </table:table-cell>
          <table:table-cell office:value-type="string" table:style-name="ce8">
            <text:p>Silgueiro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ms - Juntos Para Melhorar Silgueiro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200" table:style-name="ce9">
            <text:p>310200</text:p>
          </table:table-cell>
          <table:table-cell office:value-type="string" table:style-name="ce1">
            <text:p>Câmara de Lobo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S-PTP-PND-BE - PELA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200" table:style-name="ce9">
            <text:p>310200</text:p>
          </table:table-cell>
          <table:table-cell office:value-type="string" table:style-name="ce1">
            <text:p>Câmara de Lobo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S-PTP-PND-BE - PELA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201" table:style-name="ce9">
            <text:p>310201</text:p>
          </table:table-cell>
          <table:table-cell office:value-type="string" table:style-name="ce1">
            <text:p>Câmara de Lobos</text:p>
          </table:table-cell>
          <table:table-cell office:value-type="string" table:style-name="ce8">
            <text:p>Câmara de Lob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PTP-PND-BE - PELA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202" table:style-name="ce9">
            <text:p>310202</text:p>
          </table:table-cell>
          <table:table-cell office:value-type="string" table:style-name="ce1">
            <text:p>Câmara de Lobos</text:p>
          </table:table-cell>
          <table:table-cell office:value-type="string" table:style-name="ce8">
            <text:p>Curral das Freir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PTP-PND-BE - PELA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203" table:style-name="ce9">
            <text:p>310203</text:p>
          </table:table-cell>
          <table:table-cell office:value-type="string" table:style-name="ce1">
            <text:p>Câmara de Lobos</text:p>
          </table:table-cell>
          <table:table-cell office:value-type="string" table:style-name="ce8">
            <text:p>Estreito de Câmara de Lob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PTP-PND-BE - PELA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204" table:style-name="ce9">
            <text:p>310204</text:p>
          </table:table-cell>
          <table:table-cell office:value-type="string" table:style-name="ce1">
            <text:p>Câmara de Lobos</text:p>
          </table:table-cell>
          <table:table-cell office:value-type="string" table:style-name="ce8">
            <text:p>Quinta Grand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PTP-PND-BE - PELA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205" table:style-name="ce9">
            <text:p>310205</text:p>
          </table:table-cell>
          <table:table-cell office:value-type="string" table:style-name="ce1">
            <text:p>Câmara de Lobos</text:p>
          </table:table-cell>
          <table:table-cell office:value-type="string" table:style-name="ce8">
            <text:p>Jardim da Ser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PTP-PND-BE - PELA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00" table:style-name="ce9">
            <text:p>310300</text:p>
          </table:table-cell>
          <table:table-cell office:value-type="string" table:style-name="ce1">
            <text:p>Funchal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00" table:style-name="ce9">
            <text:p>310300</text:p>
          </table:table-cell>
          <table:table-cell office:value-type="string" table:style-name="ce1">
            <text:p>Funchal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01" table:style-name="ce9">
            <text:p>310301</text:p>
          </table:table-cell>
          <table:table-cell office:value-type="string" table:style-name="ce1">
            <text:p>Funchal</text:p>
          </table:table-cell>
          <table:table-cell office:value-type="string" table:style-name="ce8">
            <text:p>Imaculado Coração de Mari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02" table:style-name="ce9">
            <text:p>310302</text:p>
          </table:table-cell>
          <table:table-cell office:value-type="string" table:style-name="ce1">
            <text:p>Funchal</text:p>
          </table:table-cell>
          <table:table-cell office:value-type="string" table:style-name="ce8">
            <text:p>Mon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office:value-type="string" table:style-name="ce8">
            <text:p>[lifm - Lista Independente à Freguesia do Mo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03" table:style-name="ce9">
            <text:p>310303</text:p>
          </table:table-cell>
          <table:table-cell office:value-type="string" table:style-name="ce1">
            <text:p>Funchal</text:p>
          </table:table-cell>
          <table:table-cell office:value-type="string" table:style-name="ce8">
            <text:p>Funchal (Santa Luzi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04" table:style-name="ce9">
            <text:p>310304</text:p>
          </table:table-cell>
          <table:table-cell office:value-type="string" table:style-name="ce1">
            <text:p>Funchal</text:p>
          </table:table-cell>
          <table:table-cell office:value-type="string" table:style-name="ce8">
            <text:p>Funchal (Santa Maria Maior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05" table:style-name="ce9">
            <text:p>310305</text:p>
          </table:table-cell>
          <table:table-cell office:value-type="string" table:style-name="ce1">
            <text:p>Funchal</text:p>
          </table:table-cell>
          <table:table-cell office:value-type="string" table:style-name="ce8">
            <text:p>Santo Antóni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06" table:style-name="ce9">
            <text:p>310306</text:p>
          </table:table-cell>
          <table:table-cell office:value-type="string" table:style-name="ce1">
            <text:p>Funchal</text:p>
          </table:table-cell>
          <table:table-cell office:value-type="string" table:style-name="ce8">
            <text:p>São Gonça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07" table:style-name="ce9">
            <text:p>310307</text:p>
          </table:table-cell>
          <table:table-cell office:value-type="string" table:style-name="ce1">
            <text:p>Funchal</text:p>
          </table:table-cell>
          <table:table-cell office:value-type="string" table:style-name="ce8">
            <text:p>São Mart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08" table:style-name="ce9">
            <text:p>310308</text:p>
          </table:table-cell>
          <table:table-cell office:value-type="string" table:style-name="ce1">
            <text:p>Funchal</text:p>
          </table:table-cell>
          <table:table-cell office:value-type="string" table:style-name="ce8">
            <text:p>Funchal (São Pedr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09" table:style-name="ce9">
            <text:p>310309</text:p>
          </table:table-cell>
          <table:table-cell office:value-type="string" table:style-name="ce1">
            <text:p>Funchal</text:p>
          </table:table-cell>
          <table:table-cell office:value-type="string" table:style-name="ce8">
            <text:p>São Roqu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310" table:style-name="ce9">
            <text:p>310310</text:p>
          </table:table-cell>
          <table:table-cell office:value-type="string" table:style-name="ce1">
            <text:p>Funchal</text:p>
          </table:table-cell>
          <table:table-cell office:value-type="string" table:style-name="ce8">
            <text:p>Funchal (Sé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S-BE-PND-MPT-PTP-PAN - MUDANÇ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401" table:style-name="ce9">
            <text:p>310401</text:p>
          </table:table-cell>
          <table:table-cell office:value-type="string" table:style-name="ce1">
            <text:p>Machico</text:p>
          </table:table-cell>
          <table:table-cell office:value-type="string" table:style-name="ce8">
            <text:p>Água de Pen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C.M. - Movimento Cidadania de Machic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403" table:style-name="ce9">
            <text:p>310403</text:p>
          </table:table-cell>
          <table:table-cell office:value-type="string" table:style-name="ce1">
            <text:p>Machico</text:p>
          </table:table-cell>
          <table:table-cell office:value-type="string" table:style-name="ce8">
            <text:p>Machic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.C.M. - Movimento Cidadania de Machic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500" table:style-name="ce9">
            <text:p>310500</text:p>
          </table:table-cell>
          <table:table-cell office:value-type="string" table:style-name="ce1">
            <text:p>Ponta do Sol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mpps - Movimento pela Ponta do So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500" table:style-name="ce9">
            <text:p>310500</text:p>
          </table:table-cell>
          <table:table-cell office:value-type="string" table:style-name="ce1">
            <text:p>Ponta do Sol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mpps - Movimento pela Ponta do So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501" table:style-name="ce9">
            <text:p>310501</text:p>
          </table:table-cell>
          <table:table-cell office:value-type="string" table:style-name="ce1">
            <text:p>Ponta do Sol</text:p>
          </table:table-cell>
          <table:table-cell office:value-type="string" table:style-name="ce8">
            <text:p>Canhas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pps - Movimento pela Ponta do So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503" table:style-name="ce9">
            <text:p>310503</text:p>
          </table:table-cell>
          <table:table-cell office:value-type="string" table:style-name="ce1">
            <text:p>Ponta do Sol</text:p>
          </table:table-cell>
          <table:table-cell office:value-type="string" table:style-name="ce8">
            <text:p>Ponta do Sol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mpps - Movimento pela Ponta do So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800" table:style-name="ce9">
            <text:p>310800</text:p>
          </table:table-cell>
          <table:table-cell office:value-type="string" table:style-name="ce1">
            <text:p>Santa Cruz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JPP - Juntos Pelo Povo Santa Cru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800" table:style-name="ce9">
            <text:p>310800</text:p>
          </table:table-cell>
          <table:table-cell office:value-type="string" table:style-name="ce1">
            <text:p>Santa Cruz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JPP - Juntos Pelo Povo Santa Cru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802" table:style-name="ce9">
            <text:p>310802</text:p>
          </table:table-cell>
          <table:table-cell office:value-type="string" table:style-name="ce1">
            <text:p>Santa Cruz</text:p>
          </table:table-cell>
          <table:table-cell office:value-type="string" table:style-name="ce8">
            <text:p>Camach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P - Juntos Pelo Povo Santa Cru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803" table:style-name="ce9">
            <text:p>310803</text:p>
          </table:table-cell>
          <table:table-cell office:value-type="string" table:style-name="ce1">
            <text:p>Santa Cruz</text:p>
          </table:table-cell>
          <table:table-cell office:value-type="string" table:style-name="ce8">
            <text:p>Caniç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P - Juntos Pelo Povo Santa Cru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804" table:style-name="ce9">
            <text:p>310804</text:p>
          </table:table-cell>
          <table:table-cell office:value-type="string" table:style-name="ce1">
            <text:p>Santa Cruz</text:p>
          </table:table-cell>
          <table:table-cell office:value-type="string" table:style-name="ce8">
            <text:p>Gaul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P - Juntos Pelo Povo Santa Cru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805" table:style-name="ce9">
            <text:p>310805</text:p>
          </table:table-cell>
          <table:table-cell office:value-type="string" table:style-name="ce1">
            <text:p>Santa Cruz</text:p>
          </table:table-cell>
          <table:table-cell office:value-type="string" table:style-name="ce8">
            <text:p>Santa Cruz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P - Juntos Pelo Povo Santa Cru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0806" table:style-name="ce9">
            <text:p>310806</text:p>
          </table:table-cell>
          <table:table-cell office:value-type="string" table:style-name="ce1">
            <text:p>Santa Cruz</text:p>
          </table:table-cell>
          <table:table-cell office:value-type="string" table:style-name="ce8">
            <text:p>Santo António da Ser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JPP - Juntos Pelo Povo Santa Cruz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000" table:style-name="ce9">
            <text:p>311000</text:p>
          </table:table-cell>
          <table:table-cell office:value-type="string" table:style-name="ce1">
            <text:p>São Vicente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UPSV - UNIDOS POR SÃO VIC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000" table:style-name="ce9">
            <text:p>311000</text:p>
          </table:table-cell>
          <table:table-cell office:value-type="string" table:style-name="ce1">
            <text:p>São Vicente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UPSV - UNIDOS POR SÃO VIC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001" table:style-name="ce9">
            <text:p>311001</text:p>
          </table:table-cell>
          <table:table-cell office:value-type="string" table:style-name="ce1">
            <text:p>São Vicente</text:p>
          </table:table-cell>
          <table:table-cell office:value-type="string" table:style-name="ce8">
            <text:p>Boa Ventu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SV - UNIDOS POR SÃO VIC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002" table:style-name="ce9">
            <text:p>311002</text:p>
          </table:table-cell>
          <table:table-cell office:value-type="string" table:style-name="ce1">
            <text:p>São Vicente</text:p>
          </table:table-cell>
          <table:table-cell office:value-type="string" table:style-name="ce8">
            <text:p>Ponta Delgad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SV - UNIDOS POR SÃO VIC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11003" table:style-name="ce9">
            <text:p>311003</text:p>
          </table:table-cell>
          <table:table-cell office:value-type="string" table:style-name="ce1">
            <text:p>São Vicente</text:p>
          </table:table-cell>
          <table:table-cell office:value-type="string" table:style-name="ce8">
            <text:p>São Vicent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UPSV - UNIDOS POR SÃO VICENTE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320100" table:style-name="ce9">
            <text:p>320100</text:p>
          </table:table-cell>
          <table:table-cell office:value-type="string" table:style-name="ce1">
            <text:p>Porto Santo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r - RU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20325" table:style-name="ce9">
            <text:p>420325</text:p>
          </table:table-cell>
          <table:table-cell office:value-type="string" table:style-name="ce1">
            <text:p>Ponta Delgada</text:p>
          </table:table-cell>
          <table:table-cell office:value-type="string" table:style-name="ce8">
            <text:p>Santa Clara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SCVN - Santa Clara Vida Nov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20600" table:style-name="ce9">
            <text:p>420600</text:p>
          </table:table-cell>
          <table:table-cell office:value-type="string" table:style-name="ce1">
            <text:p>Vila Franca do Camp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PPM - ACREDITAR DE NOVO]</text:p>
          </table:table-cell>
          <table:table-cell table:style-name="ce1"/>
          <table:table-cell office:value-type="string" table:style-name="ce8">
            <text:p>[NR - Novo Rum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20600" table:style-name="ce9">
            <text:p>420600</text:p>
          </table:table-cell>
          <table:table-cell office:value-type="string" table:style-name="ce1">
            <text:p>Vila Franca do Camp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PPM - ACREDITAR DE NOVO]</text:p>
          </table:table-cell>
          <table:table-cell table:style-name="ce1"/>
          <table:table-cell office:value-type="string" table:style-name="ce8">
            <text:p>[NR - Novo Rum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20601" table:style-name="ce9">
            <text:p>420601</text:p>
          </table:table-cell>
          <table:table-cell office:value-type="string" table:style-name="ce1">
            <text:p>Vila Franca do Campo</text:p>
          </table:table-cell>
          <table:table-cell office:value-type="string" table:style-name="ce8">
            <text:p>Água de Al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DE NOVO]</text:p>
          </table:table-cell>
          <table:table-cell table:style-name="ce1"/>
          <table:table-cell office:value-type="string" table:style-name="ce8">
            <text:p>[NR - Novo Rum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20602" table:style-name="ce9">
            <text:p>420602</text:p>
          </table:table-cell>
          <table:table-cell office:value-type="string" table:style-name="ce1">
            <text:p>Vila Franca do Campo</text:p>
          </table:table-cell>
          <table:table-cell office:value-type="string" table:style-name="ce8">
            <text:p>Ponta Garç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DE NOVO]</text:p>
          </table:table-cell>
          <table:table-cell table:style-name="ce1"/>
          <table:table-cell office:value-type="string" table:style-name="ce8">
            <text:p>[NR - Novo Rum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20603" table:style-name="ce9">
            <text:p>420603</text:p>
          </table:table-cell>
          <table:table-cell office:value-type="string" table:style-name="ce1">
            <text:p>Vila Franca do Campo</text:p>
          </table:table-cell>
          <table:table-cell office:value-type="string" table:style-name="ce8">
            <text:p>Ribeira das Tainh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DE NOVO]</text:p>
          </table:table-cell>
          <table:table-cell table:style-name="ce1"/>
          <table:table-cell office:value-type="string" table:style-name="ce8">
            <text:p>[NR - Novo Rum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20604" table:style-name="ce9">
            <text:p>420604</text:p>
          </table:table-cell>
          <table:table-cell office:value-type="string" table:style-name="ce1">
            <text:p>Vila Franca do Campo</text:p>
          </table:table-cell>
          <table:table-cell office:value-type="string" table:style-name="ce8">
            <text:p>Vila Franca do Campo (São Miguel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DE NOVO]</text:p>
          </table:table-cell>
          <table:table-cell table:style-name="ce1"/>
          <table:table-cell office:value-type="string" table:style-name="ce8">
            <text:p>[NR - Novo Rum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20605" table:style-name="ce9">
            <text:p>420605</text:p>
          </table:table-cell>
          <table:table-cell office:value-type="string" table:style-name="ce1">
            <text:p>Vila Franca do Campo</text:p>
          </table:table-cell>
          <table:table-cell office:value-type="string" table:style-name="ce8">
            <text:p>Vila Franca do Campo (São Pedr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DE NOVO]</text:p>
          </table:table-cell>
          <table:table-cell table:style-name="ce1"/>
          <table:table-cell office:value-type="string" table:style-name="ce8">
            <text:p>[NR - Novo Rum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20606" table:style-name="ce9">
            <text:p>420606</text:p>
          </table:table-cell>
          <table:table-cell office:value-type="string" table:style-name="ce1">
            <text:p>Vila Franca do Campo</text:p>
          </table:table-cell>
          <table:table-cell office:value-type="string" table:style-name="ce8">
            <text:p>Ribeira Sec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PPM - ACREDITAR DE NOVO]</text:p>
          </table:table-cell>
          <table:table-cell table:style-name="ce1"/>
          <table:table-cell office:value-type="string" table:style-name="ce8">
            <text:p>[NR - Novo Rum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00" table:style-name="ce9">
            <text:p>430100</text:p>
          </table:table-cell>
          <table:table-cell office:value-type="string" table:style-name="ce1">
            <text:p>Angra do Heroísmo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00" table:style-name="ce9">
            <text:p>430100</text:p>
          </table:table-cell>
          <table:table-cell office:value-type="string" table:style-name="ce1">
            <text:p>Angra do Heroísmo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01" table:style-name="ce9">
            <text:p>430101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Altare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02" table:style-name="ce9">
            <text:p>430102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Angra (Nossa Senhora da Conceiç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03" table:style-name="ce9">
            <text:p>430103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Angra (Santa Luzia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04" table:style-name="ce9">
            <text:p>430104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Angra (São Pedr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05" table:style-name="ce9">
            <text:p>430105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Angra (Sé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06" table:style-name="ce9">
            <text:p>430106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Cinco Ribeir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office:value-type="string" table:style-name="ce8">
            <text:p>[TpCR - Trabalhar pelas Cinco Ribeiras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07" table:style-name="ce9">
            <text:p>430107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Doze Ribeira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09" table:style-name="ce9">
            <text:p>430109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Porto Judeu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10" table:style-name="ce9">
            <text:p>430110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Posto San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11" table:style-name="ce9">
            <text:p>430111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Raminh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12" table:style-name="ce9">
            <text:p>430112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Ribeirin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15" table:style-name="ce9">
            <text:p>430115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São Bent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16" table:style-name="ce9">
            <text:p>430116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São Mateus da Calhe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17" table:style-name="ce9">
            <text:p>430117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Serret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 - POR ANG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30119" table:style-name="ce9">
            <text:p>430119</text:p>
          </table:table-cell>
          <table:table-cell office:value-type="string" table:style-name="ce1">
            <text:p>Angra do Heroísmo</text:p>
          </table:table-cell>
          <table:table-cell office:value-type="string" table:style-name="ce8">
            <text:p>Vila de São Sebastião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CpRV - Cidadãos pela Renovação da Vila de São Sebastiã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40100" table:style-name="ce9">
            <text:p>440100</text:p>
          </table:table-cell>
          <table:table-cell office:value-type="string" table:style-name="ce1">
            <text:p>Santa Cruz da Graciosa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NE - Nova Esperanç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50100" table:style-name="ce9">
            <text:p>450100</text:p>
          </table:table-cell>
          <table:table-cell office:value-type="string" table:style-name="ce1">
            <text:p>Calheta (R.A.A.)</text:p>
          </table:table-cell>
          <table:table-cell table:style-name="ce8"/>
          <table:table-cell office:value-type="string" table:style-name="ce1">
            <text:p>CM</text:p>
          </table:table-cell>
          <table:table-cell table:style-name="ce8"/>
          <table:table-cell table:style-name="ce1"/>
          <table:table-cell office:value-type="string" table:style-name="ce8">
            <text:p>[CCALHETA - Dar Vida ao Concelh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50100" table:style-name="ce9">
            <text:p>450100</text:p>
          </table:table-cell>
          <table:table-cell office:value-type="string" table:style-name="ce1">
            <text:p>Calheta (R.A.A.)</text:p>
          </table:table-cell>
          <table:table-cell table:style-name="ce8"/>
          <table:table-cell office:value-type="string" table:style-name="ce1">
            <text:p>AM</text:p>
          </table:table-cell>
          <table:table-cell table:style-name="ce8"/>
          <table:table-cell table:style-name="ce1"/>
          <table:table-cell office:value-type="string" table:style-name="ce8">
            <text:p>[CCALHETA - Dar Vida ao Concelh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50102" table:style-name="ce9">
            <text:p>450102</text:p>
          </table:table-cell>
          <table:table-cell office:value-type="string" table:style-name="ce1">
            <text:p>Calheta (R.A.A.)</text:p>
          </table:table-cell>
          <table:table-cell office:value-type="string" table:style-name="ce8">
            <text:p>Norte Pequeno (R.A.Açores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NPEQUENO - Independentes Unidos Pelo Norte Pequen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50103" table:style-name="ce9">
            <text:p>450103</text:p>
          </table:table-cell>
          <table:table-cell office:value-type="string" table:style-name="ce1">
            <text:p>Calheta (R.A.A.)</text:p>
          </table:table-cell>
          <table:table-cell office:value-type="string" table:style-name="ce8">
            <text:p>Ribeira Seca (R.A.Açores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RSECA - Independentes Unidos pela nossa Freguesia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50105" table:style-name="ce9">
            <text:p>450105</text:p>
          </table:table-cell>
          <table:table-cell office:value-type="string" table:style-name="ce1">
            <text:p>Calheta (R.A.A.)</text:p>
          </table:table-cell>
          <table:table-cell office:value-type="string" table:style-name="ce8">
            <text:p>Topo (Nossa Senhora do Rosário)(R.A.Açores)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TOPO - Independentes Unidos pelo Topo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00" table:style-name="ce9">
            <text:p>470100</text:p>
          </table:table-cell>
          <table:table-cell office:value-type="string" table:style-name="ce1">
            <text:p>Horta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00" table:style-name="ce9">
            <text:p>470100</text:p>
          </table:table-cell>
          <table:table-cell office:value-type="string" table:style-name="ce1">
            <text:p>Horta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01" table:style-name="ce9">
            <text:p>470101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Capel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02" table:style-name="ce9">
            <text:p>470102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Castelo Branc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03" table:style-name="ce9">
            <text:p>470103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Cedr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04" table:style-name="ce9">
            <text:p>470104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Feteir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05" table:style-name="ce9">
            <text:p>470105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Flamengos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06" table:style-name="ce9">
            <text:p>470106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Horta (Angústias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07" table:style-name="ce9">
            <text:p>470107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Horta (Conceição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08" table:style-name="ce9">
            <text:p>470108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Horta (Matriz)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09" table:style-name="ce9">
            <text:p>470109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Pedro Miguel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10" table:style-name="ce9">
            <text:p>470110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Praia do Almoxarif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11" table:style-name="ce9">
            <text:p>470111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Praia do Norte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12" table:style-name="ce9">
            <text:p>470112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Ribeirinha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70113" table:style-name="ce9">
            <text:p>470113</text:p>
          </table:table-cell>
          <table:table-cell office:value-type="string" table:style-name="ce1">
            <text:p>Horta</text:p>
          </table:table-cell>
          <table:table-cell office:value-type="string" table:style-name="ce8">
            <text:p>Salão</text:p>
          </table:table-cell>
          <table:table-cell office:value-type="string" table:style-name="ce1">
            <text:p>AF</text:p>
          </table:table-cell>
          <table:table-cell office:value-type="string" table:style-name="ce8">
            <text:p>[PPD/PSD.CDS-PP.PPM - PELA NOSSA TERRA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80101" table:style-name="ce9">
            <text:p>480101</text:p>
          </table:table-cell>
          <table:table-cell office:value-type="string" table:style-name="ce1">
            <text:p>Lajes das Flores</text:p>
          </table:table-cell>
          <table:table-cell office:value-type="string" table:style-name="ce8">
            <text:p>Fajã Grande</text:p>
          </table:table-cell>
          <table:table-cell office:value-type="string" table:style-name="ce1">
            <text:p>AF</text:p>
          </table:table-cell>
          <table:table-cell table:style-name="ce8"/>
          <table:table-cell table:style-name="ce1"/>
          <table:table-cell office:value-type="string" table:style-name="ce8">
            <text:p>[AO - Alternativa Ocidental]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80200" table:style-name="ce9">
            <text:p>480200</text:p>
          </table:table-cell>
          <table:table-cell office:value-type="string" table:style-name="ce1">
            <text:p>Santa Cruz das Flores</text:p>
          </table:table-cell>
          <table:table-cell table:style-name="ce8"/>
          <table:table-cell office:value-type="string" table:style-name="ce1">
            <text:p>CM</text:p>
          </table:table-cell>
          <table:table-cell office:value-type="string" table:style-name="ce8">
            <text:p>[PPD/PSD.CDS-PP - NOVO RUMO PARA SANTA CRUZ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80200" table:style-name="ce9">
            <text:p>480200</text:p>
          </table:table-cell>
          <table:table-cell office:value-type="string" table:style-name="ce1">
            <text:p>Santa Cruz das Flores</text:p>
          </table:table-cell>
          <table:table-cell table:style-name="ce8"/>
          <table:table-cell office:value-type="string" table:style-name="ce1">
            <text:p>AM</text:p>
          </table:table-cell>
          <table:table-cell office:value-type="string" table:style-name="ce8">
            <text:p>[PPD/PSD.CDS-PP - NOVO RUMO PARA SANTA CRUZ]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/>
          <table:table-cell office:value-type="float" office:value="480204" table:style-name="ce11">
            <text:p>480204</text:p>
          </table:table-cell>
          <table:table-cell office:value-type="string" table:style-name="ce12">
            <text:p>Santa Cruz das Flores</text:p>
          </table:table-cell>
          <table:table-cell office:value-type="string" table:style-name="ce13">
            <text:p>Santa Cruz das Flores</text:p>
          </table:table-cell>
          <table:table-cell office:value-type="string" table:style-name="ce12">
            <text:p>AF</text:p>
          </table:table-cell>
          <table:table-cell office:value-type="string" table:style-name="ce13">
            <text:p>[PPD/PSD.CDS-PP - NOVO RUMO PARA SANTA CRUZ]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4"/>
        </table:table-row>
        <table:table-row table:number-rows-repeated="10465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6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275590551181102in" fo:margin-left="0.31496062992126in" fo:margin-right="0.354330708661417in" style:print-orientation="landscape" style:print-page-order="ttb" style:first-page-number="continue" style:scale-to="41%" style:table-centering="horizontal" style:print="objects charts drawings"/>
      <style:header-style>
        <style:header-footer-properties fo:min-height="0.118110236220472in" fo:margin-left="0.31496062992126in" fo:margin-right="0.354330708661417in" fo:margin-bottom="0in"/>
      </style:header-style>
      <style:footer-style>
        <style:header-footer-properties fo:min-height="0.196850393700787in" fo:margin-left="0.31496062992126in" fo:margin-right="0.35433070866141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Página <text:page-number>1</text:page-number><text:s/>de<text:s/><text:page-count>99</text:page-count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is Malaquias</meta:initial-creator>
    <dc:creator>Luis Malaquias</dc:creator>
    <meta:creation-date>2013-12-11T22:03:09Z</meta:creation-date>
    <dc:date>2015-05-04T16:39:42Z</dc:date>
    <meta:print-date>2014-01-09T13:20:05Z</meta:print-date>
  </office:meta>
</office:document-meta>
</file>